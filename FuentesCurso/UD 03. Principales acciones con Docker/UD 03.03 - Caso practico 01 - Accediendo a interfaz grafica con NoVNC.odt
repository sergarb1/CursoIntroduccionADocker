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74000002F7D4EAF803A23CC372.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2" style:family="paragraph" style:parent-style-name="Heading_20_1" style:list-style-name="WWNum1">
      <style:paragraph-properties fo:break-before="auto" fo:break-after="auto"/>
    </style:style>
    <style:style style:name="P23" style:family="paragraph" style:parent-style-name="Heading_20_1" style:list-style-name="WWNum1">
      <style:paragraph-properties fo:text-align="justify" style:justify-single-word="false" fo:break-before="auto" fo:break-after="auto"/>
    </style:style>
    <style:style style:name="P24" style:family="paragraph" style:parent-style-name="Heading_20_1" style:list-style-name="WWNum1">
      <style:paragraph-properties fo:margin-left="0.4in" fo:margin-right="0in" fo:text-align="justify" style:justify-single-word="false" fo:text-indent="-0.3in" style:auto-text-indent="false" fo:break-before="auto" fo:break-after="auto"/>
    </style:style>
    <style:style style:name="P25"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color="#1155cc" style:text-underline-style="solid" style:text-underline-width="auto" style:text-underline-color="font-color"/>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aczyuw2yex2w"/><text:span text:style-name="T1">Introducción a Docker y Kubernetes</text:span><text:span text:style-name="T2"><text:line-break/></text:span><text:span text:style-name="T3">UD 03. Caso práctico 01 - Accediendo a interfaz gráfica con NoVNC</text:span></text:p>
      <text:p text:style-name="P1"><draw:frame draw:style-name="fr1"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5"><draw:frame draw:style-name="fr1" draw:name="image4.png" text:anchor-type="as-char" svg:width="6.6929in" svg:height="0.4862in" draw:z-index="0"><draw:image xlink:href="Pictures/10000000000007800000008BADE10FA77D575FB0.png" xlink:type="simple" xlink:show="embed" xlink:actuate="onLoad" loext:mime-type="image/png"/></draw:frame></text:p>
      <text:p text:style-name="P3"><text:span text:style-name="T5">Autor: Sergi García Barea</text:span></text:p>
      <text:p text:style-name="P3"><text:span text:style-name="T5">Actualizado Enero 2026</text:span></text:p>
      <text:p text:style-name="P4"/>
      <text:p text:style-name="P3"><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3">1. Introducción<text:tab/>3</text:span></text:a></text:p>
          <text:p text:style-name="P12"><text:a xlink:type="simple" xlink:href="#_vyhbfp4t666x" text:style-name="Index_20_Link" text:visited-style-name="Index_20_Link"><text:span text:style-name="T13">2. Preparando el contenedor<text:tab/>3</text:span></text:a></text:p>
          <text:p text:style-name="P12"><text:a xlink:type="simple" xlink:href="#_ablxdd8hp5vm" text:style-name="Index_20_Link" text:visited-style-name="Index_20_Link"><text:span text:style-name="T13">3. Accediendo a la interfaz gráfica<text:tab/>3</text:span></text:a></text:p>
          <text:p text:style-name="P12"><text:a xlink:type="simple" xlink:href="#_g1qlmy5ta6mu" text:style-name="Index_20_Link" text:visited-style-name="Index_20_Link"><text:span text:style-name="T13">4. Bibliografía<text:tab/>3</text:span></text:a></text:p>
        </text:index-body>
      </text:table-of-content>
      <text:p text:style-name="P14"/>
      <text:p text:style-name="P15"><text:span text:style-name="T15">UD03. Caso práctico 01</text:span></text:p>
      <text:list xml:id="list2615421520" text:style-name="WWNum1">
        <text:list-item>
          <text:p text:style-name="P22"><text:bookmark text:name="_dbh0n1vac4c8"/>Introducción</text:p>
        </text:list-item>
      </text:list>
      <text:p text:style-name="P10">Durante el curso hemos comentado que no era sencillo utilizar aplicaciones gráficas usando Docker. En este ejemplo pondremos en marcha un servicio VNC (servicio de administración remota) junto con un cliente NoVNC (Cliente para VNC en HTML5 y JavaScript) servido vía web.</text:p>
      <text:p text:style-name="P10">Más información sobre VNC y NoVNC en <text:a xlink:type="simple" xlink:href="https://es.wikipedia.org/wiki/VNC" text:style-name="ListLabel_20_1" text:visited-style-name="ListLabel_20_1"><text:span text:style-name="T18">https://es.wikipedia.org/wiki/VNC</text:span></text:a> y en <text:a xlink:type="simple" xlink:href="https://novnc.com/" text:style-name="ListLabel_20_1" text:visited-style-name="ListLabel_20_1"><text:span text:style-name="T18">https://novnc.com/</text:span></text:a>.</text:p>
      <text:list xml:id="list60761300887653" text:continue-numbering="true" text:style-name="WWNum1">
        <text:list-item>
          <text:p text:style-name="P23"><text:bookmark text:name="_vyhbfp4t666x"/>Preparando el contenedor</text:p>
        </text:list-item>
      </text:list>
      <text:p text:style-name="P10">Para este caso práctico, simplemente creamos un contenedor a partir de la imagen descrita en <text:a xlink:type="simple" xlink:href="https://github.com/theasp/docker-novnc" text:style-name="ListLabel_20_1" text:visited-style-name="ListLabel_20_1"><text:span text:style-name="T18">https://github.com/theasp/docker-novnc</text:span></text:a>, la cual tiene todo listo para funcionar.</text:p>
      <text:p text:style-name="P10"/>
      <text:p text:style-name="P10">La lanzaremos con el siguiente comando:</text:p>
      <table:table table:name="Table1" table:style-name="Table1">
        <table:table-column table:style-name="Table1.A"/>
        <table:table-row table:style-name="Table1.1">
          <table:table-cell table:style-name="Table1.A1" office:value-type="string">
            <text:p text:style-name="P20"><text:span text:style-name="T19">docker run --rm -it -p 8081:8080 theasp/novnc</text:span></text:p>
          </table:table-cell>
        </table:table-row>
      </table:table>
      <text:p text:style-name="P10"/>
      <text:p text:style-name="P9"><text:span text:style-name="T11"><text:s/>❕</text:span><text:span text:style-name="T12"> </text:span><text:span text:style-name="T10">Atención: </text:span>como es una prueba de concepto, hemos creado la imagen con el parámetro <text:span text:style-name="T20">“--rm”</text:span>, por lo cual al cerrar la terminal el contenedor se borrará.</text:p>
      <text:list xml:id="list60761309270419" text:continue-numbering="true" text:style-name="WWNum1">
        <text:list-item>
          <text:p text:style-name="P22"><text:bookmark text:name="_ablxdd8hp5vm"/>Accediendo a la interfaz gráfica</text:p>
        </text:list-item>
      </text:list>
      <text:p text:style-name="P10">Abriendo un navegador a la siguiente URL <text:a xlink:type="simple" xlink:href="http://localhost:8081/vnc.html" text:style-name="ListLabel_20_1" text:visited-style-name="ListLabel_20_1"><text:span text:style-name="T18">http://localhost:8081/vnc.html</text:span></text:a> se nos cargará un cliente NoVNC (Cliente VNC en HTML5 y Javascript). Simplemente, conectaremos con dicho cliente y en nuestro navegador veremos una interfaz gráfica dentro de nuestro contenedor.</text:p>
      <text:p text:style-name="P10">El acceso será de una forma similar a la siguiente:</text:p>
      <text:p text:style-name="P11"><draw:frame draw:style-name="fr1" draw:name="image3.png" text:anchor-type="as-char" svg:width="4.9654in" svg:height="2.6902in" draw:z-index="0"><draw:image xlink:href="Pictures/1000020100000574000002F7D4EAF803A23CC372.png" xlink:type="simple" xlink:show="embed" xlink:actuate="onLoad" loext:mime-type="image/png"/></draw:frame></text:p>
      <text:list xml:id="list60761048943719" text:continue-numbering="true" text:style-name="WWNum1">
        <text:list-item>
          <text:p text:style-name="P24"><text:bookmark text:name="_g1qlmy5ta6mu"/>Bibliografía</text:p>
        </text:list-item>
      </text:list>
      <text:p text:style-name="P8">[1] Docker Docs <text:a xlink:type="simple" xlink:href="https://docs.docker.com/" text:style-name="ListLabel_20_1" text:visited-style-name="ListLabel_20_1"><text:span text:style-name="T18">https://docs.docker.com/</text:span></text:a></text:p>
      <text:p text:style-name="P8">[2] Imagen Docker con VNC y NoVNC <text:a xlink:type="simple" xlink:href="https://github.com/theasp/docker-novnc" text:style-name="ListLabel_20_1" text:visited-style-name="ListLabel_20_1"><text:span text:style-name="T18">https://github.com/theasp/docker-novn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1</text:span></text:p>
      </style:header>
      <style:footer>
        <text:p text:style-name="MP4"><text:span text:style-name="MT1">Curso Introducción a Docker<text:tab/><text:tab/>UD03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 meta:paragraph-count="34" meta:word-count="321" meta:character-count="2096" meta:non-whitespace-character-count="1804"/>
    <meta:generator>LibreOfficeDev/6.0.5.2$Linux_X86_64 LibreOffice_project/</meta:generator>
  </office:meta>
</office:document-meta>
</file>