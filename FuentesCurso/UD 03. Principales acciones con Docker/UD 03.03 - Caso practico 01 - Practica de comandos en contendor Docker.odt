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F0000016413C88E9D90B62EE8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.1665in" fo:margin-bottom="0.1665in" loext:contextual-spacing="false" fo:line-height="100%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3" style:family="paragraph" style:parent-style-name="Heading_20_1" style:list-style-name="WWNum3">
      <style:paragraph-properties fo:text-align="justify" style:justify-single-word="false"/>
    </style:style>
    <style:style style:name="P24" style:family="paragraph" style:parent-style-name="Heading_20_1" style:list-style-name="WWNum3">
      <style:paragraph-properties fo:break-before="auto" fo:break-after="auto"/>
    </style:style>
    <style:style style:name="P25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26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 style:font-style-complex="normal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0086b3" style:font-name="Consolas" fo:background-color="#f8f8f8" loext:char-shading-value="0" style:font-name-asian="Consolas1" style:font-name-complex="Consolas1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188038" style:font-name="Roboto Mono" style:font-name-asian="Roboto Mono1" style:font-name-complex="Roboto Mono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3. Caso práctico 01 - Práctica de comandos en contenedor Docker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vyhbfp4t666x" text:style-name="Index_20_Link" text:visited-style-name="Index_20_Link"><text:span text:style-name="T13">2. Preparando el contenedor<text:tab/>3</text:span></text:a></text:p>
          <text:p text:style-name="P11"><text:a xlink:type="simple" xlink:href="#_ar9lxfeei4gf" text:style-name="Index_20_Link" text:visited-style-name="Index_20_Link"><text:span text:style-name="T14">3. Ejercicio práctico<text:tab/>3</text:span></text:a></text:p>
          <text:p text:style-name="P11"><text:a xlink:type="simple" xlink:href="#_74kjxf02e3z" text:style-name="Index_20_Link" text:visited-style-name="Index_20_Link"><text:span text:style-name="T14">4. Comprobación del ejercicio<text:tab/>4</text:span></text:a></text:p>
          <text:p text:style-name="P11"><text:a xlink:type="simple" xlink:href="#_dqzdzxigo9e1" text:style-name="Index_20_Link" text:visited-style-name="Index_20_Link"><text:span text:style-name="T14">5. Bibliografía<text:tab/>4</text:span></text:a></text:p>
        </text:index-body>
      </text:table-of-content>
      <text:p text:style-name="Standard"/>
      <text:p text:style-name="P13"/>
      <text:p text:style-name="P14"><text:span text:style-name="T15">UD03. Caso práctico 01</text:span></text:p>
      <text:list xml:id="list2028397474" text:style-name="WWNum3">
        <text:list-item>
          <text:p text:style-name="P24"><text:bookmark text:name="_dbh0n1vac4c8"/>Introducción</text:p>
        </text:list-item>
      </text:list>
      <text:p text:style-name="P19">En este caso práctico, aprenderás a manejar un contenedor Docker basado en la imagen de Ubuntu y a realizar tareas básicas dentro de él.</text:p>
      <text:p text:style-name="P19">El objetivo es que te familiarices con los comandos esenciales para ejecutar y gestionar un contenedor, así como con algunos comandos básicos de Linux dentro de él.</text:p>
      <text:list xml:id="list32335714287957" text:continue-numbering="true" text:style-name="WWNum3">
        <text:list-item>
          <text:p text:style-name="P25"><text:bookmark text:name="_vyhbfp4t666x"/>Preparando el contenedor</text:p>
        </text:list-item>
      </text:list>
      <text:p text:style-name="P10">Crearemos un contenedor con la imagen base "ubuntu". Además, al crearlo, dejaremos lista una "shell" para instalar los programas pertinentes. Esto podemos hacerlo con la orde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8">docker run -d --name ejercicio ubuntu tail -f /dev/null</text:span></text:p>
          </table:table-cell>
        </table:table-row>
      </table:table>
      <text:p text:style-name="P10">Tras esto, el contenedor estará en marcha en segundo plano y lanza en el contenedor el comando <text:s text:c="2"/>“tail -f /dev/null”, que es un comando cuya ejecución no acaba nunca (para que mientras no paremos el contenedor, no se pare).</text:p>
      <text:p text:style-name="P10">Con esto, podemos tanto parar el contenedor como ponerlo en marcha con los comandos “docker start” y ”docker stop”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18">docker stop ejercicio<text:line-break/>docker start ejercicio</text:span></text:p>
          </table:table-cell>
        </table:table-row>
      </table:table>
      <text:p text:style-name="P10">Con el comando “docker ps” puedes ver los contenedores en marcha del sistema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18">docker ps</text:span></text:p>
          </table:table-cell>
        </table:table-row>
      </table:table>
      <text:p text:style-name="P10">y con el comando “docker ps -a” puedes ver todos los contendores (tanto parados como en marcha)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18">docker ps -a</text:span></text:p>
          </table:table-cell>
        </table:table-row>
      </table:table>
      <text:p text:style-name="P10">Una vez el contenedor está en marcha, podemos acceder a una Shell dentro del contenedor con el comand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18">docker </text:span><text:span text:style-name="T19">exec</text:span><text:span text:style-name="T18"> -it ejercicio bash</text:span></text:p>
          </table:table-cell>
        </table:table-row>
      </table:table>
      <text:p text:style-name="P10">En algunos contenedores a veces no está disponible la Sh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<text:span text:style-name="T18">docker </text:span><text:span text:style-name="T19">exec</text:span><text:span text:style-name="T18"> -it ejercicio sh</text:span></text:p>
          </table:table-cell>
        </table:table-row>
      </table:table>
      <text:p text:style-name="Standard">Un ejemplo de esta ejecución:</text:p>
      <text:p text:style-name="Standard"><draw:frame draw:style-name="fr1" draw:name="image4.png" text:anchor-type="as-char" svg:width="6.6929in" svg:height="1.861in" draw:z-index="0"><draw:image xlink:href="Pictures/10000201000004FF0000016413C88E9D90B62EE8.png" xlink:type="simple" xlink:show="embed" xlink:actuate="onLoad" loext:mime-type="image/png"/></draw:frame></text:p>
      <text:list xml:id="list32335040586314" text:continue-numbering="true" text:style-name="WWNum3">
        <text:list-item>
          <text:p text:style-name="P23"><text:bookmark text:name="_ar9lxfeei4gf"/>Ejercicio práctico</text:p>
        </text:list-item>
      </text:list>
      <text:p text:style-name="Standard">Dentro del contenedor, realiza las siguientes tareas:</text:p>
      <text:list xml:id="list2327247604" text:style-name="WWNum1">
        <text:list-item>
          <text:p text:style-name="P21">Crear una carpeta llamada<text:span text:style-name="T20"> practica_docker</text:span> dentro del directorio <text:span text:style-name="T20">/root.</text:span></text:p>
        </text:list-item>
        <text:list-item>
          <text:p text:style-name="P21">Dentro de <text:span text:style-name="T20">practica_docker</text:span>, crear tres archivos vacíos llamados <text:span text:style-name="T20">archivo1.txt, archivo2.txt y archivo3.txt.</text:span></text:p>
        </text:list-item>
        <text:list-item>
          <text:p text:style-name="P21"><text:soft-page-break/>Mover <text:span text:style-name="T20">archivo1.txt</text:span> a otra carpeta llamada <text:span text:style-name="T20">backup</text:span>, que también debes crear dentro de <text:span text:style-name="T21">/root/practica_docker.</text:span></text:p>
        </text:list-item>
        <text:list-item>
          <text:p text:style-name="P21">Mostrar el contenido de la carpeta <text:span text:style-name="T20">practica_docker</text:span> después de realizar los cambios.</text:p>
        </text:list-item>
      </text:list>
      <text:p text:style-name="Standard"/>
      <text:p text:style-name="Standard"/>
      <text:p text:style-name="P19"><text:span text:style-name="T10">Comandos útiles:</text:span></text:p>
      <text:list xml:id="list2108638842" text:style-name="WWNum2">
        <text:list-item>
          <text:p text:style-name="P22"><text:span text:style-name="T20">mkdir nombre_carpeta </text:span>→ Crea una carpeta.</text:p>
        </text:list-item>
        <text:list-item>
          <text:p text:style-name="P22"><text:span text:style-name="T20">touch nombre_archivo </text:span>→ Crea un archivo vacío.</text:p>
        </text:list-item>
        <text:list-item>
          <text:p text:style-name="P22"><text:span text:style-name="T20">mv archivo destino</text:span> → Mueve un archivo a otra ubicación.</text:p>
        </text:list-item>
        <text:list-item>
          <text:p text:style-name="P22"><text:span text:style-name="T20">ls </text:span>→ Lista los archivos y carpetas en un directorio.</text:p>
        </text:list-item>
      </text:list>
      <text:p text:style-name="P26"><text:bookmark text:name="_74kjxf02e3z"/>4. Comprobación del ejercicio</text:p>
      <text:p text:style-name="P19">Para verificar que lo has hecho bien, ejecuta el siguiente comando dentro del contenedor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0"><text:span text:style-name="T18">ls -R /root/practica_docker</text:span></text:p>
          </table:table-cell>
        </table:table-row>
      </table:table>
      <text:p text:style-name="P19">Si la salida muestra los archivos y carpetas correctamente organizados, ¡has completado la práctica con éxito!</text:p>
      <text:p text:style-name="P26"><text:bookmark text:name="_dqzdzxigo9e1"/>5. Bibliografía</text:p>
      <text:p text:style-name="P8">[1] Docker Docs <text:a xlink:type="simple" xlink:href="https://docs.docker.com/" text:style-name="ListLabel_20_19" text:visited-style-name="ListLabel_20_19"><text:span text:style-name="T23">https://docs.docker.com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Caso práctico 01</text:span></text:p>
      </style:header>
      <style:footer>
        <text:p text:style-name="MP4"><text:span text:style-name="MT1">Curso Introducción a Docker<text:tab/><text:tab/>UD03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4" meta:object-count="0" meta:page-count="2" meta:paragraph-count="56" meta:word-count="510" meta:character-count="3182" meta:non-whitespace-character-count="2728"/>
    <meta:generator>LibreOfficeDev/6.0.5.2$Linux_X86_64 LibreOffice_project/</meta:generator>
  </office:meta>
</office:document-meta>
</file>