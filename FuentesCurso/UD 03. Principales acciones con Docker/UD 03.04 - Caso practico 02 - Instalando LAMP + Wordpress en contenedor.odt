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A000001BFE0378607D2F8C0CF.png" manifest:media-type="image/png"/>
  <manifest:file-entry manifest:full-path="Pictures/10000201000004B700000081FDD7027BE422CD50.png" manifest:media-type="image/png"/>
  <manifest:file-entry manifest:full-path="Pictures/100002010000007600000029ABF5F7A91F7A9EF9.png" manifest:media-type="image/png"/>
  <manifest:file-entry manifest:full-path="Pictures/10000000000007800000008BADE10FA77D575FB0.png" manifest:media-type="image/png"/>
  <manifest:file-entry manifest:full-path="Pictures/100002010000002F00000006DBF21BC2612169B1.png" manifest:media-type="image/png"/>
  <manifest:file-entry manifest:full-path="Fonts/font9.ttf" manifest:media-type="application/x-font-ttf"/>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vg:font-face-src>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src>
    </style:font-fac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fo:break-before="auto" fo:break-after="auto"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fo:break-before="auto" fo:break-after="auto"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fo:break-before="auto" fo:break-after="auto"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6944in" fo:margin-left="0in" fo:margin-top="0in" fo:margin-bottom="0in" fo:break-before="auto" fo:break-after="auto" table:align="left"/>
    </style:style>
    <style:style style:name="Table4.A" style:family="table-column">
      <style:table-column-properties style:column-width="6.6944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6944in" fo:margin-left="0in" fo:margin-top="0in" fo:margin-bottom="0in" fo:break-before="auto" fo:break-after="auto" table:align="left"/>
    </style:style>
    <style:style style:name="Table5.A" style:family="table-column">
      <style:table-column-properties style:column-width="6.6944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6944in" fo:margin-left="0in" fo:margin-top="0in" fo:margin-bottom="0in" fo:break-before="auto" fo:break-after="auto" table:align="left"/>
    </style:style>
    <style:style style:name="Table6.A" style:family="table-column">
      <style:table-column-properties style:column-width="6.6944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6944in" fo:margin-left="0in" fo:margin-top="0in" fo:margin-bottom="0in" fo:break-before="auto" fo:break-after="auto" table:align="left"/>
    </style:style>
    <style:style style:name="Table7.A" style:family="table-column">
      <style:table-column-properties style:column-width="6.6944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6944in" fo:margin-left="0in" fo:margin-top="0in" fo:margin-bottom="0in" fo:break-before="auto" fo:break-after="auto" table:align="left"/>
    </style:style>
    <style:style style:name="Table8.A" style:family="table-column">
      <style:table-column-properties style:column-width="6.6944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6944in" fo:margin-left="0in" fo:margin-top="0in" fo:margin-bottom="0in" fo:break-before="auto" fo:break-after="auto" table:align="left"/>
    </style:style>
    <style:style style:name="Table9.A" style:family="table-column">
      <style:table-column-properties style:column-width="6.6944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6944in" fo:margin-left="0in" fo:margin-top="0in" fo:margin-bottom="0in" fo:break-before="auto" fo:break-after="auto" table:align="left"/>
    </style:style>
    <style:style style:name="Table10.A" style:family="table-column">
      <style:table-column-properties style:column-width="6.6944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6944in" fo:margin-left="0in" fo:margin-top="0in" fo:margin-bottom="0in" fo:break-before="auto" fo:break-after="auto" table:align="left"/>
    </style:style>
    <style:style style:name="Table11.A" style:family="table-column">
      <style:table-column-properties style:column-width="6.6944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6944in" fo:margin-left="0in" fo:margin-top="0in" fo:margin-bottom="0in" fo:break-before="auto" fo:break-after="auto" table:align="left"/>
    </style:style>
    <style:style style:name="Table12.A" style:family="table-column">
      <style:table-column-properties style:column-width="6.6944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6944in" fo:margin-left="0in" fo:margin-top="0in" fo:margin-bottom="0in" fo:break-before="auto" fo:break-after="auto" table:align="left"/>
    </style:style>
    <style:style style:name="Table13.A" style:family="table-column">
      <style:table-column-properties style:column-width="6.6944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6944in" fo:margin-left="0in" fo:margin-top="0in" fo:margin-bottom="0in" fo:break-before="auto" fo:break-after="auto" table:align="left"/>
    </style:style>
    <style:style style:name="Table14.A" style:family="table-column">
      <style:table-column-properties style:column-width="6.6944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6944in" fo:margin-left="0in" fo:margin-top="0in" fo:margin-bottom="0in" fo:break-before="auto" fo:break-after="auto" table:align="left"/>
    </style:style>
    <style:style style:name="Table15.A" style:family="table-column">
      <style:table-column-properties style:column-width="6.6944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6944in" fo:margin-left="0in" fo:margin-top="0in" fo:margin-bottom="0in" fo:break-before="auto" fo:break-after="auto" table:align="left"/>
    </style:style>
    <style:style style:name="Table16.A" style:family="table-column">
      <style:table-column-properties style:column-width="6.6944in"/>
    </style:style>
    <style:style style:name="Table16.1" style:family="table-row">
      <style:table-row-properties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6944in" fo:margin-left="0in" fo:margin-top="0in" fo:margin-bottom="0in" fo:break-before="auto" fo:break-after="auto" table:align="left"/>
    </style:style>
    <style:style style:name="Table17.A" style:family="table-column">
      <style:table-column-properties style:column-width="6.6944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6944in" fo:margin-left="0in" fo:margin-top="0in" fo:margin-bottom="0in" fo:break-before="auto" fo:break-after="auto" table:align="left"/>
    </style:style>
    <style:style style:name="Table18.A" style:family="table-column">
      <style:table-column-properties style:column-width="6.6944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6944in" fo:margin-left="0in" fo:margin-top="0in" fo:margin-bottom="0in" fo:break-before="auto" fo:break-after="auto" table:align="left"/>
    </style:style>
    <style:style style:name="Table19.A" style:family="table-column">
      <style:table-column-properties style:column-width="6.6944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6944in" fo:margin-left="0in" fo:margin-top="0in" fo:margin-bottom="0in" fo:break-before="auto" fo:break-after="auto" table:align="left"/>
    </style:style>
    <style:style style:name="Table20.A" style:family="table-column">
      <style:table-column-properties style:column-width="6.6944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6944in" fo:margin-left="0in" fo:margin-top="0in" fo:margin-bottom="0in" fo:break-before="auto" fo:break-after="auto" table:align="left"/>
    </style:style>
    <style:style style:name="Table21.A" style:family="table-column">
      <style:table-column-properties style:column-width="6.6944in"/>
    </style:style>
    <style:style style:name="Table21.1" style:family="table-row">
      <style:table-row-properties fo:keep-together="auto"/>
    </style:style>
    <style:style style:name="Table21.A1" style:family="table-cell">
      <style:table-cell-properties style:vertical-align="" fo:background-color="#f8f8f8" fo:padding="0.0694in" fo:border="none">
        <style:background-image/>
      </style:table-cell-properties>
    </style:style>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style>
    <style:style style:name="P4" style:family="paragraph" style:parent-style-name="Standard">
      <style:paragraph-properties fo:margin-top="0.139in" fo:margin-bottom="0in" loext:contextual-spacing="false" fo:line-height="125%" fo:orphans="2" fo:widows="2"/>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font-weight-complex="bold"/>
    </style:style>
    <style:style style:name="P7" style:family="paragraph" style:parent-style-name="Standard">
      <style:paragraph-properties fo:margin-left="0in" fo:margin-right="0in" fo:text-indent="0.0783in" style:auto-text-indent="false" fo:break-before="auto" fo:break-after="auto"/>
    </style:style>
    <style:style style:name="P8"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9" style:family="paragraph" style:parent-style-name="Standard">
      <style:paragraph-properties fo:break-before="auto" fo:break-after="auto"/>
    </style:style>
    <style:style style:name="P10" style:family="paragraph" style:parent-style-name="Standard">
      <style:paragraph-properties fo:text-align="center" style:justify-single-word="false" fo:break-before="auto" fo:break-after="auto"/>
    </style:style>
    <style:style style:name="P11"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2"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3"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14"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5" style:family="paragraph" style:parent-style-name="Standard">
      <style:paragraph-properties fo:margin-top="0in" fo:margin-bottom="0in" loext:contextual-spacing="false" fo:line-height="100%" fo:text-align="end" style:justify-single-word="false" fo:break-before="auto" fo:break-after="auto"/>
    </style:style>
    <style:style style:name="P16"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1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19"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0" style:family="paragraph" style:parent-style-name="Standard">
      <style:paragraph-properties fo:margin-top="0in" fo:margin-bottom="0in" loext:contextual-spacing="false" fo:line-height="115%" fo:text-align="start" style:justify-single-word="false"/>
    </style:style>
    <style:style style:name="P2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2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3"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24"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25" style:family="paragraph" style:parent-style-name="Standard" style:list-style-name="WWNum2">
      <style:paragraph-properties fo:margin-left="0.5in" fo:margin-right="0in" fo:margin-top="0in" fo:margin-bottom="0.0429in" loext:contextual-spacing="false" fo:text-indent="-0.25in" style:auto-text-indent="false" fo:break-before="auto" fo:break-after="auto"/>
    </style:style>
    <style:style style:name="P26" style:family="paragraph" style:parent-style-name="Standard" style:list-style-name="WWNum1">
      <style:paragraph-properties fo:margin-left="0.5in" fo:margin-right="0in" fo:margin-top="0in" fo:margin-bottom="0in" loext:contextual-spacing="false" fo:text-indent="-0.25in" style:auto-text-indent="false" fo:break-before="auto" fo:break-after="auto"/>
    </style:style>
    <style:style style:name="P27" style:family="paragraph" style:parent-style-name="Standard" style:list-style-name="WWNum1">
      <style:paragraph-properties fo:margin-left="1in" fo:margin-right="0in" fo:margin-top="0in" fo:margin-bottom="0in" loext:contextual-spacing="false" fo:text-indent="-0.25in" style:auto-text-indent="false" fo:break-before="auto" fo:break-after="auto"/>
    </style:style>
    <style:style style:name="P28" style:family="paragraph" style:parent-style-name="Standard" style:list-style-name="WWNum1">
      <style:paragraph-properties fo:margin-left="1in" fo:margin-right="0in" fo:margin-top="0in" fo:margin-bottom="0.0429in" loext:contextual-spacing="false" fo:text-indent="-0.25in" style:auto-text-indent="false" fo:break-before="auto" fo:break-after="auto"/>
    </style:style>
    <style:style style:name="P29" style:family="paragraph" style:parent-style-name="Heading_20_1" style:list-style-name="WWNum3">
      <style:paragraph-properties fo:break-before="auto" fo:break-after="auto"/>
    </style:style>
    <style:style style:name="P30" style:family="paragraph" style:parent-style-name="Heading_20_1" style:list-style-name="WWNum3">
      <style:paragraph-properties fo:text-align="justify" style:justify-single-word="false" fo:break-before="auto" fo:break-after="auto"/>
    </style:style>
    <style:style style:name="P31" style:family="paragraph" style:parent-style-name="Heading_20_1" style:list-style-name="WWNum3">
      <style:paragraph-properties fo:margin-left="0.4in" fo:margin-right="0in" fo:text-align="justify" style:justify-single-word="false" fo:text-indent="-0.3in" style:auto-text-indent="false" fo:break-before="auto" fo:break-after="auto"/>
    </style:style>
    <style:style style:name="P32" style:family="paragraph" style:parent-style-name="Heading_20_2" style:list-style-name="WWNum3">
      <style:paragraph-properties fo:break-before="auto" fo:break-after="auto"/>
    </style:style>
    <style:style style:name="P33"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font-weight-complex="normal"/>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font-weight-complex="bold"/>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fo:font-size="10pt" style:font-size-asian="10pt" style:font-size-complex="10pt"/>
    </style:style>
    <style:style style:name="T11" style:family="text">
      <style:text-properties fo:font-weight="bold" style:font-weight-asian="bold" style:font-weight-complex="bold"/>
    </style:style>
    <style:style style:name="T12" style:family="text">
      <style:text-properties style:font-name="Pacifico" fo:font-size="10pt" style:font-name-asian="Pacifico1" style:font-size-asian="10pt" style:font-name-complex="Pacifico1" style:font-size-complex="10pt"/>
    </style:style>
    <style:style style:name="T13" style:family="text">
      <style:text-properties style:font-name="Arimo" fo:font-size="10pt" style:font-name-asian="Arimo1" style:font-size-asian="10pt" style:font-name-complex="Arimo1" style:font-size-complex="10pt"/>
    </style:style>
    <style:style style:name="T14" style:family="text">
      <style:text-properties fo:font-size="18pt" fo:font-weight="bold" style:font-size-asian="18pt" style:font-weight-asian="bold" style:font-size-complex="18pt" style:font-weight-complex="bold"/>
    </style:style>
    <style:style style:name="T15" style:family="text">
      <style:text-properties fo:color="#000000" style:text-underline-style="none" fo:font-weight="bold" style:font-weight-asian="bold" style:font-weight-complex="bold"/>
    </style:style>
    <style:style style:name="T16" style:family="text">
      <style:text-properties fo:color="#000000" style:text-underline-style="none"/>
    </style:style>
    <style:style style:name="T17" style:family="text">
      <style:text-properties fo:font-variant="small-caps" fo:color="#336633" fo:font-size="16pt" style:font-size-asian="16pt" style:font-size-complex="16pt"/>
    </style:style>
    <style:style style:name="T18" style:family="text">
      <style:text-properties fo:font-variant="small-caps" fo:color="#669966" fo:font-size="14pt" style:font-size-asian="14pt" style:font-size-complex="14pt"/>
    </style:style>
    <style:style style:name="T19" style:family="text">
      <style:text-properties fo:font-variant="small-caps" fo:color="#999966" style:font-name="Tahoma" fo:font-size="9pt" style:font-name-asian="Tahoma1" style:font-size-asian="9pt" style:font-name-complex="Tahoma1" style:font-size-complex="9pt"/>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font-style="italic" style:font-style-asian="italic" style:font-style-complex="italic"/>
    </style:style>
    <style:style style:name="T22" style:family="text">
      <style:text-properties fo:color="#333333" style:font-name="Consolas" fo:background-color="#f8f8f8" loext:char-shading-value="0" style:font-name-asian="Consolas1" style:font-name-complex="Consolas1"/>
    </style:style>
    <style:style style:name="T23" style:family="text">
      <style:text-properties fo:color="#0086b3" style:font-name="Consolas" fo:background-color="#f8f8f8" loext:char-shading-value="0" style:font-name-asian="Consolas1" style:font-name-complex="Consolas1"/>
    </style:style>
    <style:style style:name="T24" style:family="text">
      <style:text-properties fo:color="#1155cc" style:text-underline-style="solid" style:text-underline-width="auto" style:text-underline-color="font-color"/>
    </style:style>
    <style:style style:name="T25" style:family="text">
      <style:text-properties style:text-underline-style="none"/>
    </style:style>
    <style:style style:name="T26" style:family="text">
      <style:text-properties fo:color="#dd1144" style:font-name="Consolas" fo:background-color="#f8f8f8" loext:char-shading-value="0" style:font-name-asian="Consolas1" style:font-name-complex="Consolas1"/>
    </style:style>
    <style:style style:name="T27"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text:bookmark text:name="_aczyuw2yex2w"/><text:span text:style-name="T1">Introducción a Docker y Kubernetes</text:span><text:span text:style-name="T3"><text:line-break/></text:span><text:span text:style-name="T4">UD 03. Caso práctico 02 - Instalando LAMP + Wordpress en un contenedor</text:span></text:p>
      <text:p text:style-name="P1"><draw:frame draw:style-name="fr1"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4"><draw:frame draw:style-name="fr1" draw:name="image2.png" text:anchor-type="as-char" svg:width="6.6929in" svg:height="0.4862in" draw:z-index="0"><draw:image xlink:href="Pictures/10000000000007800000008BADE10FA77D575FB0.png" xlink:type="simple" xlink:show="embed" xlink:actuate="onLoad" loext:mime-type="image/png"/></draw:frame></text:p>
      <text:p text:style-name="P3"><text:span text:style-name="T6">Autor: Sergi García Barea</text:span></text:p>
      <text:p text:style-name="P3"><text:span text:style-name="T6">Actualizado Enero 2026</text:span></text:p>
      <text:p text:style-name="P3"><text:span text:style-name="T7">Licencia</text:span></text:p>
      <text:p text:style-name="P6"/>
      <text:p text:style-name="P5"><text:span text:style-name="T8">Reconocimiento – NoComercial - CompartirIgual (BY-NC-SA)</text:span><text:span text:style-name="T9">: No se permite un uso comercial de la obra original ni de las posibles obras derivadas, la distribución de las cuales se debe hacer con una licencia igual a la que regula la obra original.</text:span><draw:frame draw:style-name="fr2"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7"><text:span text:style-name="T7">Nomenclatura</text:span></text:p>
      <text:p text:style-name="P7">A lo largo de este tema se utilizarán distintos símbolos para distinguir elementos importantes dentro del contenido. Estos símbolos son:</text:p>
      <text:p text:style-name="P7"/>
      <text:p text:style-name="P8"><text:span text:style-name="T10"><text:s/>📖 </text:span><text:span text:style-name="T11">Importante</text:span></text:p>
      <text:p text:style-name="P9"/>
      <text:p text:style-name="P8"><text:span text:style-name="T12"><text:s/>❕</text:span><text:span text:style-name="T13"> </text:span><text:span text:style-name="T11">Atención</text:span></text:p>
      <text:p text:style-name="P9"/>
      <text:p text:style-name="P8"><text:span text:style-name="T10"><text:s/>💬</text:span> <text:span text:style-name="T11">Interesante</text:span></text:p>
      <text:p text:style-name="Standard"><text:span text:style-name="T14">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1"><text:a xlink:type="simple" xlink:href="#_dbh0n1vac4c8" text:style-name="Index_20_Link" text:visited-style-name="Index_20_Link"><text:span text:style-name="T15">1. Introducción<text:tab/>2</text:span></text:a></text:p>
          <text:p text:style-name="P11"><text:a xlink:type="simple" xlink:href="#_vyhbfp4t666x" text:style-name="Index_20_Link" text:visited-style-name="Index_20_Link"><text:span text:style-name="T15">2. Preparando el contenedor<text:tab/>2</text:span></text:a></text:p>
          <text:p text:style-name="P11"><text:a xlink:type="simple" xlink:href="#_gmbyeykdwtrm" text:style-name="Index_20_Link" text:visited-style-name="Index_20_Link"><text:span text:style-name="T15">3. Instalando LAMP y Wordpress<text:tab/>3</text:span></text:a></text:p>
          <text:p text:style-name="P13"><text:a xlink:type="simple" xlink:href="#_x4q3rkd0xpvt" text:style-name="Index_20_Link" text:visited-style-name="Index_20_Link"><text:span text:style-name="T16">3.1 <text:s/>Actualizando repositorio e instalando LAMP + Wordpress<text:tab/>3</text:span></text:a></text:p>
          <text:p text:style-name="P13"><text:a xlink:type="simple" xlink:href="#_z2indmfvt1bb" text:style-name="Index_20_Link" text:visited-style-name="Index_20_Link"><text:span text:style-name="T16">3.2 <text:s/>Preparando Apache para usar Wordpress<text:tab/>3</text:span></text:a></text:p>
          <text:p text:style-name="P13"><text:a xlink:type="simple" xlink:href="#_uufzlwwkj0i2" text:style-name="Index_20_Link" text:visited-style-name="Index_20_Link"><text:span text:style-name="T16">3.3 <text:s/>Preparando MariaDB Server<text:tab/>4</text:span></text:a></text:p>
          <text:p text:style-name="P13"><text:a xlink:type="simple" xlink:href="#_cthoktvgv7kc" text:style-name="Index_20_Link" text:visited-style-name="Index_20_Link"><text:span text:style-name="T16">3.4 <text:s/>Configurando Wordpress<text:tab/>5</text:span></text:a></text:p>
          <text:p text:style-name="P13"><text:a xlink:type="simple" xlink:href="#_bqgy1zgilsio" text:style-name="Index_20_Link" text:visited-style-name="Index_20_Link"><text:span text:style-name="T16">3.5 <text:s/>Configurando nuestro sitio Wordpress desde el navegador<text:tab/>5</text:span></text:a></text:p>
          <text:p text:style-name="P13"><text:a xlink:type="simple" xlink:href="#_svap5okjl43i" text:style-name="Index_20_Link" text:visited-style-name="Index_20_Link"><text:span text:style-name="T16">3.6 <text:s/>Configurando los servicios para que arranquen al iniciar el contenedor<text:tab/>5</text:span></text:a></text:p>
          <text:p text:style-name="P13"><text:a xlink:type="simple" xlink:href="#_om8mfe7d3suk" text:style-name="Index_20_Link" text:visited-style-name="Index_20_Link"><text:span text:style-name="T16">3.7 <text:s/>Comprobando que todo ha funcionado correctamente<text:tab/>6</text:span></text:a></text:p>
          <text:p text:style-name="P11"><text:a xlink:type="simple" xlink:href="#_icerbg2wlrsv" text:style-name="Index_20_Link" text:visited-style-name="Index_20_Link"><text:span text:style-name="T15">4. Bibliografía<text:tab/>6</text:span></text:a></text:p>
        </text:index-body>
      </text:table-of-content>
      <text:p text:style-name="Standard"/>
      <text:p text:style-name="P14"/>
      <text:p text:style-name="P15"><text:span text:style-name="T17">UD03. Caso práctico 02</text:span></text:p>
      <text:list xml:id="list1123508431" text:style-name="WWNum3">
        <text:list-item>
          <text:p text:style-name="P29"><text:bookmark text:name="_dbh0n1vac4c8"/>Introducción</text:p>
        </text:list-item>
      </text:list>
      <text:p text:style-name="P9">En este caso práctico, vamos a utilizar como base de contenedor la imagen oficial de “<text:span text:style-name="T20">ubuntu</text:span>”. En ese contenedor instalaremos Apache, PHP y MySQL (LAMP), junto al CMS Wordpress.</text:p>
      <text:list xml:id="list35224251670199" text:continue-numbering="true" text:style-name="WWNum3">
        <text:list-item>
          <text:p text:style-name="P30"><text:bookmark text:name="_vyhbfp4t666x"/>Preparando el contenedor</text:p>
        </text:list-item>
      </text:list>
      <text:p text:style-name="P9">Crearemos un contenedor con la imagen base <text:span text:style-name="T20">“ubuntu” </text:span><text:span text:style-name="T21">(esta vez, indicando una versión, la que tiene la etiqueta “22.04”)</text:span>, al que llamaremos LAMP y en el que expondremos su puesto 80 dentro del puerto 8080 de nuestro sistema. Además, al crearlo, dejaremos lista una “shell” para instalar los programas pertinentes.</text:p>
      <text:p text:style-name="P9">Esto podemos hacerlo con la orden:</text:p>
      <table:table table:name="Table1" table:style-name="Table1">
        <table:table-column table:style-name="Table1.A"/>
        <table:table-row table:style-name="Table1.1">
          <table:table-cell table:style-name="Table1.A1" office:value-type="string">
            <text:p text:style-name="P22"><text:span text:style-name="T22">docker run -d -p 8080:80 --name LAMP ubuntu:22.04 tail -f /dev/null</text:span></text:p>
          </table:table-cell>
        </table:table-row>
      </table:table>
      <text:p text:style-name="P9">Podemos acceder al contenedor una vez creado con:</text:p>
      <table:table table:name="Table2" table:style-name="Table2">
        <table:table-column table:style-name="Table2.A"/>
        <table:table-row table:style-name="Table2.1">
          <table:table-cell table:style-name="Table2.A1" office:value-type="string">
            <text:p text:style-name="P22"><text:span text:style-name="T22">docker </text:span><text:span text:style-name="T23">exec</text:span><text:span text:style-name="T22"> -it LAMP <text:s/>bash</text:span></text:p>
          </table:table-cell>
        </table:table-row>
      </table:table>
      <text:p text:style-name="P9">Si todo sale bien nos encontraremos en la “shell” del contenedor, de forma similar a:</text:p>
      <text:p text:style-name="P9"><draw:frame draw:style-name="fr1" draw:name="image5.png" text:anchor-type="as-char" svg:width="6.6929in" svg:height="0.722in" draw:z-index="0"><draw:image xlink:href="Pictures/10000201000004B700000081FDD7027BE422CD50.png" xlink:type="simple" xlink:show="embed" xlink:actuate="onLoad" loext:mime-type="image/png"/></draw:frame></text:p>
      <text:list xml:id="list35225025198380" text:continue-numbering="true" text:style-name="WWNum3">
        <text:list-item>
          <text:p text:style-name="P30"><text:bookmark text:name="_gmbyeykdwtrm"/>Instalando LAMP y Wordpress</text:p>
        </text:list-item>
      </text:list>
      <text:p text:style-name="P9">A continuación, instalaremos todo lo necesario para disponer de Wordpress (incluyendo LAMP) siguiendo las instrucciones de instalación en Ubuntu. Podéis ver como instalar LAMP en:</text:p>
      <text:p text:style-name="P9"><text:a xlink:type="simple" xlink:href="https://www.itzgeek.com/how-tos/linux/ubuntu-how-tos/install-lamp-stack-apache-mariadb-php-on-ubuntu-22-04.html?utm_content=cmp-true" text:style-name="ListLabel_20_19" text:visited-style-name="ListLabel_20_19"><text:span text:style-name="T24">https://www.itzgeek.com/how-tos/linux/ubuntu-how-tos/install-lamp-stack-apache-mariadb-php-on-ubuntu-22-04.html?utm_content=cmp-true</text:span></text:a></text:p>
      <text:p text:style-name="P9">A continuación, detallamos los pasos a seguir.</text:p>
      <text:list xml:id="list35224841963398" text:continue-numbering="true" text:style-name="WWNum3">
        <text:list-item>
          <text:list>
            <text:list-item>
              <text:p text:style-name="P32"><text:bookmark text:name="_x4q3rkd0xpvt"/>Actualizando repositorio e instalando LAMP + Wordpress</text:p>
            </text:list-item>
          </text:list>
        </text:list-item>
      </text:list>
      <text:p text:style-name="P9">En primer lugar, actualizamos la lista de paquetes del repositorio:</text:p>
      <table:table table:name="Table3" table:style-name="Table3">
        <table:table-column table:style-name="Table3.A"/>
        <table:table-row table:style-name="Table3.1">
          <table:table-cell table:style-name="Table3.A1" office:value-type="string">
            <text:p text:style-name="P22"><text:span text:style-name="T22">apt update</text:span></text:p>
          </table:table-cell>
        </table:table-row>
      </table:table>
      <text:p text:style-name="P9">Tras ello, instalamos los paquetes necesarios para instalar LAMP + Wordpress</text:p>
      <table:table table:name="Table4" table:style-name="Table4">
        <table:table-column table:style-name="Table4.A"/>
        <text:soft-page-break/>
        <table:table-row table:style-name="Table4.1">
          <table:table-cell table:style-name="Table4.A1" office:value-type="string">
            <text:p text:style-name="P22"><text:span text:style-name="T22">apt install wordpress php libapache2-mod-php mariadb-server php-mysql</text:span></text:p>
          </table:table-cell>
        </table:table-row>
      </table:table>
      <text:p text:style-name="P9">Tras ello podemos lanzar el servicio Apache con el comando:</text:p>
      <table:table table:name="Table5" table:style-name="Table5">
        <table:table-column table:style-name="Table5.A"/>
        <table:table-row table:style-name="Table5.1">
          <table:table-cell table:style-name="Table5.A1" office:value-type="string">
            <text:p text:style-name="P22"><text:span text:style-name="T22">service apache2 start</text:span></text:p>
          </table:table-cell>
        </table:table-row>
      </table:table>
      <text:p text:style-name="P9">Con esto ya tenemos todo el software instalado. Podemos hacer ya una pequeña prueba conectando desde nuestra máquina <text:a xlink:type="simple" xlink:href="http://localhost:8080" text:style-name="ListLabel_20_19" text:visited-style-name="ListLabel_20_19"><text:span text:style-name="T24">http://localhost:8080</text:span></text:a></text:p>
      <text:list xml:id="list35223576361649" text:continue-numbering="true" text:style-name="WWNum3">
        <text:list-item>
          <text:list>
            <text:list-item>
              <text:p text:style-name="P32"><text:bookmark text:name="_z2indmfvt1bb"/>Preparando Apache para usar Wordpress</text:p>
            </text:list-item>
          </text:list>
        </text:list-item>
      </text:list>
      <text:p text:style-name="P9">Antes que nada, podemos instalar un editor de texto en modo consola que sea de vuestro agrado. Por ejemplo, con este comando podemos instalar “nano”:</text:p>
      <table:table table:name="Table6" table:style-name="Table6">
        <table:table-column table:style-name="Table6.A"/>
        <table:table-row table:style-name="Table6.1">
          <table:table-cell table:style-name="Table6.A1" office:value-type="string">
            <text:p text:style-name="P22"><text:span text:style-name="T22">apt install nano</text:span></text:p>
          </table:table-cell>
        </table:table-row>
      </table:table>
      <text:p text:style-name="P9">Una vez instalado vuestro editor favorito, editamos la configuración de Apache para trabajar con Wordpress. Deberemos crear el fichero de configuración del sitio en Apache <text:span text:style-name="T20">“/etc/apache2/sites-available/wordpress.conf”</text:span> que configurará el acceso al sitio Wordpress. Dicho fichero deberá tener el siguiente contenido:</text:p>
      <table:table table:name="Table7" table:style-name="Table7">
        <table:table-column table:style-name="Table7.A"/>
        <table:table-row table:style-name="Table7.1">
          <table:table-cell table:style-name="Table7.A1" office:value-type="string">
            <text:p text:style-name="P22"><text:span text:style-name="T22">Alias /blog /usr/share/wordpress<text:line-break/>&lt;Directory /usr/share/wordpress&gt;<text:line-break/> <text:s text:c="3"/>Options FollowSymLinks<text:line-break/> <text:s text:c="3"/>AllowOverride Limit Options FileInfo<text:line-break/> <text:s text:c="3"/>DirectoryIndex index.php<text:line-break/> <text:s text:c="3"/>Order allow,deny<text:line-break/> <text:s text:c="3"/>Allow from all<text:line-break/>&lt;/Directory&gt;<text:line-break/>&lt;Directory /usr/share/wordpress/wp-content&gt;<text:line-break/> <text:s text:c="3"/>Options FollowSymLinks<text:line-break/> <text:s text:c="3"/>Order allow,deny<text:line-break/> <text:s text:c="3"/>Allow from all<text:line-break/>&lt;/Directory&gt;</text:span></text:p>
          </table:table-cell>
        </table:table-row>
      </table:table>
      <text:p text:style-name="P9"/>
      <text:p text:style-name="P9">Creado el fichero, deberemos cargar el sitio, habilitar “URL rewriting” y recargar Apache con los siguientes comandos:</text:p>
      <table:table table:name="Table8" table:style-name="Table8">
        <table:table-column table:style-name="Table8.A"/>
        <table:table-row table:style-name="Table8.1">
          <table:table-cell table:style-name="Table8.A1" office:value-type="string">
            <text:p text:style-name="P22"><text:span text:style-name="T22">a2ensite wordpress</text:span></text:p>
          </table:table-cell>
        </table:table-row>
      </table:table>
      <text:p text:style-name="P21"/>
      <table:table table:name="Table9" table:style-name="Table9">
        <table:table-column table:style-name="Table9.A"/>
        <table:table-row table:style-name="Table9.1">
          <table:table-cell table:style-name="Table9.A1" office:value-type="string">
            <text:p text:style-name="P22"><text:span text:style-name="T22">a2enmod rewrite</text:span></text:p>
          </table:table-cell>
        </table:table-row>
      </table:table>
      <text:p text:style-name="P21"/>
      <table:table table:name="Table10" table:style-name="Table10">
        <table:table-column table:style-name="Table10.A"/>
        <table:table-row table:style-name="Table10.1">
          <table:table-cell table:style-name="Table10.A1" office:value-type="string">
            <text:p text:style-name="P22"><text:span text:style-name="T22">service apache2 restart</text:span></text:p>
          </table:table-cell>
        </table:table-row>
      </table:table>
      <text:p text:style-name="P9">Con esto ya podemos probar con la URL <text:a xlink:type="simple" xlink:href="http://localhost:8080/blog" text:style-name="ListLabel_20_19" text:visited-style-name="ListLabel_20_19"><text:span text:style-name="T24">http://localhost:8080/blog</text:span></text:a>, aunque veremos un error porque aún no hemos configurado el fichero <text:span text:style-name="T20">“/etc/wordpress/config-localhost.php”.</text:span></text:p>
      <text:list xml:id="list35224853142700" text:continue-numbering="true" text:style-name="WWNum3">
        <text:list-item>
          <text:list>
            <text:list-item>
              <text:p text:style-name="P32"><text:bookmark text:name="_uufzlwwkj0i2"/>Preparando MariaDB Server</text:p>
            </text:list-item>
          </text:list>
        </text:list-item>
      </text:list>
      <text:p text:style-name="P9">En primer lugar, deberemos poner en marcha el servicio con el comando</text:p>
      <table:table table:name="Table11" table:style-name="Table11">
        <table:table-column table:style-name="Table11.A"/>
        <table:table-row table:style-name="Table11.1">
          <table:table-cell table:style-name="Table11.A1" office:value-type="string">
            <text:p text:style-name="P22"><text:span text:style-name="T22">service mariadb start</text:span></text:p>
          </table:table-cell>
        </table:table-row>
      </table:table>
      <text:p text:style-name="P9">Tras ello, deberemos ejecutar el comando para generar un password de root de MySQL Server de forma segura (deberemos recordarlo) y otras opciones. El comando a ejecutar es:</text:p>
      <table:table table:name="Table12" table:style-name="Table12">
        <table:table-column table:style-name="Table12.A"/>
        <table:table-row table:style-name="Table12.1">
          <table:table-cell table:style-name="Table12.A1" office:value-type="string">
            <text:p text:style-name="P22"><text:span text:style-name="T22">mysql_secure_installation</text:span></text:p>
          </table:table-cell>
        </table:table-row>
      </table:table>
      <text:p text:style-name="P9">Más información en <text:a xlink:type="simple" xlink:href="https://mariadb.com/kb/en/mysql_secure_installation/" text:style-name="ListLabel_20_19" text:visited-style-name="ListLabel_20_19"><text:span text:style-name="T24">https://mariadb.com/kb/en/mysql_secure_installation/</text:span></text:a></text:p>
      <text:p text:style-name="P9">Tras ello, accederemos a la base de datos con el cliente MySQL de la siguiente forma</text:p>
      <table:table table:name="Table13" table:style-name="Table13">
        <table:table-column table:style-name="Table13.A"/>
        <table:table-row table:style-name="Table13.1">
          <table:table-cell table:style-name="Table13.A1" office:value-type="string">
            <text:p text:style-name="P22"><text:span text:style-name="T22">mysql -u root -p</text:span></text:p>
          </table:table-cell>
        </table:table-row>
      </table:table>
      <text:p text:style-name="P9">Tras indicar la contraseña de “root”, podremos escribir comandos para MySQL. Escribiremos los siguientes comandos. En primer lugar, creamos la base de datos <text:span text:style-name="T20">“wordpress”</text:span>:</text:p>
      <table:table table:name="Table14" table:style-name="Table14">
        <table:table-column table:style-name="Table14.A"/>
        <table:table-row table:style-name="Table14.1">
          <table:table-cell table:style-name="Table14.A1" office:value-type="string">
            <text:p text:style-name="P22"><text:span text:style-name="T22">CREATE DATABASE wordpress;</text:span></text:p>
          </table:table-cell>
        </table:table-row>
      </table:table>
      <text:p text:style-name="P9">Tras ellos, creamos el usuario “wordpress” (con contraseña “<text:span text:style-name="T22">MiPass-2023</text:span>”) y le damos permisos totales en la base de datos “wordpress”.</text:p>
      <table:table table:name="Table15" table:style-name="Table15">
        <table:table-column table:style-name="Table15.A"/>
        <table:table-row table:style-name="Table15.1">
          <table:table-cell table:style-name="Table15.A1" office:value-type="string">
            <text:p text:style-name="P22"><text:span text:style-name="T22">CREATE USER 'wordpress'@'%' IDENTIFIED BY 'MiPass-2023';</text:span></text:p>
          </table:table-cell>
        </table:table-row>
      </table:table>
      <text:p text:style-name="P21"/>
      <table:table table:name="Table16" table:style-name="Table16">
        <table:table-column table:style-name="Table16.A"/>
        <table:table-row table:style-name="Table16.1">
          <table:table-cell table:style-name="Table16.A1" office:value-type="string">
            <text:p text:style-name="P22"><text:span text:style-name="T22">GRANT ALL PRIVILEGES ON wordpress.* TO </text:span><text:span text:style-name="T26">'wordpress'</text:span><text:span text:style-name="T22">@</text:span><text:span text:style-name="T26">'%'</text:span><text:span text:style-name="T22"> WITH GRANT OPTION;</text:span></text:p>
          </table:table-cell>
        </table:table-row>
      </table:table>
      <text:p text:style-name="P9"/>
      <text:p text:style-name="P9">Finalmente, propagamos los privilegios establecidos para que ya estén operativos en el servidor.</text:p>
      <table:table table:name="Table17" table:style-name="Table17">
        <table:table-column table:style-name="Table17.A"/>
        <table:table-row table:style-name="Table17.1">
          <table:table-cell table:style-name="Table17.A1" office:value-type="string">
            <text:p text:style-name="P22"><text:span text:style-name="T22">FLUSH PRIVILEGES;</text:span></text:p>
          </table:table-cell>
        </table:table-row>
      </table:table>
      <text:list xml:id="list35225130223991" text:continue-numbering="true" text:style-name="WWNum3">
        <text:list-item>
          <text:list>
            <text:list-item>
              <text:p text:style-name="P32"><text:bookmark text:name="_cthoktvgv7kc"/>Configurando Wordpress</text:p>
            </text:list-item>
          </text:list>
        </text:list-item>
      </text:list>
      <text:p text:style-name="P9">Usando un editor de texto de consola, vamos a crear (si no existe) o editar el fichero de configuración de Wordpress, <text:s/><text:span text:style-name="T20">“/etc/wordpress/config-localhost.php”</text:span>, quedando de la forma que quede como ahora indicamos:</text:p>
      <table:table table:name="Table18" table:style-name="Table18">
        <table:table-column table:style-name="Table18.A"/>
        <table:table-row table:style-name="Table18.1">
          <table:table-cell table:style-name="Table18.A1" office:value-type="string">
            <text:p text:style-name="P22"><text:span text:style-name="T22">&lt;?php<text:line-break/>define(</text:span><text:span text:style-name="T26">'DB_NAME'</text:span><text:span text:style-name="T22">, </text:span><text:span text:style-name="T26">'wordpress'</text:span><text:span text:style-name="T22">);<text:line-break/>define(</text:span><text:span text:style-name="T26">'DB_USER'</text:span><text:span text:style-name="T22">, </text:span><text:span text:style-name="T26">'wordpress'</text:span><text:span text:style-name="T22">);<text:line-break/>define(</text:span><text:span text:style-name="T26">'DB_PASSWORD'</text:span><text:span text:style-name="T22">, </text:span><text:span text:style-name="T26">'MiPass-2023'</text:span><text:span text:style-name="T22">);<text:line-break/>define(</text:span><text:span text:style-name="T26">'DB_HOST'</text:span><text:span text:style-name="T22">, </text:span><text:span text:style-name="T26">'localhost'</text:span><text:span text:style-name="T22">);<text:line-break/>define(</text:span><text:span text:style-name="T26">'DB_COLLATE'</text:span><text:span text:style-name="T22">, </text:span><text:span text:style-name="T26">'utf8_general_ci'</text:span><text:span text:style-name="T22">);<text:line-break/>define(</text:span><text:span text:style-name="T26">'WP_CONTENT_DIR'</text:span><text:span text:style-name="T22">, </text:span><text:span text:style-name="T26">'/usr/share/wordpress/wp-content'</text:span><text:span text:style-name="T22">);<text:line-break/>?&gt;</text:span></text:p>
          </table:table-cell>
        </table:table-row>
      </table:table>
      <text:list xml:id="list35223450419751" text:continue-numbering="true" text:style-name="WWNum3">
        <text:list-item>
          <text:list>
            <text:list-item>
              <text:p text:style-name="P32"><text:bookmark text:name="_bqgy1zgilsio"/>Configurando nuestro sitio Wordpress desde el navegador</text:p>
            </text:list-item>
          </text:list>
        </text:list-item>
      </text:list>
      <text:p text:style-name="P9">Si todo ha ido bien, accediendo a la URL <text:a xlink:type="simple" xlink:href="http://localhost:8080/blog" text:style-name="ListLabel_20_19" text:visited-style-name="ListLabel_20_19"><text:span text:style-name="T24">http://localhost:8080/blog</text:span></text:a> podremos configurar nuestro sitio Wordpress, indicando nombre de sitio, usuario y email.</text:p>
      <text:list xml:id="list35224582441958" text:continue-numbering="true" text:style-name="WWNum3">
        <text:list-item>
          <text:list>
            <text:list-item>
              <text:p text:style-name="P32"><text:bookmark text:name="_svap5okjl43i"/>Configurando los servicios para que arranquen al iniciar el contenedor</text:p>
            </text:list-item>
          </text:list>
        </text:list-item>
      </text:list>
      <text:p text:style-name="P9">En este punto vamos a explicar cómo conseguir que nuestro contenedor Docker pueda lanzar los servicios al iniciarse. Generalmente, por el bajo coste de poner en marcha un contenedor, los sistemas Docker están pensados para ejecutar mono-servicios.</text:p>
      <text:p text:style-name="P9">Los contenedores multiservicio son la excepción (este caso práctico ha sido presentado con un fin didáctico y no de uso real). Más adelante, en el curso, veremos cómo realizar esta misma configuración utilizando servicios alojados en distintos contenedores.</text:p>
      <text:p text:style-name="P9"/>
      <text:p text:style-name="P9">Al situarnos en un caso de contenedor multiservicio, seguimos las premisas que nos indica la documentación de Docker <text:a xlink:type="simple" xlink:href="https://docs.docker.com/config/containers/multi-service_container/" text:style-name="ListLabel_20_19" text:visited-style-name="ListLabel_20_19"><text:span text:style-name="T24">https://docs.docker.com/config/containers/multi-service_container/</text:span></text:a> que propone que si necesitamos lanzar varios servicios, lancemos como comando la ejecución de un script que lance los servicios que necesitemos.</text:p>
      <text:p text:style-name="P9"/>
      <text:p text:style-name="P9">Como en este caso práctico nuestro contenedor está configurado para ejecutar al iniciarse la shell <text:span text:style-name="T20">“bash”</text:span>, podemos editar el fichero de configuración <text:span text:style-name="T20">“.bashrc” </text:span>con el fin de que al iniciar la shell, se lancen los servicios Apache y MySQL.</text:p>
      <text:p text:style-name="P9"/>
      <text:p text:style-name="P9">Podemos hacerlo siguiendo los siguientes pasos dentro del contenedor:</text:p>
      <text:list xml:id="list1742218836" text:style-name="WWNum2">
        <text:list-item>
          <text:p text:style-name="P23">Accedemos a la carpeta de nuestro usuario, “<text:span text:style-name="T20">/root</text:span>” escribiendo “<text:span text:style-name="T20">cd</text:span>”, “<text:span text:style-name="T20">cd ~</text:span>” o “<text:span text:style-name="T20">cd /root</text:span>”.</text:p>
        </text:list-item>
        <text:list-item>
          <text:p text:style-name="P25">Ahí, con un editor de texto, modificamos el fichero “<text:span text:style-name="T20">.bashrc</text:span>” y al final del mismo añadimos las líneas siguientes.</text:p>
        </text:list-item>
      </text:list>
      <table:table table:name="Table19" table:style-name="Table19">
        <table:table-column table:style-name="Table19.A"/>
        <table:table-row table:style-name="Table19.1">
          <table:table-cell table:style-name="Table19.A1" office:value-type="string">
            <text:p text:style-name="P20"><text:span text:style-name="T22">service apache2 start<text:line-break/>service mariadb start</text:span></text:p>
          </table:table-cell>
        </table:table-row>
      </table:table>
      <text:p text:style-name="P9"/>
      <text:p text:style-name="P9"><text:span text:style-name="T11">Extra:</text:span> Los contenedores de Docker, al contrario que un sistema Linux real, no inician por defecto lanzando un proceso que lanza a otros procesos (sustitutos del antiguo proceso “Init”), como Systemd <text:a xlink:type="simple" xlink:href="https://es.wikipedia.org/wiki/Systemd" text:style-name="ListLabel_20_19" text:visited-style-name="ListLabel_20_19"><text:span text:style-name="T24">https://es.wikipedia.org/wiki/Systemd</text:span></text:a> o Upstart <text:a xlink:type="simple" xlink:href="https://es.wikipedia.org/wiki/Upstart" text:style-name="ListLabel_20_19" text:visited-style-name="ListLabel_20_19"><text:span text:style-name="T24">https://es.wikipedia.org/wiki/Upstart</text:span></text:a>. Por lo cual, aunque lo configuremos, al no iniciarse junto con el contendor, no arrancara los procesos.</text:p>
      <text:p text:style-name="P9"/>
      <text:p text:style-name="P9"><text:soft-page-break/>Si en algún contexto (aunque no es lo más habitual), quisiéramos utilizar un proceso de estas características o incluso lanzar Systemd o Upstart, se plantean las siguientes soluciones.</text:p>
      <text:list xml:id="list372499793" text:style-name="WWNum1">
        <text:list-item>
          <text:p text:style-name="P24">Instalando los sistemas en nuestro contenedor y crear el contenedor Docker en modo privilegiado. <text:span text:style-name="T27">OJO, problemas de seguridad. No recomendado.</text:span> Más información:</text:p>
          <text:list>
            <text:list-item>
              <text:p text:style-name="P27"><text:a xlink:type="simple" xlink:href="https://www.trendmicro.com/en_us/research/19/l/why-running-a-privileged-container-in-docker-is-a-bad-idea.html" text:style-name="ListLabel_20_19" text:visited-style-name="ListLabel_20_19"><text:span text:style-name="T24">https://www.trendmicro.com/en_us/research/19/l/why-running-a-privileged-container-in-docker-is-a-bad-idea.html</text:span></text:a></text:p>
            </text:list-item>
          </text:list>
        </text:list-item>
        <text:list-item>
          <text:p text:style-name="P26"><text:span text:style-name="T27">Una alternativa sin contenedores privilegiados</text:span>, es utilizar una característica reciente añadida a Docker que permite lanzar su propio proceso de inicio en un contenedor no privilegiado con la opción <text:span text:style-name="T20">“--init”</text:span>, del comando <text:span text:style-name="T20">“docker run”</text:span>, e indicar ahí el proceso de SystemD o Upstart. Si no se indica nada, usará un proceso de inicio propio de Docker llamado “<text:span text:style-name="T20">tini</text:span>”. Más información:</text:p>
          <text:list>
            <text:list-item>
              <text:p text:style-name="P27"><text:a xlink:type="simple" xlink:href="https://docs.docker.com/engine/reference/run/#specify-an-init-process" text:style-name="ListLabel_20_19" text:visited-style-name="ListLabel_20_19"><text:span text:style-name="T24">https://docs.docker.com/engine/reference/run/#specify-an-init-process</text:span></text:a></text:p>
            </text:list-item>
            <text:list-item>
              <text:p text:style-name="P28"><text:a xlink:type="simple" xlink:href="https://developers.redhat.com/blog/2016/09/13/running-systemd-in-a-non-privileged-container/" text:style-name="ListLabel_20_19" text:visited-style-name="ListLabel_20_19"><text:span text:style-name="T24">https://developers.redhat.com/blog/2016/09/13/running-systemd-in-a-non-privileged-container/</text:span></text:a></text:p>
            </text:list-item>
          </text:list>
        </text:list-item>
      </text:list>
      <text:p text:style-name="P9"/>
      <text:list xml:id="list35224720060145" text:continue-list="list35224582441958" text:style-name="WWNum3">
        <text:list-item>
          <text:list>
            <text:list-item>
              <text:p text:style-name="P32"><text:bookmark text:name="_om8mfe7d3suk"/>Comprobando que todo ha funcionado correctamente</text:p>
            </text:list-item>
          </text:list>
        </text:list-item>
      </text:list>
      <text:p text:style-name="P9">Por último, para comprobar que todo ha funcionado correctamente, probaremos a parar el contenedor, ponerlo de nuevo en marcha y comprobar que podemos acceder a nuestro Wordpress en <text:a xlink:type="simple" xlink:href="http://localhost:8080/blog" text:style-name="ListLabel_20_19" text:visited-style-name="ListLabel_20_19"><text:span text:style-name="T24">http://localhost:8080/blog</text:span></text:a>. Para parar y lanzar el contenedor utilizaremos los comandos:</text:p>
      <table:table table:name="Table20" table:style-name="Table20">
        <table:table-column table:style-name="Table20.A"/>
        <table:table-row table:style-name="Table20.1">
          <table:table-cell table:style-name="Table20.A1" office:value-type="string">
            <text:p text:style-name="P22"><text:span text:style-name="T22">docker stop LAMP</text:span></text:p>
          </table:table-cell>
        </table:table-row>
      </table:table>
      <text:p text:style-name="P21"/>
      <table:table table:name="Table21" table:style-name="Table21">
        <table:table-column table:style-name="Table21.A"/>
        <table:table-row table:style-name="Table21.1">
          <table:table-cell table:style-name="Table21.A1" office:value-type="string">
            <text:p text:style-name="P22"><text:span text:style-name="T22">docker start LAMP</text:span></text:p>
          </table:table-cell>
        </table:table-row>
      </table:table>
      <text:p text:style-name="P9">Podremos observar algo similar a esto (puede variar la imagen):</text:p>
      <text:p text:style-name="P10"/>
      <text:p text:style-name="P10"><draw:frame draw:style-name="fr1" draw:name="image3.png" text:anchor-type="as-char" svg:width="4.2228in" svg:height="3.4071in" draw:z-index="0"><draw:image xlink:href="Pictures/100002010000022A000001BFE0378607D2F8C0CF.png" xlink:type="simple" xlink:show="embed" xlink:actuate="onLoad" loext:mime-type="image/png"/></draw:frame></text:p>
      <text:list xml:id="list35224917149351" text:continue-numbering="true" text:style-name="WWNum3">
        <text:list-item>
          <text:p text:style-name="P31"><text:bookmark text:name="_icerbg2wlrsv"/>Bibliografía</text:p>
        </text:list-item>
      </text:list>
      <text:p text:style-name="P7">[1] Install and configure LAMP <text:s/>on Ubuntu</text:p>
      <text:p text:style-name="P7"><text:a xlink:type="simple" xlink:href="https://www.itzgeek.com/how-tos/linux/ubuntu-how-tos/install-lamp-stack-apache-mariadb-php-on-ubuntu-22-04.html?utm_content=cmp-true" text:style-name="ListLabel_20_19" text:visited-style-name="ListLabel_20_19"><text:span text:style-name="T24">https://www.itzgeek.com/how-tos/linux/ubuntu-how-tos/install-lamp-stack-apache-mariadb-php-on-ubuntu-22-04.html?utm_content=cmp-true</text:span></text:a></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font-weight-complex="normal"/>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font-style-complex="italic" style:font-weight-complex="bold"/>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font-weight-complex="bold"/>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font-style-complex="italic"/>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9" style:display-name="ListLabel 19"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Curso Introducción a Docker <text:tab/><text:tab/>UD03. Caso práctico 02</text:span></text:p>
      </style:header>
      <style:footer>
        <text:p text:style-name="MP4"><text:span text:style-name="MT1">Curso Introducción a Docker<text:tab/><text:tab/>UD03 - Página </text:span><text:page-number text:select-page="current">3</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1" meta:image-count="5" meta:object-count="0" meta:page-count="3" meta:paragraph-count="104" meta:word-count="1259" meta:character-count="9260" meta:non-whitespace-character-count="8058"/>
    <meta:generator>LibreOfficeDev/6.0.5.2$Linux_X86_64 LibreOffice_project/</meta:generator>
  </office:meta>
</office:document-meta>
</file>