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03BACEA7D143C6194CC.png" manifest:media-type="image/png"/>
  <manifest:file-entry manifest:full-path="Pictures/100002010000049200000071C7ED1A7DC637EDF8.png" manifest:media-type="image/png"/>
  <manifest:file-entry manifest:full-path="Pictures/100002010000002F00000006DBF21BC2612169B1.png" manifest:media-type="image/png"/>
  <manifest:file-entry manifest:full-path="Pictures/10000000000007800000008BADE10FA77D575FB0.png" manifest:media-type="image/png"/>
  <manifest:file-entry manifest:full-path="Pictures/10000000000002F1000000D93ED056F245244934.png" manifest:media-type="image/png"/>
  <manifest:file-entry manifest:full-path="Pictures/10000201000001150000004B9FF856B0D6F8BF1C.png" manifest:media-type="image/png"/>
  <manifest:file-entry manifest:full-path="Pictures/100002010000013800000017FFF3A3532CC4D42A.png" manifest:media-type="image/png"/>
  <manifest:file-entry manifest:full-path="Pictures/10000201000002E30000005FE40212138CD37A80.png" manifest:media-type="image/png"/>
  <manifest:file-entry manifest:full-path="Pictures/100000000000055D000002C556890A7925A1AC7B.png" manifest:media-type="image/png"/>
  <manifest:file-entry manifest:full-path="Pictures/100002010000007600000029ABF5F7A91F7A9EF9.png" manifest:media-type="image/png"/>
  <manifest:file-entry manifest:full-path="Pictures/100000000000031C0000021A39050DF2F8B1666F.png" manifest:media-type="image/png"/>
  <manifest:file-entry manifest:full-path="Pictures/100002010000028C000000280E5C61CB1C311A0B.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3125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break-before="auto" fo:break-after="auto"/>
      <style:text-properties style:font-name="Pacifico" fo:font-size="10pt" style:font-name-asian="Pacifico1" style:font-size-asian="10pt" style:font-name-complex="Pacifico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3"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start" style:justify-single-word="false" fo:break-before="auto" fo:break-after="auto"/>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15%" fo:text-align="start" style:justify-single-word="false"/>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10">
      <style:paragraph-properties fo:margin-left="0.5in" fo:margin-right="0in" fo:text-indent="-0.25in" style:auto-text-indent="false" fo:break-before="auto" fo:break-after="auto"/>
    </style:style>
    <style:style style:name="P47" style:family="paragraph" style:parent-style-name="Standard" style:list-style-name="WWNum5">
      <style:paragraph-properties fo:margin-left="0.5in" fo:margin-right="0in" fo:text-indent="-0.25in" style:auto-text-indent="false" fo:break-before="auto" fo:break-after="auto"/>
    </style:style>
    <style:style style:name="P4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51"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52"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53" style:family="paragraph" style:parent-style-name="Standard">
      <style:paragraph-properties fo:margin-left="0in" fo:margin-right="0in" fo:text-indent="0in" style:auto-text-indent="false" fo:break-before="auto" fo:break-after="auto"/>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57" style:family="paragraph" style:parent-style-name="Heading_20_1" style:list-style-name="WWNum7">
      <style:paragraph-properties fo:break-before="auto" fo:break-after="auto"/>
    </style:style>
    <style:style style:name="P58" style:family="paragraph" style:parent-style-name="Heading_20_1" style:list-style-name="WWNum7">
      <style:paragraph-properties fo:text-align="justify" style:justify-single-word="false" fo:break-before="auto" fo:break-after="auto"/>
    </style:style>
    <style:style style:name="P59" style:family="paragraph" style:parent-style-name="Heading_20_1" style:list-style-name="WWNum7">
      <style:paragraph-properties fo:margin-top="0.0398in" fo:margin-bottom="0in" loext:contextual-spacing="false" fo:break-before="auto" fo:break-after="auto"/>
    </style:style>
    <style:style style:name="P60"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61" style:family="paragraph" style:parent-style-name="Heading_20_2" style:list-style-name="WWNum7">
      <style:paragraph-properties fo:break-before="auto" fo:break-after="auto"/>
    </style:style>
    <style:style style:name="P62" style:family="paragraph" style:parent-style-name="Heading_20_2" style:list-style-name="WWNum7">
      <style:paragraph-properties fo:margin-top="0in" fo:margin-bottom="0.0429in" loext:contextual-spacing="false" fo:break-before="auto" fo:break-after="auto"/>
    </style:style>
    <style:style style:name="P63" style:family="paragraph" style:parent-style-name="Heading_20_3" style:list-style-name="WWNum7">
      <style:paragraph-properties fo:break-before="auto" fo:break-after="auto"/>
    </style:style>
    <style:style style:name="P6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font-weight-complex="bold"/>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8" style:family="text">
      <style:text-properties fo:font-variant="normal" fo:text-transform="none" fo:font-size="12pt" style:font-size-asian="12pt" style:font-size-complex="12pt"/>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font-style-asian="italic" style:font-style-complex="italic"/>
    </style:style>
    <style:style style:name="T28" style:family="text">
      <style:text-properties fo:color="#1155cc" style:text-underline-style="solid" style:text-underline-width="auto" style:text-underline-color="font-color"/>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background-color="#f8f8f8" loext:char-shading-value="0" style:font-name-asian="Consolas1" style:font-name-complex="Consolas1"/>
    </style:style>
    <style:style style:name="T31" style:family="text">
      <style:text-properties fo:color="#008080"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49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_aczyuw2yex2w"/><text:span text:style-name="T1">Introducción a Docker y Kubernetes</text:span><text:span text:style-name="T4"><text:line-break/></text:span><text:span text:style-name="T5">UD 03. Principales acciones con Docker</text:span></text:p>
      <text:p text:style-name="P1"><draw:frame draw:style-name="fr1"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5"><draw:frame draw:style-name="fr1" draw:name="image3.png" text:anchor-type="as-char" svg:width="6.6929in" svg:height="0.4862in" draw:z-index="0"><draw:image xlink:href="Pictures/10000000000007800000008BADE10FA77D575FB0.png" xlink:type="simple" xlink:show="embed" xlink:actuate="onLoad" loext:mime-type="image/png"/></draw:frame></text:p>
      <text:p text:style-name="P4"><text:span text:style-name="T7">Autor: Sergi García Barea</text:span></text:p>
      <text:p text:style-name="P4"><text:span text:style-name="T7">Actualizado Enero 2026</text:span></text:p>
      <text:p text:style-name="P4"><text:span text:style-name="T8">Licencia</text:span></text:p>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11.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8">Nomenclatura</text:span></text:p>
      <text:p text:style-name="P7">A lo largo de este tema se utilizarán distintos símbolos para distinguir elementos importantes dentro del contenido. Estos símbolos son:</text:p>
      <text:p text:style-name="P7"/>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p text:style-name="P1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dbh0n1vac4c8" text:style-name="Index_20_Link" text:visited-style-name="Index_20_Link"><text:span text:style-name="T15">1. Introducción<text:tab/>3</text:span></text:a></text:p>
          <text:p text:style-name="P22"><text:a xlink:type="simple" xlink:href="#_vyhbfp4t666x" text:style-name="Index_20_Link" text:visited-style-name="Index_20_Link"><text:span text:style-name="T15">2. ¿Gestionaremos Docker mediante interfaz gráfica?<text:tab/>3</text:span></text:a></text:p>
          <text:p text:style-name="P22"><text:a xlink:type="simple" xlink:href="#_gh56wl6jl7p1" text:style-name="Index_20_Link" text:visited-style-name="Index_20_Link"><text:span text:style-name="T15">3. Imágenes y contenedores<text:tab/>3</text:span></text:a></text:p>
          <text:p text:style-name="P24"><text:a xlink:type="simple" xlink:href="#_xloh166bd3w4" text:style-name="Index_20_Link" text:visited-style-name="Index_20_Link"><text:span text:style-name="T15">3.1 <text:s/>¿Qué es una imagen y un contenedor?<text:tab/>3</text:span></text:a></text:p>
          <text:p text:style-name="P24"><text:a xlink:type="simple" xlink:href="#_ey7if4jcrhxg" text:style-name="Index_20_Link" text:visited-style-name="Index_20_Link"><text:span text:style-name="T15">3.2 <text:s/>¿Dónde se almacenan imágenes, contenedores y datos?<text:tab/>4</text:span></text:a></text:p>
          <text:p text:style-name="P22"><text:a xlink:type="simple" xlink:href="#_poz6ybagnhp" text:style-name="Index_20_Link" text:visited-style-name="Index_20_Link"><text:span text:style-name="T15">4. Registro: Docker Hub<text:tab/>4</text:span></text:a></text:p>
          <text:p text:style-name="P22"><text:a xlink:type="simple" xlink:href="#_w71whd5n4uk7" text:style-name="Index_20_Link" text:visited-style-name="Index_20_Link"><text:span text:style-name="T15">5. Creando y arrancando contenedores con “docker run”<text:tab/>5</text:span></text:a></text:p>
          <text:p text:style-name="P24"><text:a xlink:type="simple" xlink:href="#_1xnzbmfznubi" text:style-name="Index_20_Link" text:visited-style-name="Index_20_Link"><text:span text:style-name="T15">5.1 <text:s/>¿Qué hace el comando “docker run”?<text:tab/>5</text:span></text:a></text:p>
          <text:p text:style-name="P24"><text:a xlink:type="simple" xlink:href="#_f5ltnnyldmf" text:style-name="Index_20_Link" text:visited-style-name="Index_20_Link"><text:span text:style-name="T15">5.2 <text:s/>Creando contenedores sin arrancarlos<text:tab/>5</text:span></text:a></text:p>
          <text:p text:style-name="P24"><text:a xlink:type="simple" xlink:href="#_3vk49dliwzc1" text:style-name="Index_20_Link" text:visited-style-name="Index_20_Link"><text:span text:style-name="T15">5.3 <text:s/>Repasando caso práctico “Hello World”<text:tab/>5</text:span></text:a></text:p>
          <text:p text:style-name="P25"><text:a xlink:type="simple" xlink:href="#_8gwq5jall4uh" text:style-name="Index_20_Link" text:visited-style-name="Index_20_Link"><text:span text:style-name="T15">5.3.1 <text:s/>Repaso parte 1: obteniendo la imagen<text:tab/>5</text:span></text:a></text:p>
          <text:p text:style-name="P25"><text:a xlink:type="simple" xlink:href="#_o0rq8lxu3yr9" text:style-name="Index_20_Link" text:visited-style-name="Index_20_Link"><text:span text:style-name="T15">5.3.2 <text:s/>Repaso parte 2: el contenedor se crea y ejecuta un comando<text:tab/>6</text:span></text:a></text:p>
          <text:p text:style-name="P22"><text:a xlink:type="simple" xlink:href="#_oj1tscys5ojt" text:style-name="Index_20_Link" text:visited-style-name="Index_20_Link"><text:span text:style-name="T15">6. Listar contenedores disponibles en el sistema con “docker ps”<text:tab/>7</text:span></text:a></text:p>
          <text:p text:style-name="P22"><text:a xlink:type="simple" xlink:href="#_cfe0nu5y7owy" text:style-name="Index_20_Link" text:visited-style-name="Index_20_Link"><text:span text:style-name="T15">7. Parando y arrancando contenedores existentes con “docker start/stop/restart”<text:tab/>8</text:span></text:a></text:p>
          <text:p text:style-name="P22"><text:a xlink:type="simple" xlink:href="#_lap6bz7c9nll" text:style-name="Index_20_Link" text:visited-style-name="Index_20_Link"><text:span text:style-name="T15">8. Inspeccionando contenedores con “docker inspect”<text:tab/>8</text:span></text:a></text:p>
          <text:p text:style-name="P22"><text:a xlink:type="simple" xlink:href="#_25yontxyamvh" text:style-name="Index_20_Link" text:visited-style-name="Index_20_Link"><text:span text:style-name="T15">9. Ejecutando comandos en un contenedor con “docker exec”<text:tab/>8</text:span></text:a></text:p>
          <text:p text:style-name="P22"><text:a xlink:type="simple" xlink:href="#_o9yfbpawu2x7" text:style-name="Index_20_Link" text:visited-style-name="Index_20_Link"><text:span text:style-name="T15">10. Copiando ficheros entre anfitrión y contenedores con “docker cp”<text:tab/>9</text:span></text:a></text:p>
          <text:p text:style-name="P22"><text:a xlink:type="simple" xlink:href="#_ezcrjcutgd8" text:style-name="Index_20_Link" text:visited-style-name="Index_20_Link"><text:span text:style-name="T15">11. Accediendo a un proceso en ejecución con “docker attach”<text:tab/>9</text:span></text:a></text:p>
          <text:p text:style-name="P22"><text:a xlink:type="simple" xlink:href="#_bqgy1zgilsio" text:style-name="Index_20_Link" text:visited-style-name="Index_20_Link"><text:span text:style-name="T15">12. Obteniendo información de los logs con “docker logs”<text:tab/>10</text:span></text:a></text:p>
          <text:p text:style-name="P22"><text:a xlink:type="simple" xlink:href="#_ciz1fic0w1t2" text:style-name="Index_20_Link" text:visited-style-name="Index_20_Link"><text:span text:style-name="T15">13. Renombrando contenedores con “docker rename”<text:tab/>10</text:span></text:a></text:p>
          <text:p text:style-name="P22"><text:a xlink:type="simple" xlink:href="#_k433gpm5zyqm" text:style-name="Index_20_Link" text:visited-style-name="Index_20_Link"><text:span text:style-name="T15">14. Principales ejemplos básicos de uso de docker para crear y manipular contenedores<text:tab/>10</text:span></text:a></text:p>
          <text:p text:style-name="P24"><text:a xlink:type="simple" xlink:href="#_zcvyprsttr2t" text:style-name="Index_20_Link" text:visited-style-name="Index_20_Link"><text:span text:style-name="T15">14.1 <text:s/>Ejemplo 1: creando y lanzando contenedor Ubuntu y accediendo a una terminal<text:tab/>10</text:span></text:a></text:p>
          <text:p text:style-name="P24"><text:a xlink:type="simple" xlink:href="#_ablxdd8hp5vm" text:style-name="Index_20_Link" text:visited-style-name="Index_20_Link"><text:span text:style-name="T15">14.2 <text:s/>Ejemplo 2: accediendo a terminal desde el contenedor parado con “docker start”<text:tab/>11</text:span></text:a></text:p>
          <text:p text:style-name="P24"><text:a xlink:type="simple" xlink:href="#_m89kfioqn2pp" text:style-name="Index_20_Link" text:visited-style-name="Index_20_Link"><text:span text:style-name="T15">14.3 <text:s/>Ejemplo 3: accediendo a la terminal de un contenedor en ejecución con “docker exec”<text:tab/>11</text:span></text:a></text:p>
          <text:p text:style-name="P24"><text:a xlink:type="simple" xlink:href="#_k9j93zbl4eya" text:style-name="Index_20_Link" text:visited-style-name="Index_20_Link"><text:span text:style-name="T15">14.4 <text:s/>Ejemplo 4: ejecutando una versión de una imagen y autoeliminando el contenedor<text:tab/>12</text:span></text:a></text:p>
          <text:p text:style-name="P24"><text:a xlink:type="simple" xlink:href="#_49glqfcq5cdy" text:style-name="Index_20_Link" text:visited-style-name="Index_20_Link"><text:span text:style-name="T15">14.5 <text:s/>Ejemplo 5: lanzando un servidor web en background y asociando sus puertos<text:tab/>12</text:span></text:a></text:p>
          <text:p text:style-name="P24"><text:a xlink:type="simple" xlink:href="#_ci4lxughl4tm" text:style-name="Index_20_Link" text:visited-style-name="Index_20_Link"><text:span text:style-name="T15">14.6 <text:s/>Ejemplo 6: cambiando el “index.html” y consultando logs<text:tab/>13</text:span></text:a></text:p>
          <text:p text:style-name="P24"><text:a xlink:type="simple" xlink:href="#_cthoktvgv7kc" text:style-name="Index_20_Link" text:visited-style-name="Index_20_Link"><text:span text:style-name="T15">14.7 <text:s/>Ejemplo 7: estableciendo variables de entorno<text:tab/>13</text:span></text:a></text:p>
          <text:p text:style-name="P22"><text:a xlink:type="simple" xlink:href="#_g1qlmy5ta6mu" text:style-name="Index_20_Link" text:visited-style-name="Index_20_Link"><text:span text:style-name="T15">15. Bibliografía<text:tab/>13</text:span></text:a></text:p>
        </text:index-body>
      </text:table-of-content>
      <text:p text:style-name="P12"/>
      <text:p text:style-name="P12"><text:soft-page-break/></text:p>
      <text:p text:style-name="P14"/>
      <text:p text:style-name="P16"><text:span text:style-name="T19">UD03. Principales acciones con Docker</text:span></text:p>
      <text:list xml:id="list328870465" text:style-name="WWNum7">
        <text:list-item>
          <text:p text:style-name="P57"><text:bookmark text:name="_dbh0n1vac4c8"/>Introducción</text:p>
        </text:list-item>
      </text:list>
      <text:p text:style-name="P9">En esta unidad explicaremos algunas de las principales acciones básicas que podemos realizar con Docker. Al finalizar la unidad ya estaremos listos para usar Docker con cierta soltura.</text:p>
      <text:list xml:id="list34853118771352" text:continue-numbering="true" text:style-name="WWNum7">
        <text:list-item>
          <text:p text:style-name="P58"><text:bookmark text:name="_vyhbfp4t666x"/>¿Gestionaremos Docker mediante interfaz gráfica?</text:p>
        </text:list-item>
      </text:list>
      <text:p text:style-name="P9">Existen distintas herramientas para gestionar Docker desde una interfaz gráfica, haciendo la tarea más visual e intuitiva. Aunque estas herramientas pueden ser muy útiles, en el momento de aprender a trabajar con Docker, pueden hacer que se nos escape la comprensión de determinados mecanismos del funcionamiento de Docker. Por ese motivo, en el curso no gestionaremos Docker mediante interfaz gráfica y<text:span text:style-name="T23"> realizaremos todas las operaciones mediante la línea de comandos.</text:span></text:p>
      <text:list xml:id="list34853624479252" text:continue-numbering="true" text:style-name="WWNum7">
        <text:list-item>
          <text:p text:style-name="P58"><text:bookmark text:name="_gh56wl6jl7p1"/>Imágenes y contenedores</text:p>
          <text:list>
            <text:list-item>
              <text:p text:style-name="P61"><text:bookmark text:name="_xloh166bd3w4"/>¿Qué es una imagen y un contenedor?</text:p>
            </text:list-item>
          </text:list>
        </text:list-item>
      </text:list>
      <text:p text:style-name="P9">Antes de comenzar, es importante aclarar algunos conceptos sobre qué son imágenes y contenedores y cuáles son sus características. Algunos conceptos a tener en cuenta son:</text:p>
      <text:list xml:id="list447478325" text:style-name="WWNum3">
        <text:list-item>
          <text:p text:style-name="P26"><text:span text:style-name="T12">Imágenes</text:span>:</text:p>
          <text:list>
            <text:list-item>
              <text:p text:style-name="P48">La imagen es una plantilla de solo lectura que se utiliza para crear contenedores. A partir de una imagen pueden crearse múltiples contenedores.</text:p>
            </text:list-item>
            <text:list-item>
              <text:p text:style-name="P48">Las imágenes, además de tener su sistema de ficheros predefinido, tienen una serie de parámetros predefinidos (comandos, de variables de entorno, etc.) con valores por defecto y que se pueden personalizar en el momento de crear el contenedor.</text:p>
            </text:list-item>
            <text:list-item>
              <text:p text:style-name="P48">Docker permite crear nuevas imágenes basándose en imágenes anteriores. Se podría decir que una imagen puede estar formada por un conjunto de “capas” que han modificado una imagen base. </text:p>
              <text:list>
                <text:list-item>
                  <text:p text:style-name="P51">Al crear una nueva imagen, simplemente estamos añadiendo una capa a la imagen anterior, la que actúa como base.</text:p>
                </text:list-item>
              </text:list>
            </text:list-item>
          </text:list>
        </text:list-item>
        <text:list-item>
          <text:p text:style-name="P34"><text:span text:style-name="T12">Contendores</text:span>:</text:p>
          <text:list>
            <text:list-item>
              <text:p text:style-name="P48">Son instancias de una imagen.</text:p>
            </text:list-item>
            <text:list-item>
              <text:p text:style-name="P48">Pueden ser arrancados, parados y ejecutados.</text:p>
            </text:list-item>
            <text:list-item>
              <text:p text:style-name="P48">Cada contenedor Docker posee un <text:span text:style-name="T12">identificador único de 64 caracteres</text:span>, pero habitualmente se utiliza una <text:span text:style-name="T12">versión corta con los primeros 12 caracteres</text:span>.</text:p>
              <text:list>
                <text:list-item>
                  <text:p text:style-name="P51">Los comandos Docker habitualmente soportan ambas versiones.</text:p>
                </text:list-item>
              </text:list>
            </text:list-item>
            <text:list-item>
              <text:p text:style-name="P48">También podemos referimos a los contenedores con menos caracteres, siempre que su expresión regular sea única. </text:p>
              <text:list>
                <text:list-item>
                  <text:p text:style-name="P52">Por ejemplo, si tienes dos contenedores y el ID de un contenedor empieza por “7” y el ID del otro por “9”, simplemente escribiendo como ID “7” se referirá al primer contenedor, ya que no hay otro contenedor que empiece por “7”. Si hubiera varios contenedores que empezaran igual, habría que añadir más caracteres hasta encontrar un patrón no común.</text:p>
                </text:list-item>
              </text:list>
            </text:list-item>
          </text:list>
        </text:list-item>
      </text:list>
      <text:p text:style-name="P53">Un símil para entender estos conceptos: una instalación de una distribución de Linux mediante un DVD. Ese DVD sería nuestra imagen y el sistema operativo instalado sería el contenedor.</text:p>
      <text:p text:style-name="P9">Detallaremos conceptos relacionados sobre la creación de imágenes en futuras unidades.</text:p>
      <text:list xml:id="list34852062639723" text:continue-list="list34853624479252" text:style-name="WWNum7">
        <text:list-item>
          <text:list>
            <text:list-item>
              <text:p text:style-name="P61"><text:bookmark text:name="_ey7if4jcrhxg"/>¿Dónde se almacenan imágenes, contenedores y datos?</text:p>
            </text:list-item>
          </text:list>
        </text:list-item>
      </text:list>
      <text:p text:style-name="P9">El lugar donde se almacenan contenedores e imágenes puede variar según distribución/sistema operativo, driver de almacenamiento y versión de Docker. Normalmente, mediante el siguiente comando de Docker, podemos ver información del sistema, incluyendo el directorio de Docker.</text:p>
      <table:table table:name="Table1" table:style-name="Table1">
        <table:table-column table:style-name="Table1.A"/>
        <table:table-row table:style-name="Table1.1">
          <table:table-cell table:style-name="Table1.A1" office:value-type="string">
            <text:p text:style-name="P55"><text:span text:style-name="T25">docker info</text:span></text:p>
          </table:table-cell>
        </table:table-row>
      </table:table>
      <text:p text:style-name="P9">Ese comando nos ofrece información sobre el estado de Docker. Para conocer donde se almacena la información, dos datos son importantes: directorio de Docker y driver de almacenamiento.</text:p>
      <text:p text:style-name="P9">Driver de almacenamiento utilizado por Docker:</text:p>
      <text:p text:style-name="P9"><draw:frame draw:style-name="fr1" draw:name="image4.png" text:anchor-type="as-char" svg:width="2.2953in" svg:height="0.6043in" draw:z-index="0"><draw:image xlink:href="Pictures/10000201000001150000004B9FF856B0D6F8BF1C.png" xlink:type="simple" xlink:show="embed" xlink:actuate="onLoad" loext:mime-type="image/png"/></draw:frame></text:p>
      <text:p text:style-name="P9">En el ejemplo se nos indica el driver de almacenamiento utilizado (“<text:span text:style-name="T26">overlay2</text:span>”) y sobre qué sistema de archivos está funcionando (“<text:span text:style-name="T26">extfs</text:span>”, en concreto “<text:span text:style-name="T26">ext4</text:span>”).</text:p>
      <text:p text:style-name="P9">Para saber más sobre los distintos drivers de almacenamiento de Docker, podéis consultar <text:a xlink:type="simple" xlink:href="https://docs.docker.com/storage/storagedriver/select-storage-driver/" text:style-name="ListLabel_20_82" text:visited-style-name="ListLabel_20_82"><text:span text:style-name="T28">https://docs.docker.com/storage/storagedriver/select-storage-driver/</text:span></text:a></text:p>
      <text:p text:style-name="P9">Directorio de Docker:</text:p>
      <text:p text:style-name="P9"><draw:frame draw:style-name="fr1" draw:name="image9.png" text:anchor-type="as-char" svg:width="2.8543in" svg:height="0.1992in" draw:z-index="0"><draw:image xlink:href="Pictures/100002010000013800000017FFF3A3532CC4D42A.png" xlink:type="simple" xlink:show="embed" xlink:actuate="onLoad" loext:mime-type="image/png"/></draw:frame></text:p>
      <text:p text:style-name="P9">Directorio donde se almacena todo lo relacionado con Docker. </text:p>
      <text:p text:style-name="P9">Al utilizar el driver “<text:span text:style-name="T26">overlay2</text:span>” sabemos que </text:p>
      <text:list xml:id="list660535402" text:style-name="WWNum4">
        <text:list-item>
          <text:p text:style-name="P27">La información de las imágenes se encuentra en “<text:span text:style-name="T26">/var/lib/docker/overlay2</text:span>”.</text:p>
          <text:list>
            <text:list-item>
              <text:p text:style-name="P49">Recordemos que las imágenes se basan en capas, una imagen puede estar creada por un conjunto de capas.</text:p>
            </text:list-item>
            <text:list-item>
              <text:p text:style-name="P49">El almacenamiento temporal de contenedores (es decir, pequeños cambios en los contenedores), se realiza como “versiones de las imágenes”, es decir, una capa más de la imagen base.</text:p>
            </text:list-item>
          </text:list>
        </text:list-item>
        <text:list-item>
          <text:p text:style-name="P35">La configuración de los contenedores se almacena en “<text:span text:style-name="T26">/var/lib/docker/containers</text:span>”.</text:p>
        </text:list-item>
        <text:list-item>
          <text:p text:style-name="P40">Para acceso a datos compartidos, persistencia, etc. existe la figura de los volúmenes, la cual detallaremos en posteriores unidades. </text:p>
        </text:list-item>
      </text:list>
      <text:list xml:id="list34853138905789" text:continue-list="list34852062639723" text:style-name="WWNum7">
        <text:list-item>
          <text:p text:style-name="P58"><text:bookmark text:name="_poz6ybagnhp"/>Registro: Docker Hub</text:p>
        </text:list-item>
      </text:list>
      <text:p text:style-name="P9">Docker Hub es una “plataforma de registro” de Docker. Los servicios básicos son gratuitos y nos permite registrar imágenes Docker, haciéndolas públicas o privadas. </text:p>
      <text:p text:style-name="P9">Contiene un gran ecosistema de imágenes ya creadas, usualmente con instrucciones de instalación y uso, además de un buscador que nos permite encontrar imágenes según distintos parámetros. Enlace al buscador <text:a xlink:type="simple" xlink:href="https://hub.docker.com/search?q=&amp;type=image" text:style-name="ListLabel_20_82" text:visited-style-name="ListLabel_20_82"><text:span text:style-name="T28">https://hub.docker.com/search?q=&amp;type=image</text:span></text:a></text:p>
      <text:p text:style-name="P9"/>
      <text:p text:style-name="P10"><draw:frame draw:style-name="fr1" draw:name="image7.png" text:anchor-type="as-char" svg:width="3.8409in" svg:height="1.9807in" draw:z-index="0"><draw:image xlink:href="Pictures/100000000000055D000002C556890A7925A1AC7B.png" xlink:type="simple" xlink:show="embed" xlink:actuate="onLoad" loext:mime-type="image/png"/></draw:frame></text:p>
      <text:p text:style-name="P9"/>
      <text:p text:style-name="P9">Por defecto, Docker utiliza esta plataforma <text:s/>registro como “registro por defecto”, aunque es posible, si se requiere, elegir otro servicio de registro, e incluso montar un servicio privado de registro. </text:p>
      <text:p text:style-name="P9"/>
      <text:p text:style-name="P9">Más información sobre cómo crear un registro privado en</text:p>
      <text:list xml:id="list744935523" text:style-name="WWNum10">
        <text:list-item>
          <text:p text:style-name="P46"><text:a xlink:type="simple" xlink:href="https://www.digitalocean.com/community/tutorials/how-to-set-up-a-private-docker-registry-on-ubuntu-18-04-es" text:style-name="ListLabel_20_82" text:visited-style-name="ListLabel_20_82"><text:span text:style-name="T28">https://www.digitalocean.com/community/tutorials/how-to-set-up-a-private-docker-registry-on-ubuntu-18-04-es</text:span></text:a></text:p>
        </text:list-item>
      </text:list>
      <text:list xml:id="list34852643327829" text:continue-list="list34853138905789" text:style-name="WWNum7">
        <text:list-item>
          <text:p text:style-name="P58"><text:bookmark text:name="_w71whd5n4uk7"/>Creando y arrancando contenedores con “docker run”</text:p>
          <text:list>
            <text:list-item>
              <text:p text:style-name="P61"><text:bookmark text:name="_1xnzbmfznubi"/>¿Qué hace el comando “docker run”?</text:p>
            </text:list-item>
          </text:list>
        </text:list-item>
      </text:list>
      <text:p text:style-name="P9">Es posiblemente el comando “docker run” más utilizado. Podríamos decir que <text:span text:style-name="T23">este comando crea un contenedor a partir de una imagen y lo arranca.</text:span></text:p>
      <text:p text:style-name="P9"><text:soft-page-break/><text:span text:style-name="T23">Importante:</text:span> un error común es creer que <text:span text:style-name="T26">“docker run” </text:span>solo arranca contenedores. <text:s/>Si haces varios <text:span text:style-name="T26">“docker run”</text:span>, estás creando varios contenedores, no arrancando varias veces un contenedor.</text:p>
      <text:p text:style-name="P9">La descripción completa del comando “docker run” la podéis encontrar en <text:a xlink:type="simple" xlink:href="https://docs.docker.com/engine/reference/commandline/run/" text:style-name="ListLabel_20_82" text:visited-style-name="ListLabel_20_82"><text:span text:style-name="T28">https://docs.docker.com/engine/reference/commandline/run/</text:span></text:a></text:p>
      <text:p text:style-name="P9">Comentaremos a lo largo de esta unidad algunas de sus opciones básicas más relevantes. Además, en futuras unidades, ampliaremos los conocimientos sobre este comando.</text:p>
      <text:list xml:id="list34852685916174" text:continue-numbering="true" text:style-name="WWNum7">
        <text:list-item>
          <text:list>
            <text:list-item>
              <text:p text:style-name="P61"><text:bookmark text:name="_f5ltnnyldmf"/>Creando contenedores sin arrancarlos</text:p>
            </text:list-item>
          </text:list>
        </text:list-item>
      </text:list>
      <text:p text:style-name="P9">Para crear un contenedor sin arrancarlo (recordamos, <text:span text:style-name="T26">“docker run”</text:span> crea y arranca), existe el comando <text:span text:style-name="T26">“docker create”</text:span>. La descripción completa del comando <text:span text:style-name="T26">“docker create”</text:span> la podéis encontrar en <text:a xlink:type="simple" xlink:href="https://docs.docker.com/engine/reference/commandline/create/" text:style-name="ListLabel_20_82" text:visited-style-name="ListLabel_20_82"><text:span text:style-name="T28">https://docs.docker.com/engine/reference/commandline/create/</text:span></text:a></text:p>
      <text:list xml:id="list34852079723752" text:continue-numbering="true" text:style-name="WWNum7">
        <text:list-item>
          <text:list>
            <text:list-item>
              <text:p text:style-name="P61"><text:bookmark text:name="_3vk49dliwzc1"/>Repasando caso práctico “Hello World”</text:p>
            </text:list-item>
          </text:list>
        </text:list-item>
      </text:list>
      <text:p text:style-name="P9">En anteriores unidades propusimos un sencillo caso práctico para comprobar que funcionaba Docker usando el siguiente comando:</text:p>
      <table:table table:name="Table2" table:style-name="Table2">
        <table:table-column table:style-name="Table2.A"/>
        <table:table-row table:style-name="Table2.1">
          <table:table-cell table:style-name="Table2.A1" office:value-type="string">
            <text:p text:style-name="P55"><text:span text:style-name="T25">docker run hello-world</text:span></text:p>
          </table:table-cell>
        </table:table-row>
      </table:table>
      <text:list xml:id="list34853759082391" text:continue-numbering="true" text:style-name="WWNum7">
        <text:list-item>
          <text:list>
            <text:list-item>
              <text:list>
                <text:list-item>
                  <text:p text:style-name="P63"><text:bookmark text:name="_8gwq5jall4uh"/>Repaso parte 1: obteniendo la imagen</text:p>
                </text:list-item>
              </text:list>
            </text:list-item>
          </text:list>
        </text:list-item>
      </text:list>
      <text:p text:style-name="P9">Al ejecutar este comando por primera vez, obtenemos un resultado similar a este:</text:p>
      <text:p text:style-name="P9"><draw:frame draw:style-name="fr3" draw:name="image8.png" text:anchor-type="as-char" svg:width="6.698in" svg:height="3.7902in" draw:z-index="0"><draw:image xlink:href="Pictures/100000000000031C0000021A39050DF2F8B1666F.png" xlink:type="simple" xlink:show="embed" xlink:actuate="onLoad" loext:mime-type="image/png"/></draw:frame></text:p>
      <text:p text:style-name="P9">La documentación en Docker Hub del contenedor que estamos lanzando la tenemos disponible en <text:a xlink:type="simple" xlink:href="https://hub.docker.com/_/hello-world" text:style-name="ListLabel_20_82" text:visited-style-name="ListLabel_20_82"><text:span text:style-name="T28">https://hub.docker.com/_/hello-world</text:span></text:a></text:p>
      <text:p text:style-name="P9">En primer lugar, nos fijamos en el comienzo de la información mostrada, concretamente en:</text:p>
      <text:p text:style-name="P9"><draw:frame draw:style-name="fr1" draw:name="image1.png" text:anchor-type="as-char" svg:width="6.6929in" svg:height="0.861in" draw:z-index="0"><draw:image xlink:href="Pictures/10000201000002E30000005FE40212138CD37A80.png" xlink:type="simple" xlink:show="embed" xlink:actuate="onLoad" loext:mime-type="image/png"/></draw:frame></text:p>
      <text:p text:style-name="P9">Ahí se nos indica que la imagen <text:span text:style-name="T26">“hello-word:latest”</text:span> no está localmente en nuestro sistema. Al no estar, se descarga del registro por defecto (normalmente Docker Hub) y se almacena localmente.</text:p>
      <text:p text:style-name="P9">De hecho, si volvemos a hacer el comando “docker run hello-world”, al tener la imagen ya en el sistema, <text:span text:style-name="T23">no nos aparecerá este texto, ya que la imagen la tenemos almacenada localmente.</text:span></text:p>
      <text:p text:style-name="P9">Otro aspecto a destacar, es que pese a que solo hemos escrito <text:span text:style-name="T26">“hello-world”</text:span>, nos ha descargado una imagen llamada <text:span text:style-name="T26">“hello-world:latest”</text:span>. Esto es porque cada imagen creada tiene un nombre de versión. Si no indicamos nada o indicamos “<text:span text:style-name="T26">latest”</text:span>, nos instala la última versión. Si queremos instalar una versión concreta de una imagen se indica de la forma <text:span text:style-name="T26">“imagen:nombreversion”</text:span>.</text:p>
      <text:list xml:id="list34852294936334" text:continue-numbering="true" text:style-name="WWNum7">
        <text:list-item>
          <text:list>
            <text:list-item>
              <text:list>
                <text:list-item>
                  <text:p text:style-name="P63"><text:bookmark text:name="_o0rq8lxu3yr9"/>Repaso parte 2: el contenedor se crea y ejecuta un comando</text:p>
                </text:list-item>
              </text:list>
            </text:list-item>
          </text:list>
        </text:list-item>
      </text:list>
      <text:p text:style-name="P9">Una vez descargada la imagen, se crea el contenedor, se inicia y ejecuta un proceso. Este proceso lo podemos proporcionar dentro de la orden “<text:span text:style-name="T26">docker run</text:span>” o si, como en el caso concreto de este ejemplo, no lo hemos proporcionado, ejecutará un comando predefinido por la propia imagen.</text:p>
      <text:p text:style-name="P9"/>
      <text:p text:style-name="P9">En este caso concreto, al no haber especificado ningún comando, al iniciarse el contenedor lanza un programa por defecto llamado “hello” y nos muestra por la salida estándar información de como Docker ha generado este mensaje:</text:p>
      <text:p text:style-name="P10"><draw:frame draw:style-name="fr1" draw:name="image6.png" text:anchor-type="as-char" svg:width="5.7181in" svg:height="1.6453in" draw:z-index="0"><draw:image xlink:href="Pictures/10000000000002F1000000D93ED056F245244934.png" xlink:type="simple" xlink:show="embed" xlink:actuate="onLoad" loext:mime-type="image/png"/></draw:frame></text:p>
      <text:p text:style-name="P9">Si tenéis curiosidad por ver el código fuente del programa “hello”, está disponible en <text:a xlink:type="simple" xlink:href="https://github.com/docker-library/hello-world/blob/master/hello.c" text:style-name="ListLabel_20_82" text:visited-style-name="ListLabel_20_82"><text:span text:style-name="T28">https://github.com/docker-library/hello-world/blob/master/hello.c</text:span></text:a></text:p>
      <text:p text:style-name="P9">Este programa genera un texto que básicamente nos explica que el cliente de Docker se ha conectado con el servicio de Docker, este se ha descargado la imagen de Docker Hub (o localmente si ya estaba en nuestro sistema), se ha creado un contenedor, que por defecto tenía un comando que generaba la salida que estamos leyendo y finalmente, el servicio de Docker lo ha enviado a la terminal.</text:p>
      <text:list xml:id="list34852098377302" text:continue-numbering="true" text:style-name="WWNum7">
        <text:list-item>
          <text:p text:style-name="P57"><text:bookmark text:name="_oj1tscys5ojt"/>Listar contenedores disponibles en el sistema con “docker ps”</text:p>
        </text:list-item>
      </text:list>
      <text:p text:style-name="P9">Mediante el comando <text:span text:style-name="T26">“docker ps”</text:span> podemos listar los contenedores en ejecución en el sistema. Si ejecutamos el siguiente comando:</text:p>
      <table:table table:name="Table3" table:style-name="Table3">
        <table:table-column table:style-name="Table3.A"/>
        <table:table-row table:style-name="Table3.1">
          <table:table-cell table:style-name="Table3.A1" office:value-type="string">
            <text:p text:style-name="P55"><text:span text:style-name="T25">docker ps</text:span></text:p>
          </table:table-cell>
        </table:table-row>
      </table:table>
      <text:p text:style-name="P9">Nos aparecerá un listado como este si no tenemos ningún contenedor en ejecución:</text:p>
      <text:p text:style-name="P10"><draw:frame draw:style-name="fr1" draw:name="image5.png" text:anchor-type="as-char" svg:width="4.8075in" svg:height="0.2992in" draw:z-index="0"><draw:image xlink:href="Pictures/100002010000028C000000280E5C61CB1C311A0B.png" xlink:type="simple" xlink:show="embed" xlink:actuate="onLoad" loext:mime-type="image/png"/></draw:frame></text:p>
      <text:p text:style-name="P9">O si tenemos contenedores en ejecución, podemos obtener algo similar a esto:</text:p>
      <text:p text:style-name="P10"><draw:frame draw:style-name="fr1" draw:name="image12.png" text:anchor-type="as-char" svg:width="6.4618in" svg:height="0.4409in" draw:z-index="0"><draw:image xlink:href="Pictures/100000000000035A0000003BACEA7D143C6194CC.png" xlink:type="simple" xlink:show="embed" xlink:actuate="onLoad" loext:mime-type="image/png"/></draw:frame></text:p>
      <text:p text:style-name="P9">Lanzando el siguiente comando:</text:p>
      <table:table table:name="Table4" table:style-name="Table4">
        <table:table-column table:style-name="Table4.A"/>
        <table:table-row table:style-name="Table4.1">
          <table:table-cell table:style-name="Table4.A1" office:value-type="string">
            <text:p text:style-name="P55"><text:span text:style-name="T25">docker ps -a</text:span></text:p>
          </table:table-cell>
        </table:table-row>
      </table:table>
      <text:p text:style-name="P9">Obtendremos un listado de todos los contenedores, tanto aquellos en funcionamiento como aquellos que están parados.</text:p>
      <text:p text:style-name="P10"><draw:frame draw:style-name="fr1" draw:name="image10.png" text:anchor-type="as-char" svg:width="6.6929in" svg:height="0.6528in" draw:z-index="0"><draw:image xlink:href="Pictures/100002010000049200000071C7ED1A7DC637EDF8.png" xlink:type="simple" xlink:show="embed" xlink:actuate="onLoad" loext:mime-type="image/png"/></draw:frame></text:p>
      <text:p text:style-name="P9">La información que obtenemos de los contenedores es la siguiente:</text:p>
      <text:list xml:id="list1268191918" text:style-name="WWNum8">
        <text:list-item>
          <text:p text:style-name="P28"><text:span text:style-name="T12">CONTAINER_ID</text:span>: identificador único del contenedor (versión 12 primeros caracteres).</text:p>
        </text:list-item>
        <text:list-item>
          <text:p text:style-name="P36"><text:span text:style-name="T12">IMAGE</text:span>: imagen utilizada para crear el contenedor.</text:p>
        </text:list-item>
        <text:list-item>
          <text:p text:style-name="P36"><text:span text:style-name="T12">COMMAND</text:span>: comando que se lanza al arrancar el contenedor.</text:p>
        </text:list-item>
        <text:list-item>
          <text:p text:style-name="P36"><text:span text:style-name="T12">CREATED</text:span>: cuando se creó el contenedor.</text:p>
        </text:list-item>
        <text:list-item>
          <text:p text:style-name="P36"><text:span text:style-name="T12">STATUS</text:span>: si el contenedor está en marcha o no (indicando cuánto lleva en marcha o cuánto hace que se paró).</text:p>
        </text:list-item>
        <text:list-item>
          <text:p text:style-name="P36"><text:span text:style-name="T12">PORTS</text:span>: redirección de puertos del contenedor (lo veremos más adelante en la unidad).</text:p>
        </text:list-item>
        <text:list-item>
          <text:p text:style-name="P41"><text:span text:style-name="T12">NAMES</text:span>: nombre del contenedor. Se puede generar como parámetro al crear el contenedor, o si no se indica nada, el propio Docker genera un nombre aleatorio.</text:p>
        </text:list-item>
      </text:list>
      <text:p text:style-name="P9"/>
      <text:p text:style-name="P9">La descripción completa del comando <text:span text:style-name="T26">“docker ps”</text:span> la podéis encontrar en <text:a xlink:type="simple" xlink:href="https://docs.docker.com/engine/reference/commandline/ps/" text:style-name="ListLabel_20_82" text:visited-style-name="ListLabel_20_82"><text:span text:style-name="T28">https://docs.docker.com/engine/reference/commandline/ps/</text:span></text:a></text:p>
      <text:list xml:id="list34853585967417" text:continue-list="list34852098377302" text:style-name="WWNum7">
        <text:list-item>
          <text:p text:style-name="P58"><text:bookmark text:name="_cfe0nu5y7owy"/>Parando y arrancando contenedores existentes con “docker start/stop/restart”</text:p>
        </text:list-item>
      </text:list>
      <text:p text:style-name="P9">Para arrancar/parar un contenedor ya creado (recordamos, <text:span text:style-name="T26">“docker run”</text:span> crea y arranca), existen los comandos <text:span text:style-name="T26">“docker start”, “docker stop” y “docker restart”</text:span>.</text:p>
      <text:p text:style-name="P9">La forma más habitual de usar estos comandos, es usar el nombre del comando, seguido del identificador único o nombre asignado al contendor. Por ejemplo, con identificador:</text:p>
      <table:table table:name="Table5" table:style-name="Table5">
        <table:table-column table:style-name="Table5.A"/>
        <table:table-row table:style-name="Table5.1">
          <table:table-cell table:style-name="Table5.A1" office:value-type="string">
            <text:p text:style-name="P55"><text:span text:style-name="T25">docker start 434d318b3771</text:span></text:p>
          </table:table-cell>
        </table:table-row>
      </table:table>
      <text:p text:style-name="P54">o con nombre del contenedor</text:p>
      <table:table table:name="Table6" table:style-name="Table6">
        <table:table-column table:style-name="Table6.A"/>
        <table:table-row table:style-name="Table6.1">
          <table:table-cell table:style-name="Table6.A1" office:value-type="string">
            <text:p text:style-name="P55"><text:span text:style-name="T25">docker start stupefied_colden</text:span></text:p>
          </table:table-cell>
        </table:table-row>
      </table:table>
      <text:p text:style-name="P9">La descripción completa de estos comandos la podéis encontrar en</text:p>
      <text:list xml:id="list1743402087" text:style-name="WWNum2">
        <text:list-item>
          <text:p text:style-name="P29"><text:a xlink:type="simple" xlink:href="https://docs.docker.com/engine/reference/commandline/start/" text:style-name="ListLabel_20_82" text:visited-style-name="ListLabel_20_82"><text:span text:style-name="T28">https://docs.docker.com/engine/reference/commandline/start/</text:span></text:a></text:p>
        </text:list-item>
        <text:list-item>
          <text:p text:style-name="P37"><text:a xlink:type="simple" xlink:href="https://docs.docker.com/engine/reference/commandline/stop/" text:style-name="ListLabel_20_82" text:visited-style-name="ListLabel_20_82"><text:span text:style-name="T28">https://docs.docker.com/engine/reference/commandline/stop/</text:span></text:a></text:p>
        </text:list-item>
        <text:list-item>
          <text:p text:style-name="P42"><text:soft-page-break/><text:a xlink:type="simple" xlink:href="https://docs.docker.com/engine/reference/commandline/restart/" text:style-name="ListLabel_20_82" text:visited-style-name="ListLabel_20_82"><text:span text:style-name="T28">https://docs.docker.com/engine/reference/commandline/restart/</text:span></text:a></text:p>
        </text:list-item>
      </text:list>
      <text:list xml:id="list34851939209499" text:continue-list="list34853585967417" text:style-name="WWNum7">
        <text:list-item>
          <text:p text:style-name="P58"><text:bookmark text:name="_lap6bz7c9nll"/>Inspeccionando contenedores con “docker inspect”</text:p>
        </text:list-item>
      </text:list>
      <text:p text:style-name="P9">El comando “<text:span text:style-name="T26">docker inspect</text:span>” es un comando que nos proporciona diversos detalles de la configuración de un contenedor. Ofrece distintos datos, entre ellos, identificador único (versión 64 caracteres), almacenamiento, red, imagen en que se basa, etc. Su sintaxis es:</text:p>
      <table:table table:name="Table7" table:style-name="Table7">
        <table:table-column table:style-name="Table7.A"/>
        <table:table-row table:style-name="Table7.1">
          <table:table-cell table:style-name="Table7.A1" office:value-type="string">
            <text:p text:style-name="P55"><text:span text:style-name="T25">docker inspect IDENTIFICADOR/NOMBRE</text:span></text:p>
          </table:table-cell>
        </table:table-row>
      </table:table>
      <text:p text:style-name="P9">La descripción completa del comando <text:span text:style-name="T26">“docker inspect”</text:span> la podéis encontrar en <text:a xlink:type="simple" xlink:href="https://docs.docker.com/engine/reference/commandline/inspect/" text:style-name="ListLabel_20_82" text:visited-style-name="ListLabel_20_82"><text:span text:style-name="T28">https://docs.docker.com/engine/reference/commandline/inspect/</text:span></text:a>.</text:p>
      <text:list xml:id="list34852119076055" text:continue-numbering="true" text:style-name="WWNum7">
        <text:list-item>
          <text:p text:style-name="P58"><text:bookmark text:name="_25yontxyamvh"/>Ejecutando comandos en un contenedor con “docker exec”</text:p>
        </text:list-item>
      </text:list>
      <text:p text:style-name="P9">El comando <text:span text:style-name="T26">“docker exec”</text:span> nos permite ejecutar un comando dentro de un contenedor que esté en ese momento en ejecución. La forma sintaxis habitual para utilizar este comando es la siguiente</text:p>
      <table:table table:name="Table8" table:style-name="Table8">
        <table:table-column table:style-name="Table8.A"/>
        <table:table-row table:style-name="Table8.1">
          <table:table-cell table:style-name="Table8.A1" office:value-type="string">
            <text:p text:style-name="P55"><text:span text:style-name="T25">docker </text:span><text:span text:style-name="T29">exec</text:span><text:span text:style-name="T25"> [OPCIONES] IDENTIFICADOR/NOMBRE COMANDO [ARGUMENTOS]</text:span></text:p>
          </table:table-cell>
        </table:table-row>
      </table:table>
      <text:p text:style-name="P9">Algunos ejemplos de uso, suponiendo un contenedor en marcha, llamando “contenedor”:</text:p>
      <table:table table:name="Table9" table:style-name="Table9">
        <table:table-column table:style-name="Table9.A"/>
        <table:table-row table:style-name="Table9.1">
          <table:table-cell table:style-name="Table9.A1" office:value-type="string">
            <text:p text:style-name="P55"><text:span text:style-name="T25">docker </text:span><text:span text:style-name="T29">exec</text:span><text:span text:style-name="T25"> -d contenedor touch /tmp/prueba</text:span></text:p>
          </table:table-cell>
        </table:table-row>
      </table:table>
      <text:p text:style-name="P9">Ejemplo que se ejecuta en “background”, gracias al parámetro “-d”. Este ejemplo simplemente crea mediante el comando “touch” un fichero “prueba” en “/tmp”.</text:p>
      <table:table table:name="Table10" table:style-name="Table10">
        <table:table-column table:style-name="Table10.A"/>
        <table:table-row table:style-name="Table10.1">
          <table:table-cell table:style-name="Table10.A1" office:value-type="string">
            <text:p text:style-name="P55"><text:span text:style-name="T25">docker </text:span><text:span text:style-name="T29">exec</text:span><text:span text:style-name="T25"> -it contenedor bash</text:span></text:p>
          </table:table-cell>
        </table:table-row>
      </table:table>
      <text:p text:style-name="P9">Orden que ejecutará la “shell” bash en nuestra consola (gracias al parámetro “-it” se enlaza la entrada y salida estándar a nuestra terminal). A efectos prácticos, con esta orden accederemos a una “shell” bash dentro del contenedor. </text:p>
      <table:table table:name="Table11" table:style-name="Table11">
        <table:table-column table:style-name="Table11.A"/>
        <table:table-row table:style-name="Table11.1">
          <table:table-cell table:style-name="Table11.A1" office:value-type="string">
            <text:p text:style-name="P55"><text:span text:style-name="T25">docker </text:span><text:span text:style-name="T29">exec</text:span><text:span text:style-name="T25"> -it -e VAR1=1 contenedor </text:span><text:span text:style-name="T29">bash</text:span></text:p>
          </table:table-cell>
        </table:table-row>
      </table:table>
      <text:p text:style-name="P9"/>
      <text:p text:style-name="P9">Comando que establece un variable de entorno con el parámetro <text:span text:style-name="T12">“-e”</text:span>. Se enlaza la entrada y salida de la ejecución del comando con <text:span text:style-name="T12">“-it”</text:span>. A efectos prácticos, en esa “shell” estará disponible la variable de entorno <text:span text:style-name="T12">“VAR1”</text:span> con valor 1. Lo podemos probar con <text:span text:style-name="T26">“echo $VAR1”</text:span>.</text:p>
      <text:p text:style-name="P9">La descripción completa del comando <text:span text:style-name="T26">“docker exec”</text:span> la podéis encontrar en <text:a xlink:type="simple" xlink:href="https://docs.docker.com/engine/reference/commandline/exec/" text:style-name="ListLabel_20_82" text:visited-style-name="ListLabel_20_82"><text:span text:style-name="T28">https://docs.docker.com/engine/reference/commandline/exec/</text:span></text:a>.</text:p>
      <text:list xml:id="list34853064787149" text:continue-numbering="true" text:style-name="WWNum7">
        <text:list-item>
          <text:p text:style-name="P58"><text:bookmark text:name="_o9yfbpawu2x7"/>Copiando ficheros entre anfitrión y contenedores con “docker cp”</text:p>
        </text:list-item>
      </text:list>
      <text:p text:style-name="P9">El comando <text:span text:style-name="T26">“docker cp”</text:span> es un comando que nos permite copiar ficheros y directorios del anfitrión a un contenedor o viceversa. No se permite actualmente la copia de fichero entre contenedores.</text:p>
      <text:p text:style-name="P9">Algunos ejemplos de uso:</text:p>
      <table:table table:name="Table12" table:style-name="Table12">
        <table:table-column table:style-name="Table12.A"/>
        <table:table-row table:style-name="Table12.1">
          <table:table-cell table:style-name="Table12.A1" office:value-type="string">
            <text:p text:style-name="P55"><text:span text:style-name="T25">docker cp idcontainer:/tmp/prueba ./</text:span></text:p>
          </table:table-cell>
        </table:table-row>
      </table:table>
      <text:p text:style-name="P9">Copia el fichero “<text:span text:style-name="T26">/tmp/prueba</text:span>” del contenedor con identificador o nombre “idcontainer” al directorio actual de la máquina que ejerce como anfitrión. </text:p>
      <table:table table:name="Table13" table:style-name="Table13">
        <table:table-column table:style-name="Table13.A"/>
        <table:table-row table:style-name="Table13.1">
          <table:table-cell table:style-name="Table13.A1" office:value-type="string">
            <text:p text:style-name="P55"><text:span text:style-name="T25">docker cp ./miFichero idcontainer:/tmp</text:span></text:p>
          </table:table-cell>
        </table:table-row>
      </table:table>
      <text:p text:style-name="P9">Copia el fichero “<text:span text:style-name="T26">miFichero</text:span>” del directorio actual al directorio “/tmp” del contenedor.</text:p>
      <text:p text:style-name="P9">La descripción completa del comando <text:span text:style-name="T26">“docker cp”</text:span> la podéis encontrar en <text:a xlink:type="simple" xlink:href="https://docs.docker.com/engine/reference/commandline/cp/" text:style-name="ListLabel_20_82" text:visited-style-name="ListLabel_20_82"><text:span text:style-name="T28">https://docs.docker.com/engine/reference/commandline/cp/</text:span></text:a>.</text:p>
      <text:list xml:id="list34851740428575" text:continue-numbering="true" text:style-name="WWNum7">
        <text:list-item>
          <text:p text:style-name="P58"><text:bookmark text:name="_ezcrjcutgd8"/>Accediendo a un proceso en ejecución con “docker attach”</text:p>
        </text:list-item>
      </text:list>
      <text:p text:style-name="P9">En algunos casos, deseamos enlazar la entrada o salida estándar de nuestra terminal a un contenedor que está ejecutando un proceso en segundo plano, de forma similar a la siguiente</text:p>
      <table:table table:name="Table14" table:style-name="Table14">
        <table:table-column table:style-name="Table14.A"/>
        <table:table-row table:style-name="Table14.1">
          <table:table-cell table:style-name="Table14.A1" office:value-type="string">
            <text:p text:style-name="P55"><text:span text:style-name="T25">docker attach [OPCIONES] IDENTIFICADOR/NOMBRE</text:span></text:p>
          </table:table-cell>
        </table:table-row>
      </table:table>
      <text:p text:style-name="P9">Para probarlo utilizaremos el siguiente ejemplo: </text:p>
      <text:p text:style-name="P9">El ejemplo consiste en crear un contenedor que lanza un proceso que genera texto (imprimiendo la fecha) por la salida estándar de forma indefinida. El comando llama a “sh” con el parámetro -c (que indica que la siguiente cadena es algo a procesar por la “shell” sh), seguido de una cadena con un “shell script”. Aquí vemos el comando, que podríamos lanzar en cualquier terminal.</text:p>
      <table:table table:name="Table15" table:style-name="Table15">
        <table:table-column table:style-name="Table15.A"/>
        <table:table-row table:style-name="Table15.1">
          <table:table-cell table:style-name="Table15.A1" office:value-type="string">
            <text:p text:style-name="P21"><text:span text:style-name="T25">sh -c </text:span><text:span text:style-name="T30">"while true; do </text:span><text:span text:style-name="T31">$(echo date)</text:span><text:span text:style-name="T30">; sleep 1; done"</text:span></text:p>
          </table:table-cell>
        </table:table-row>
      </table:table>
      <text:p text:style-name="P9">Aplicamos este comando a nuestro ejemplo creando un contenedor:</text:p>
      <table:table table:name="Table16" table:style-name="Table16">
        <table:table-column table:style-name="Table16.A"/>
        <table:table-row table:style-name="Table16.1">
          <table:table-cell table:style-name="Table16.A1" office:value-type="string">
            <text:p text:style-name="P21"><text:span text:style-name="T25">docker run -d --name=muchotexto busybox sh -c </text:span><text:span text:style-name="T30">"while true; do </text:span><text:span text:style-name="T31">$(echo date)</text:span><text:span text:style-name="T30">; sleep 1; done"</text:span></text:p>
          </table:table-cell>
        </table:table-row>
      </table:table>
      <text:p text:style-name="P11"/>
      <text:p text:style-name="P8"><text:span text:style-name="T13"><text:s/>❕</text:span><text:span text:style-name="T14"> </text:span><text:span text:style-name="T12">Atención: </text:span>Los parámetros de este “docker run” son explicados más adelante en el documento.</text:p>
      <text:p text:style-name="P9">Con ese contenedor en marcha, ya podemos probar <text:span text:style-name="T26">“docker attach”.</text:span> Podremos enlazar la entrada y salida del proceso en ejecución a nuestra terminal y observar el texto generado usando:</text:p>
      <table:table table:name="Table17" table:style-name="Table17">
        <table:table-column table:style-name="Table17.A"/>
        <table:table-row table:style-name="Table17.1">
          <table:table-cell table:style-name="Table17.A1" office:value-type="string">
            <text:p text:style-name="P55"><text:span text:style-name="T25">docker attach muchotexto</text:span></text:p>
          </table:table-cell>
        </table:table-row>
      </table:table>
      <text:p text:style-name="P9">La descripción completa del comando <text:span text:style-name="T26">“docker attach”</text:span> la podéis encontrar en <text:a xlink:type="simple" xlink:href="https://docs.docker.com/engine/reference/commandline/attach/" text:style-name="ListLabel_20_82" text:visited-style-name="ListLabel_20_82"><text:span text:style-name="T28">https://docs.docker.com/engine/reference/commandline/attach/</text:span></text:a>.</text:p>
      <text:list xml:id="list34853507087007" text:continue-numbering="true" text:style-name="WWNum7">
        <text:list-item>
          <text:p text:style-name="P57"><text:bookmark text:name="_bqgy1zgilsio"/>Obteniendo información de los logs con “docker logs”</text:p>
        </text:list-item>
      </text:list>
      <text:p text:style-name="P9">Podemos consultar la información generada con el comando “<text:span text:style-name="T26">docker logs</text:span>”</text:p>
      <table:table table:name="Table18" table:style-name="Table18">
        <table:table-column table:style-name="Table18.A"/>
        <table:table-row table:style-name="Table18.1">
          <table:table-cell table:style-name="Table18.A1" office:value-type="string">
            <text:p text:style-name="P21"><text:span text:style-name="T25">docker logs [OPCIONES] IDENTIFICADOR/NOMBRE</text:span></text:p>
          </table:table-cell>
        </table:table-row>
      </table:table>
      <text:p text:style-name="P9">Este uso es similar a “docker attach”, solo que tiene opciones específicas para tratar la información obtenida como un log. Partiendo del mismo ejemplo usado en “<text:span text:style-name="T26">docker attach</text:span>”.</text:p>
      <table:table table:name="Table19" table:style-name="Table19">
        <table:table-column table:style-name="Table19.A"/>
        <table:table-row table:style-name="Table19.1">
          <table:table-cell table:style-name="Table19.A1" office:value-type="string">
            <text:p text:style-name="P55"><text:span text:style-name="T25">docker run -d --name=muchotexto busybox sh -c </text:span><text:span text:style-name="T30">"while true; do </text:span><text:span text:style-name="T31">$(echo date)</text:span><text:span text:style-name="T30">; sleep 1; done"</text:span></text:p>
          </table:table-cell>
        </table:table-row>
      </table:table>
      <text:p text:style-name="P9">Un ejemplo de uso para obtener logs podría ser</text:p>
      <table:table table:name="Table20" table:style-name="Table20">
        <table:table-column table:style-name="Table20.A"/>
        <table:table-row table:style-name="Table20.1">
          <table:table-cell table:style-name="Table20.A1" office:value-type="string">
            <text:p text:style-name="P21"><text:span text:style-name="T25">docker logs -f --until=2s muchotexto</text:span></text:p>
          </table:table-cell>
        </table:table-row>
      </table:table>
      <text:p text:style-name="P9">Con este ejemplo, te mostraría los logs generados (realmente la salida estándar y de error), incluyendo aquellos que se fueran generando, parando a los dos segundos.</text:p>
      <text:p text:style-name="P9">La descripción completa del comando <text:span text:style-name="T26">“docker logs”</text:span> la podéis encontrar en <text:a xlink:type="simple" xlink:href="https://docs.docker.com/engine/reference/commandline/logs/" text:style-name="ListLabel_20_82" text:visited-style-name="ListLabel_20_82"><text:span text:style-name="T28">https://docs.docker.com/engine/reference/commandline/logs/</text:span></text:a>.</text:p>
      <text:list xml:id="list34852811820943" text:continue-numbering="true" text:style-name="WWNum7">
        <text:list-item>
          <text:p text:style-name="P58"><text:bookmark text:name="_ciz1fic0w1t2"/>Renombrando contenedores con “docker rename”</text:p>
        </text:list-item>
      </text:list>
      <text:p text:style-name="P9">El comando<text:span text:style-name="T26"> “docker rename”</text:span> nos permite cambiar el nombre asociado a un contenedor.</text:p>
      <table:table table:name="Table21" table:style-name="Table21">
        <table:table-column table:style-name="Table21.A"/>
        <table:table-row table:style-name="Table21.1">
          <table:table-cell table:style-name="Table21.A1" office:value-type="string">
            <text:p text:style-name="P55"><text:span text:style-name="T25">docker rename contenedor1 contenedor2</text:span></text:p>
          </table:table-cell>
        </table:table-row>
      </table:table>
      <text:p text:style-name="P9">Cambia el nombre de “<text:span text:style-name="T26">contenedor1</text:span>” a “<text:span text:style-name="T26">contenedor2</text:span>”.</text:p>
      <text:p text:style-name="P9">La descripción completa del comando <text:span text:style-name="T26">“docker rename”</text:span> la podéis encontrar en <text:a xlink:type="simple" xlink:href="https://docs.docker.com/engine/reference/commandline/rename/" text:style-name="ListLabel_20_82" text:visited-style-name="ListLabel_20_82"><text:span text:style-name="T28">https://docs.docker.com/engine/reference/commandline/rename/</text:span></text:a>.</text:p>
      <text:list xml:id="list34851902587146" text:continue-numbering="true" text:style-name="WWNum7">
        <text:list-item>
          <text:p text:style-name="P59"><text:bookmark text:name="_k433gpm5zyqm"/>Principales ejemplos básicos de uso de docker para crear y manipular contenedores</text:p>
          <text:list>
            <text:list-item>
              <text:p text:style-name="P62"><text:bookmark text:name="_zcvyprsttr2t"/>Ejemplo 1: creando y lanzando contenedor Ubuntu y accediendo a una terminal</text:p>
            </text:list-item>
          </text:list>
        </text:list-item>
      </text:list>
      <text:p text:style-name="Standard"><text:soft-page-break/>Anteriormente, hemos indicado que el comando <text:span text:style-name="T26">“docker run”</text:span> es de gran importancia en el uso de Docker y que este nos permite crear contenedores a partir de una imagen y arrancarlos.</text:p>
      <text:p text:style-name="Standard">La estructura principal del comando es la siguiente</text:p>
      <table:table table:name="Table22" table:style-name="Table22">
        <table:table-column table:style-name="Table22.A"/>
        <table:table-row table:style-name="Table22.1">
          <table:table-cell table:style-name="Table22.A1" office:value-type="string">
            <text:p text:style-name="P21"><text:span text:style-name="T25">docker run [PARAMETROS] IMAGEN [COMANDO AL ARRANCAR] [ARGUMENTOS]</text:span></text:p>
          </table:table-cell>
        </table:table-row>
      </table:table>
      <text:p text:style-name="Standard">A continuación mostramos algunos ejemplos de <text:span text:style-name="T26">“docker run”</text:span>.</text:p>
      <text:p text:style-name="P9">Utilizando el comando </text:p>
      <table:table table:name="Table23" table:style-name="Table23">
        <table:table-column table:style-name="Table23.A"/>
        <table:table-row table:style-name="Table23.1">
          <table:table-cell table:style-name="Table23.A1" office:value-type="string">
            <text:p text:style-name="P21"><text:span text:style-name="T25">docker run -it --name=nuestroUbuntu1 ubuntu /bin/bash</text:span></text:p>
          </table:table-cell>
        </table:table-row>
      </table:table>
      <text:p text:style-name="P9">Estamos creando un nuevo contenedor a partir de la imagen “<text:span text:style-name="T26">ubuntu</text:span>”. Al crear este contenedor hemos especificado los siguientes parámetros:</text:p>
      <text:list xml:id="list4251391232" text:style-name="WWNum6">
        <text:list-item>
          <text:p text:style-name="P30"><text:span text:style-name="T12">Parámetro “-i”:</text:span> indica que el proceso lanzado en el contenedor docker estará en modo interactivo, es decir, enlaza la entrada estándar cuando se asigna un proceso a una terminal.</text:p>
        </text:list-item>
        <text:list-item>
          <text:p text:style-name="P38"><text:span text:style-name="T12">Parámetro “-t”</text:span>: asigna al proceso lanzado al arrancar el contenedor una pseudo terminal, facilitando el acceso al mismo desde nuestra terminal.</text:p>
        </text:list-item>
        <text:list-item>
          <text:p text:style-name="P43"><text:span text:style-name="T12">Parámetro “--name”</text:span>: nos permite establecer un nombre a nuestro contenedor. Si no indicamos este parámetro, nos creará un nombre aleatorio.</text:p>
        </text:list-item>
      </text:list>
      <text:p text:style-name="P9">Por último, el comando ejecutado al lanzarse el contenedor es <text:span text:style-name="T26">“/bin/bash”</text:span>. Este, combinado con los parámetros <text:span text:style-name="T26">“-it” </text:span>(que entraban en modo interactivo y asociaban una terminal), nos hace que justo después de lanzar el comando, estemos en una “shell” dentro del contenedor creado. Al finalizar dicha “shell” (con “exit”, “control+c”, etc.) el contenedor se parará.</text:p>
      <text:p text:style-name="P9">Los cambios que hayamos hecho con la “shell”, como por ejemplo, crear un directorio, se almacenarán como una imagen temporal (veremos en profundidad las imágenes en otra unidad) y a efectos prácticos, los cambios serán permanentes al arrancar de nuevo este contenedor.</text:p>
      <text:list xml:id="list34852287225236" text:continue-list="list34851902587146" text:style-name="WWNum7">
        <text:list-item>
          <text:list>
            <text:list-item>
              <text:p text:style-name="P61"><text:bookmark text:name="_ablxdd8hp5vm"/>Ejemplo 2: accediendo a terminal desde el contenedor parado con “docker start”</text:p>
            </text:list-item>
          </text:list>
        </text:list-item>
      </text:list>
      <text:p text:style-name="P9">El anterior ejemplo nos permitía acceder, crear un contenedor y acceder de forma interactiva a dicha “shell”, pero al salir de la shell, simplemente se paraba el contenedor. </text:p>
      <text:p text:style-name="P9">Entonces, ¿Cómo podríamos volver a ese contenedor y a dicha “shell”? Usaremos <text:span text:style-name="T26">“docker start”</text:span>.</text:p>
      <text:p text:style-name="P9"/>
      <text:p text:style-name="P9">Este comando nos permitirá arrancar el contenedor parado. Al arrancar no especificaremos un comando a lanzar, ya que se lanza el comando que hayamos especificado (o por defecto de la imagen si no hemos especificado nada) al hacer <text:span text:style-name="T12">“docker run” o “docker create”. </text:span></text:p>
      <text:p text:style-name="P9">El comando <text:span text:style-name="T26">“docker start”</text:span> sigue la siguiente estructura:</text:p>
      <table:table table:name="Table24" table:style-name="Table24">
        <table:table-column table:style-name="Table24.A"/>
        <table:table-row table:style-name="Table24.1">
          <table:table-cell table:style-name="Table24.A1" office:value-type="string">
            <text:p text:style-name="P55"><text:span text:style-name="T25">docker start [PARAMETROS] IDENTIFICADOR/NOMBRE</text:span></text:p>
          </table:table-cell>
        </table:table-row>
      </table:table>
      <text:p text:style-name="P9">Podemos obtener identificador único o nombre usando el comando:</text:p>
      <table:table table:name="Table25" table:style-name="Table25">
        <table:table-column table:style-name="Table25.A"/>
        <table:table-row table:style-name="Table25.1">
          <table:table-cell table:style-name="Table25.A1" office:value-type="string">
            <text:p text:style-name="P21"><text:span text:style-name="T25">docker ps -a</text:span></text:p>
          </table:table-cell>
        </table:table-row>
      </table:table>
      <text:p text:style-name="P9">Tras ello, lanzamos el contenedor de la siguiente forma:</text:p>
      <table:table table:name="Table26" table:style-name="Table26">
        <table:table-column table:style-name="Table26.A"/>
        <table:table-row table:style-name="Table26.1">
          <table:table-cell table:style-name="Table26.A1" office:value-type="string">
            <text:p text:style-name="P21"><text:span text:style-name="T25">docker start -ai IDENTIFICADOR</text:span></text:p>
          </table:table-cell>
        </table:table-row>
      </table:table>
      <text:p text:style-name="P9">Los parámetros especificados a <text:span text:style-name="T26">“docker start” </text:span>son los siguientes:</text:p>
      <text:list xml:id="list849851676" text:style-name="WWNum9">
        <text:list-item>
          <text:p text:style-name="P31"><text:span text:style-name="T12">Parámetro “-a”</text:span>: al arrancar el contenedor, enlaza la salida estándar y de error del contenedor a nuestra terminal.</text:p>
        </text:list-item>
        <text:list-item>
          <text:p text:style-name="P44"><text:span text:style-name="T12">Parámetro “-i”:</text:span> al arrancar el contenedor, lo hace en modo interactivo, es decir, enlazando la entrada estándar del contenedor a nuestra terminal.</text:p>
        </text:list-item>
      </text:list>
      <text:p text:style-name="P53"/>
      <text:list xml:id="list34852630879382" text:continue-list="list34852287225236" text:style-name="WWNum7">
        <text:list-item>
          <text:list>
            <text:list-item>
              <text:p text:style-name="P61"><text:bookmark text:name="_m89kfioqn2pp"/>Ejemplo 3: accediendo a la terminal de un contenedor en ejecución con “docker exec”</text:p>
            </text:list-item>
          </text:list>
        </text:list-item>
      </text:list>
      <text:p text:style-name="Standard">En el ejemplo anterior vimos cómo acceder a un contenedor que estaba parado y volver a su terminal interactiva. Pero, ¿qué pasa si el contenedor ya está en ejecución y queremos conectarnos a su terminal (shell) sin reiniciarlo? Para ello, utilizaremos el comando “<text:span text:style-name="T12">docker exec</text:span>”.</text:p>
      <text:p text:style-name="Standard"/>
      <text:p text:style-name="Standard">Este comando nos permite ejecutar una orden dentro de un contenedor en ejecución sin detenerlo ni afectarlo. En este caso, lo usaremos para abrir una terminal dentro del contenedor.</text:p>
      <text:p text:style-name="Standard">La estructura básica del comando es:</text:p>
      <table:table table:name="Table27" table:style-name="Table27">
        <table:table-column table:style-name="Table27.A"/>
        <table:table-row table:style-name="Table27.1">
          <table:table-cell table:style-name="Table27.A1" office:value-type="string">
            <text:p text:style-name="P55"><text:span text:style-name="T25">docker </text:span><text:span text:style-name="T29">exec</text:span><text:span text:style-name="T25"> [PARAMETROS] IDENTIFICADOR/NOMBRE COMANDO</text:span></text:p>
          </table:table-cell>
        </table:table-row>
      </table:table>
      <text:p text:style-name="Standard">Podemos obtener el identificador único o el nombre del contenedor con el siguiente comando:</text:p>
      <table:table table:name="Table28" table:style-name="Table28">
        <table:table-column table:style-name="Table28.A"/>
        <table:table-row table:style-name="Table28.1">
          <table:table-cell table:style-name="Table28.A1" office:value-type="string">
            <text:p text:style-name="P55"><text:span text:style-name="T25">docker ps</text:span></text:p>
          </table:table-cell>
        </table:table-row>
      </table:table>
      <text:p text:style-name="Standard"/>
      <text:p text:style-name="Standard">Una vez identificado el contenedor, podemos acceder a su terminal interactiva con el siguiente comando:</text:p>
      <table:table table:name="Table29" table:style-name="Table29">
        <table:table-column table:style-name="Table29.A"/>
        <table:table-row table:style-name="Table29.1">
          <table:table-cell table:style-name="Table29.A1" office:value-type="string">
            <text:p text:style-name="P55"><text:span text:style-name="T25">docker </text:span><text:span text:style-name="T29">exec</text:span><text:span text:style-name="T25"> -it IDENTIFICADOR bash</text:span></text:p>
          </table:table-cell>
        </table:table-row>
      </table:table>
      <text:p text:style-name="Standard">Los parámetros utilizados en “docker exec” son los siguientes:</text:p>
      <text:p text:style-name="Standard"><text:span text:style-name="T12">-i</text:span>: Mantiene la entrada estándar del contenedor abierta para poder interactuar con ella.</text:p>
      <text:p text:style-name="Standard"><text:span text:style-name="T12">-t</text:span>: Asigna una terminal virtual para que podamos trabajar cómodamente con la shell del contenedor.</text:p>
      <text:p text:style-name="Standard">En algunos casos, la imagen utilizada en el contenedor no tiene bash instalado, por lo que podemos probar con sh en su lugar:</text:p>
      <table:table table:name="Table30" table:style-name="Table30">
        <table:table-column table:style-name="Table30.A"/>
        <table:table-row table:style-name="Table30.1">
          <table:table-cell table:style-name="Table30.A1" office:value-type="string">
            <text:p text:style-name="P55"><text:span text:style-name="T25">docker </text:span><text:span text:style-name="T29">exec</text:span><text:span text:style-name="T25"> -it IDENTIFICADOR sh</text:span></text:p>
          </table:table-cell>
        </table:table-row>
      </table:table>
      <text:p text:style-name="Standard">Con esto, podremos acceder a la terminal de un contenedor en ejecución sin necesidad de detenerlo o reiniciarlo.</text:p>
      <text:list xml:id="list34853033730961" text:continue-numbering="true" text:style-name="WWNum7">
        <text:list-item>
          <text:list>
            <text:list-item>
              <text:p text:style-name="P61"><text:bookmark text:name="_k9j93zbl4eya"/>Ejemplo 4: ejecutando una versión de una imagen y autoeliminando el contenedor</text:p>
            </text:list-item>
          </text:list>
        </text:list-item>
      </text:list>
      <text:p text:style-name="P9">Lanzando el siguiente comando</text:p>
      <table:table table:name="Table31" table:style-name="Table31">
        <table:table-column table:style-name="Table31.A"/>
        <table:table-row table:style-name="Table31.1">
          <table:table-cell table:style-name="Table31.A1" office:value-type="string">
            <text:p text:style-name="P55"><text:span text:style-name="T25">docker run -it --rm <text:s/>ubuntu:24.04 /bin/bash</text:span></text:p>
          </table:table-cell>
        </table:table-row>
      </table:table>
      <text:p text:style-name="P9">Estamos creando un contenedor con la versión de la imagen <text:span text:style-name="T26">“ubuntu”</text:span> etiquetada como <text:span text:style-name="T26">“14.04”</text:span> en Docker Hub y arrancándolo de forma similar al ejemplo anterior.</text:p>
      <text:p text:style-name="P9">Los parámetros nuevos incluidos en esta orden son:</text:p>
      <text:list xml:id="list2962941531" text:style-name="WWNum5">
        <text:list-item>
          <text:p text:style-name="P32"><text:span text:style-name="T12">Parámetro “--rm”:</text:span> este parámetro hará que nada más el contenedor se pare, se borre el contenedor del sistema.</text:p>
        </text:list-item>
      </text:list>
      <text:list xml:id="list34852608865345" text:continue-list="list34853033730961" text:style-name="WWNum7">
        <text:list-item>
          <text:list>
            <text:list-item>
              <text:p text:style-name="P62"><text:bookmark text:name="_49glqfcq5cdy"/>Ejemplo 5: lanzando un servidor web en background y asociando sus puertos</text:p>
            </text:list-item>
          </text:list>
        </text:list-item>
      </text:list>
      <text:p text:style-name="P9">Lanzando el siguiente comando</text:p>
      <table:table table:name="Table32" table:style-name="Table32">
        <table:table-column table:style-name="Table32.A"/>
        <table:table-row table:style-name="Table32.1">
          <table:table-cell table:style-name="Table32.A1" office:value-type="string">
            <text:p text:style-name="P21"><text:span text:style-name="T25">docker run <text:s/>-d -p 1200:80 nginx</text:span></text:p>
          </table:table-cell>
        </table:table-row>
      </table:table>
      <text:p text:style-name="P9">Estamos creando un contenedor con la versión de la imagen <text:span text:style-name="T26">“nginx:latest”</text:span>, la cual contiene un servidor web Nginx en funcionamiento en el puerto 80 del contenedor y al que podremos acceder en nuestra máquina como <text:span text:style-name="T26">“localhost:1200”</text:span>.</text:p>
      <text:p text:style-name="P9"><text:soft-page-break/>Los parámetros nuevos incluidos en esta orden son:</text:p>
      <text:list xml:id="list34853090955885" text:continue-list="list2962941531" text:style-name="WWNum5">
        <text:list-item>
          <text:p text:style-name="P32"><text:span text:style-name="T12">Parámetro “-d”:</text:span> parámetro “<text:span text:style-name="T26">deatached</text:span>”, que indica que lanza el contenedor en segundo plano. Al lanzarlo con esta opción, no se nos muestra ninguna información de la entrada/salida del contenedor. La única información que se nos muestra es el ID del contenedor lanzado.</text:p>
        </text:list-item>
        <text:list-item>
          <text:p text:style-name="P39"><text:span text:style-name="T12">Parámetro “-p”:</text:span> siguiendo el estilo <text:span text:style-name="T26">“pAnf:pCont”</text:span> nos indica que en el puerto de la máquina anfitrión “<text:span text:style-name="T26">pAnf</text:span>” está enlazado con el puerto interno del contenedor “<text:span text:style-name="T26">pCont</text:span>”.</text:p>
          <text:list>
            <text:list-item>
              <text:p text:style-name="P50">Si solo se indica un puerto, algo del estilo <text:span text:style-name="T26">“-p 80”</text:span>, el sistema tomará dicho puerto como el puerto interno del contenedor y asociará un puerto aleatorio libre de la máquina anfitrión. Podremos consultar los puertos expuestos de un contenedor mediante el comando <text:span text:style-name="T26">“docker ps”</text:span><text:span text:style-name="T27"> </text:span>o el específico para esta tarea <text:span text:style-name="T26">“docker port”</text:span>.</text:p>
            </text:list-item>
          </text:list>
        </text:list-item>
      </text:list>
      <text:p text:style-name="P8"><text:span text:style-name="T13">❕</text:span><text:span text:style-name="T14"> </text:span><text:span text:style-name="T12">Atención: </text:span>el mapeo de puertos <text:span text:style-name="T23">solo puede realizarse en el momento de crear el contenedor.</text:span> No se puede modificar el mapeo de puertos con el contenedor ya creado.</text:p>
      <text:p text:style-name="P9">Para saber más sobre la imagen que hemos utilizado, en este caso “nginx” podemos consultar su página en Docker Hub <text:a xlink:type="simple" xlink:href="https://hub.docker.com/_/nginx" text:style-name="ListLabel_20_82" text:visited-style-name="ListLabel_20_82"><text:span text:style-name="T28">https://hub.docker.com/_/nginx</text:span></text:a></text:p>
      <text:list xml:id="list34851986077834" text:continue-list="list34852608865345" text:style-name="WWNum7">
        <text:list-item>
          <text:list>
            <text:list-item>
              <text:p text:style-name="P61"><text:bookmark text:name="_ci4lxughl4tm"/>Ejemplo 6: cambiando el “index.html” y consultando logs</text:p>
            </text:list-item>
          </text:list>
        </text:list-item>
      </text:list>
      <text:p text:style-name="P9">Observando la documentación que nos ofrece sobre la imagen <text:a xlink:type="simple" xlink:href="https://hub.docker.com/_/nginx" text:style-name="ListLabel_20_82" text:visited-style-name="ListLabel_20_82"><text:span text:style-name="T28">https://hub.docker.com/_/nginx</text:span></text:a>, observamos que la ruta donde se encuentra la página que sirve <text:span text:style-name="T26">“nginx”</text:span> se encuentra en <text:span text:style-name="T26">“/usr/share/nginx/html”</text:span>. Accediendo a esa ruta, podríamos modificar él “<text:span text:style-name="T26">index.html</text:span>” que se ve cuando nos conectamos al puerto 1200 en nuestra máquina.</text:p>
      <text:p text:style-name="P9">Con las herramientas que tenemos, tenemos varias acciones para modificarlo</text:p>
      <text:list xml:id="list1724291523" text:style-name="WWNum1">
        <text:list-item>
          <text:p text:style-name="P33">Accede con una “shell” con <text:span text:style-name="T26">“docker exec”</text:span>, instalar un editor de texto (por ejemplo, <text:s/>con <text:span text:style-name="T26">“apt update; apt install nano”</text:span>) y editar el fichero desde la consola.</text:p>
        </text:list-item>
        <text:list-item>
          <text:p text:style-name="P45">Copiar <text:span text:style-name="T26">“index.html”</text:span> desde nuestra máquina anfitriona con <text:span text:style-name="T26">“docker cp”</text:span>.</text:p>
        </text:list-item>
      </text:list>
      <text:p text:style-name="P9">También podemos acceder a los logs que nos va generando durante su ejecución. Si por ejemplo queremos acceder a las últimas 10 líneas de logs generados, podemos utilizar</text:p>
      <table:table table:name="Table33" table:style-name="Table33">
        <table:table-column table:style-name="Table33.A"/>
        <table:table-row table:style-name="Table33.1">
          <table:table-cell table:style-name="Table33.A1" office:value-type="string">
            <text:p text:style-name="P55"><text:span text:style-name="T25">docker logs -n 10 NOMBRE_CONTENEDOR</text:span></text:p>
          </table:table-cell>
        </table:table-row>
      </table:table>
      <text:list xml:id="list34853336526927" text:continue-list="list34851986077834" text:style-name="WWNum7">
        <text:list-item>
          <text:list>
            <text:list-item>
              <text:p text:style-name="P61"><text:bookmark text:name="_cthoktvgv7kc"/>Ejemplo 7: estableciendo variables de entorno</text:p>
            </text:list-item>
          </text:list>
        </text:list-item>
      </text:list>
      <text:p text:style-name="P9">Vamos a ver un sencillo ejemplo donde vamos a establecer una variable de entorno e imprimir su valor en pantalla. Ejecutamos el siguiente comando</text:p>
      <table:table table:name="Table34" table:style-name="Table34">
        <table:table-column table:style-name="Table34.A"/>
        <table:table-row table:style-name="Table34.1">
          <table:table-cell table:style-name="Table34.A1" office:value-type="string">
            <text:p text:style-name="P21"><text:span text:style-name="T25">docker run <text:s/>-it -e MENSAJE=HOLA ubuntu bash</text:span></text:p>
          </table:table-cell>
        </table:table-row>
      </table:table>
      <text:p text:style-name="P9">Con este ejemplo, al crear el contenedor hemos establecido la variable de entorno “MENSAJE” y lanzado una terminal. Podemos probar que la variable se ha establecido correctamente usando:</text:p>
      <table:table table:name="Table35" table:style-name="Table35">
        <table:table-column table:style-name="Table35.A"/>
        <table:table-row table:style-name="Table35.1">
          <table:table-cell table:style-name="Table35.A1" office:value-type="string">
            <text:p text:style-name="P55"><text:span text:style-name="T29">echo</text:span><text:span text:style-name="T25"> </text:span><text:span text:style-name="T31">$MENSAJE</text:span></text:p>
          </table:table-cell>
        </table:table-row>
      </table:table>
      <text:p text:style-name="P9">Los parámetros nuevos incluidos en esta orden son:</text:p>
      <text:list xml:id="list34853333413503" text:continue-list="list34853090955885" text:style-name="WWNum5">
        <text:list-item>
          <text:p text:style-name="P47"><text:span text:style-name="T12">Parámetro “-e”:</text:span> simplemente nos permite establecer una o varias “variables de entorno”.</text:p>
        </text:list-item>
      </text:list>
      <text:p text:style-name="P9">Este simple ejemplo nos indica cómo establecer variables de entorno al construir un contenedor. </text:p>
      <text:p text:style-name="P9">También, en el momento de la creación de imágenes, se puede establecer variables de entorno con valores por defecto de cada imagen. Estos valores se mantendrán, salvo que sean sobreescritos con el parámetro <text:span text:style-name="T26">“-e”</text:span>.</text:p>
      <text:list xml:id="list34852986910489" text:continue-list="list34853336526927" text:style-name="WWNum7">
        <text:list-item>
          <text:p text:style-name="P60"><text:bookmark text:name="_g1qlmy5ta6mu"/>Bibliografía</text:p>
        </text:list-item>
      </text:list>
      <text:p text:style-name="P7">[1] Docker Docs <text:a xlink:type="simple" xlink:href="https://docs.docker.com/" text:style-name="ListLabel_20_82" text:visited-style-name="ListLabel_20_82"><text:span text:style-name="T28">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Principales acciones con Docker</text:span></text:p>
      </style:header>
      <style:footer>
        <text:p text:style-name="MP4"><text:span text:style-name="MT1">Curso Introducción a Docker<text:tab/><text:tab/>UD03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5" meta:image-count="12" meta:object-count="0" meta:page-count="6" meta:paragraph-count="270" meta:word-count="3930" meta:character-count="26087" meta:non-whitespace-character-count="22422"/>
    <meta:generator>LibreOfficeDev/6.0.5.2$Linux_X86_64 LibreOffice_project/</meta:generator>
  </office:meta>
</office:document-meta>
</file>