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F0000008A46926128CC89CCF3.png" manifest:media-type="image/png"/>
  <manifest:file-entry manifest:full-path="Pictures/100002010000022B000000465E1CD3A8D12E333B.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text-align="center" style:justify-single-word="false" fo:break-before="auto" fo:break-after="auto"/>
    </style:style>
    <style:style style:name="P14" style:family="paragraph" style:parent-style-name="Standard">
      <style:paragraph-properties fo:margin-top="0.0417in" fo:margin-bottom="0in" loext:contextual-spacing="false" fo:line-height="100%" fo:text-align="start" style:justify-single-word="false">
        <style:tab-stops>
          <style:tab-stop style:position="6.692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6.692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6.6925in" style:type="right"/>
        </style:tab-stops>
      </style:paragraph-properties>
    </style:style>
    <style:style style:name="P17"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6.6925in" style:type="right"/>
        </style:tab-stops>
      </style:paragraph-properties>
    </style:style>
    <style:style style:name="P18"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8pt" fo:font-weight="bold" style:font-name-asian="Arial1" style:font-size-asian="8pt" style:font-weight-asian="bold" style:font-name-complex="Arial1" style:font-size-complex="8pt" style:font-weight-complex="bold"/>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15%" fo:text-align="start" style:justify-single-word="false"/>
    </style:style>
    <style:style style:name="P2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7"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0"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1"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Heading_20_1" style:list-style-name="WWNum2">
      <style:paragraph-properties fo:break-before="auto" fo:break-after="auto"/>
    </style:style>
    <style:style style:name="P34" style:family="paragraph" style:parent-style-name="Heading_20_1" style:list-style-name="WWNum2">
      <style:paragraph-properties fo:text-align="justify" style:justify-single-word="false" fo:break-before="auto" fo:break-after="auto"/>
    </style:style>
    <style:style style:name="P35" style:family="paragraph" style:parent-style-name="Heading_20_1" style:list-style-name="WWNum2">
      <style:paragraph-properties fo:margin-left="0.4in" fo:margin-right="0in" fo:text-align="justify" style:justify-single-word="false" fo:text-indent="-0.3in" style:auto-text-indent="false" fo:break-before="auto" fo:break-after="auto"/>
    </style:style>
    <style:style style:name="P36" style:family="paragraph" style:parent-style-name="Heading_20_2" style:list-style-name="WWNum2">
      <style:paragraph-properties fo:break-before="auto" fo:break-after="auto"/>
    </style:style>
    <style:style style:name="P37" style:family="paragraph" style:parent-style-name="Heading_20_2" style:list-style-name="WWNum2">
      <style:paragraph-properties fo:margin-top="0in" fo:margin-bottom="0.0429in" loext:contextual-spacing="false" fo:break-before="auto" fo:break-after="auto"/>
    </style:style>
    <style:style style:name="P38" style:family="paragraph" style:parent-style-name="Heading_20_3" style:list-style-name="WWNum2">
      <style:paragraph-properties fo:text-align="justify" style:justify-single-word="false" fo:break-before="auto" fo:break-after="auto"/>
    </style:style>
    <style:style style:name="P39" style:family="paragraph" style:parent-style-name="Heading_20_3" style:list-style-name="WWNum2">
      <style:paragraph-properties fo:break-before="auto" fo:break-after="auto"/>
    </style:style>
    <style:style style:name="P40"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font-weight-complex="bold"/>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font-weight-complex="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font-style-complex="normal" style:font-weight-complex="bold"/>
    </style:style>
    <style:style style:name="T16" style:family="text">
      <style:text-properties fo:font-variant="normal" fo:text-transform="none" fo:font-size="12pt" style:font-size-asian="12pt" style:font-size-complex="12pt"/>
    </style:style>
    <style:style style:name="T17" style:family="text">
      <style:text-properties fo:color="#000000" style:font-name="Verdana" fo:font-size="8pt" style:text-underline-style="none" fo:font-weight="bold" style:font-name-asian="Verdana1" style:font-size-asian="8pt" style:font-weight-asian="bold" style:font-name-complex="Verdana1" style:font-size-complex="8pt" style:font-weight-complex="bold"/>
    </style:style>
    <style:style style:name="T18" style:family="text">
      <style:text-properties fo:color="#000000" style:text-underline-style="none" fo:font-weight="bold" style:font-weight-asian="bold" style:font-weight-complex="bold"/>
    </style:style>
    <style:style style:name="T19" style:family="text">
      <style:text-properties fo:color="#000000"/>
    </style:style>
    <style:style style:name="T20" style:family="text">
      <style:text-properties fo:font-variant="small-caps" fo:color="#336633" fo:font-size="16pt" style:font-size-asian="16pt" style:font-size-complex="16pt"/>
    </style:style>
    <style:style style:name="T21" style:family="text">
      <style:text-properties fo:font-variant="small-caps" fo:color="#669966"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font-style-asian="italic" style:font-style-complex="italic"/>
    </style:style>
    <style:style style:name="T25" style:family="text">
      <style:text-properties fo:color="#1155cc" style:text-underline-style="solid" style:text-underline-width="auto" style:text-underline-color="font-color"/>
    </style:style>
    <style:style style:name="T26" style:family="text">
      <style:text-properties style:font-name="Arial" fo:font-size="11pt" style:font-name-asian="Arial1" style:font-size-asian="11pt" style:font-name-complex="Arial1" style:font-size-complex="11pt"/>
    </style:style>
    <style:style style:name="T27" style:family="text">
      <style:text-properties style:text-underline-style="none"/>
    </style:style>
    <style:style style:name="T28" style:family="text">
      <style:text-properties style:text-underline-style="none"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color="#333333" style:font-name="Consolas" fo:background-color="#f8f8f8" loext:char-shading-value="0" style:font-name-asian="Consolas1"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color="#008080" style:font-name="Consolas" fo:background-color="#f8f8f8" loext:char-shading-value="0" style:font-name-asian="Consolas1" style:font-name-complex="Consolas1"/>
    </style:style>
    <style:style style:name="T33"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Introducción a Docker y Kubernetes</text:span><text:span text:style-name="T4"><text:line-break/></text:span><text:span text:style-name="T5">UD 06. Docker Compose</text:span></text:p>
      <text:p text:style-name="P2"><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6"><draw:frame draw:style-name="fr1" draw:name="image1.png" text:anchor-type="as-char" svg:width="6.6929in" svg:height="0.4862in" draw:z-index="0"><draw:image xlink:href="Pictures/10000000000007800000008BADE10FA77D575FB0.png" xlink:type="simple" xlink:show="embed" xlink:actuate="onLoad" loext:mime-type="image/png"/></draw:frame></text:p>
      <text:p text:style-name="P3"/>
      <text:p text:style-name="P3"/>
      <text:p text:style-name="P4"/>
      <text:p text:style-name="P4"/>
      <text:p text:style-name="P4"/>
      <text:p text:style-name="P5"><text:span text:style-name="T7">Autor: Sergi García Barea</text:span></text:p>
      <text:p text:style-name="P5"><text:span text:style-name="T7">Actualizado Enero 2026</text:span></text:p>
      <text:p text:style-name="P5"><text:span text:style-name="T8">Licencia</text:span></text:p>
      <text:p text:style-name="P8"/>
      <text:p text:style-name="P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stintos símbolos para distinguir elementos importantes dentro del contenido. Estos símbolos son:</text:p>
      <text:p text:style-name="P9"/>
      <text:p text:style-name="P11"><text:span text:style-name="T11"><text:s/>📖 </text:span><text:span text:style-name="T12">Importante</text:span></text:p>
      <text:p text:style-name="P12"/>
      <text:p text:style-name="P11"><text:span text:style-name="T13"><text:s/>❕</text:span><text:span text:style-name="T14"> </text:span><text:span text:style-name="T12">Atención</text:span></text:p>
      <text:p text:style-name="P12"/>
      <text:p text:style-name="P11"><text:span text:style-name="T11"><text:s/>💬</text:span> <text:span text:style-name="T12">Interesant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5">1. Introducción<text:tab/>2</text:span></text:a></text:p>
          <text:p text:style-name="P14"><text:a xlink:type="simple" xlink:href="#_vyhbfp4t666x" text:style-name="Index_20_Link" text:visited-style-name="Index_20_Link"><text:span text:style-name="T15">2. Docker Compose<text:tab/>2</text:span></text:a></text:p>
          <text:p text:style-name="P14"><text:a xlink:type="simple" xlink:href="#_b67l6dln656a" text:style-name="Index_20_Link" text:visited-style-name="Index_20_Link"><text:span text:style-name="T15">2.1 <text:s/>¿Qué es Docker Compose?<text:tab/>2</text:span></text:a></text:p>
          <text:p text:style-name="P16"><text:a xlink:type="simple" xlink:href="#_iol64q9i0w94" text:style-name="Index_20_Link" text:visited-style-name="Index_20_Link"><text:span text:style-name="T15">2.2 <text:s/>Instalando Docker Compose<text:tab/>3</text:span></text:a></text:p>
          <text:p text:style-name="P14"><text:a xlink:type="simple" xlink:href="#_d522umg90fqi" text:style-name="Index_20_Link" text:visited-style-name="Index_20_Link"><text:span text:style-name="T15">3. Formato YAML y Fichero “docker-compose.yml”<text:tab/>3</text:span></text:a></text:p>
          <text:p text:style-name="P16"><text:a xlink:type="simple" xlink:href="#_8ued2mxr0360" text:style-name="Index_20_Link" text:visited-style-name="Index_20_Link"><text:span text:style-name="T15">3.1 <text:s/>¿Qué es YAML?<text:tab/>3</text:span></text:a></text:p>
          <text:p text:style-name="P16"><text:a xlink:type="simple" xlink:href="#_pmp1hg2z86dp" text:style-name="Index_20_Link" text:visited-style-name="Index_20_Link"><text:span text:style-name="T15">3.2 <text:s/>¿Qué es el fichero “docker-compose.yml”?<text:tab/>4</text:span></text:a></text:p>
          <text:p text:style-name="P17"><text:a xlink:type="simple" xlink:href="#_nuwz5zje0gof" text:style-name="Index_20_Link" text:visited-style-name="Index_20_Link"><text:span text:style-name="T15">3.3 <text:s/>¿Qué información podemos especificar en nuestro fichero “docker-compose.yml”?<text:tab/>4</text:span></text:a></text:p>
          <text:p text:style-name="P16"><text:a xlink:type="simple" xlink:href="#_6k0x7xeu5d8c" text:style-name="Index_20_Link" text:visited-style-name="Index_20_Link"><text:span text:style-name="T15">3.4 <text:s/>Entendiendo un fichero “docker-compose.yml” con ejemplo Wordpress<text:tab/>5</text:span></text:a></text:p>
          <text:p text:style-name="P17"><text:a xlink:type="simple" xlink:href="#_7dt1pwaeiuxq" text:style-name="Index_20_Link" text:visited-style-name="Index_20_Link"><text:span text:style-name="T15">3.4.1 <text:s/>Palabra clave “version”<text:tab/>5</text:span></text:a></text:p>
          <text:p text:style-name="P17"><text:a xlink:type="simple" xlink:href="#_23v1wffp3muz" text:style-name="Index_20_Link" text:visited-style-name="Index_20_Link"><text:span text:style-name="T15">3.4.2 <text:s/>Palabra clave “services” y contenedor “db”<text:tab/>5</text:span></text:a></text:p>
          <text:p text:style-name="P17"><text:a xlink:type="simple" xlink:href="#_ly7kqy59h5i9" text:style-name="Index_20_Link" text:visited-style-name="Index_20_Link"><text:span text:style-name="T15">3.4.3 <text:s/>Palabra clave “services” y contenedor “wordpress”<text:tab/>7</text:span></text:a></text:p>
          <text:p text:style-name="P17"><text:a xlink:type="simple" xlink:href="#_m9ryhrogt94t" text:style-name="Index_20_Link" text:visited-style-name="Index_20_Link"><text:span text:style-name="T15">3.4.4 <text:s/>Palabra clave “volumes” fuera de las plantillas de contenedores<text:tab/>8</text:span></text:a></text:p>
          <text:p text:style-name="P17"><text:a xlink:type="simple" xlink:href="#_u97uhdr25vm9" text:style-name="Index_20_Link" text:visited-style-name="Index_20_Link"><text:span text:style-name="T15">3.5 <text:s/>Lanzando nuestro ejemplo Wordpress “docker-compose.yml”<text:tab/>8</text:span></text:a></text:p>
          <text:p text:style-name="P14"><text:a xlink:type="simple" xlink:href="#_szx9b3bxh3t8" text:style-name="Index_20_Link" text:visited-style-name="Index_20_Link"><text:span text:style-name="T15">4. Comandos de “Docker Compose”<text:tab/>8</text:span></text:a></text:p>
          <text:p text:style-name="P16"><text:a xlink:type="simple" xlink:href="#_xior0f1yt5wx" text:style-name="Index_20_Link" text:visited-style-name="Index_20_Link"><text:span text:style-name="T15">4.1 <text:s/>Comando “up”<text:tab/>8</text:span></text:a></text:p>
          <text:p text:style-name="P16"><text:a xlink:type="simple" xlink:href="#_9fff24ruva7h" text:style-name="Index_20_Link" text:visited-style-name="Index_20_Link"><text:span text:style-name="T15">4.2 <text:s/>Comando “down”<text:tab/>9</text:span></text:a></text:p>
          <text:p text:style-name="P16"><text:a xlink:type="simple" xlink:href="#_xva38v3h67y8" text:style-name="Index_20_Link" text:visited-style-name="Index_20_Link"><text:span text:style-name="T15">4.3 <text:s/>Comando “build”<text:tab/>9</text:span></text:a></text:p>
          <text:p text:style-name="P16"><text:a xlink:type="simple" xlink:href="#_ojytel83r42m" text:style-name="Index_20_Link" text:visited-style-name="Index_20_Link"><text:span text:style-name="T17">4.4 <text:s/>Comando “pull”<text:tab/>9</text:span></text:a></text:p>
          <text:p text:style-name="P16"><text:a xlink:type="simple" xlink:href="#_xj0cnbxnyixc" text:style-name="Index_20_Link" text:visited-style-name="Index_20_Link"><text:span text:style-name="T17">4.5 <text:s/>Comando “run”<text:tab/>9</text:span></text:a></text:p>
          <text:p text:style-name="P16"><text:a xlink:type="simple" xlink:href="#_4etovnopfizp" text:style-name="Index_20_Link" text:visited-style-name="Index_20_Link"><text:span text:style-name="T15">4.6 <text:s/>Comando “pause”/”unpause”<text:tab/>9</text:span></text:a></text:p>
          <text:p text:style-name="P16"><text:a xlink:type="simple" xlink:href="#_45kwgxc0x6qw" text:style-name="Index_20_Link" text:visited-style-name="Index_20_Link"><text:span text:style-name="T15">4.7 <text:s/>Comando “start”/”stop”<text:tab/>10</text:span></text:a></text:p>
          <text:p text:style-name="P16"><text:a xlink:type="simple" xlink:href="#_kjvzp8llg93o" text:style-name="Index_20_Link" text:visited-style-name="Index_20_Link"><text:span text:style-name="T15">4.8 <text:s/>Comando “ps”<text:tab/>10</text:span></text:a></text:p>
          <text:p text:style-name="P16"><text:a xlink:type="simple" xlink:href="#_vo7rg3pndq31" text:style-name="Index_20_Link" text:visited-style-name="Index_20_Link"><text:span text:style-name="T15">4.9 <text:s/>Comando “exec”<text:tab/>10</text:span></text:a></text:p>
          <text:p text:style-name="P16"><text:a xlink:type="simple" xlink:href="#_socshlxlf8xr" text:style-name="Index_20_Link" text:visited-style-name="Index_20_Link"><text:span text:style-name="T17">4.10 <text:s/>Comando “rm”<text:tab/>10</text:span></text:a></text:p>
          <text:p text:style-name="P14"><text:a xlink:type="simple" xlink:href="#_40h3y9oo6b45" text:style-name="Index_20_Link" text:visited-style-name="Index_20_Link"><text:span text:style-name="T17">5. Bibliografía<text:tab/>1</text:span></text:a><text:span text:style-name="T18">0</text:span></text:p>
        </text:index-body>
      </text:table-of-content>
      <text:p text:style-name="P18"/>
      <text:p text:style-name="P19"/>
      <text:p text:style-name="P19"/>
      <text:p text:style-name="P20"><text:soft-page-break/><text:span text:style-name="T20">UD06. Docker Compose</text:span></text:p>
      <text:list xml:id="list2710012788" text:style-name="WWNum2">
        <text:list-item>
          <text:p text:style-name="P33"><text:bookmark text:name="_dbh0n1vac4c8"/>Introducción</text:p>
        </text:list-item>
      </text:list>
      <text:p text:style-name="P12">En esta unidad hablaremos de “<text:span text:style-name="T23">Docker Compose”</text:span>, una utilidad para definir y poner en marcha múltiples contenedores Docker, mediante un fichero de configuración en formato <text:span text:style-name="T12">YAML</text:span>.</text:p>
      <text:list xml:id="list65444655294367" text:continue-numbering="true" text:style-name="WWNum2">
        <text:list-item>
          <text:p text:style-name="P34"><text:bookmark text:name="_vyhbfp4t666x"/>Docker Compose</text:p>
          <text:list>
            <text:list-item>
              <text:p text:style-name="P34"><text:bookmark text:name="_b67l6dln656a"/>¿Qué es Docker Compose?</text:p>
            </text:list-item>
          </text:list>
        </text:list-item>
      </text:list>
      <text:p text:style-name="P12">A lo largo de anteriores unidades hemos visto aplicaciones alojadas en contenedores Docker que para ponerse en marcha no utilizaban un único contenedor, sino que requerían el uso de varios contenedores. El proceso de poner en marcha estas aplicaciones era tedioso, ya que usualmente debíamos levantar “a mano” esos contenedores, respetando el orden de levantado, etc.</text:p>
      <text:p text:style-name="P12"/>
      <text:p text:style-name="P12">“<text:span text:style-name="T23">Docker Compose</text:span>” es una aplicación para simplificar la tarea de lanzar múltiples contenedores con una configuración específica y enlazarlos entre sí. Además, “<text:span text:style-name="T23">Docker Compose</text:span>” actúa como un orquestador simple, permitiendo cierto escalado local (aunque con bastantes limitaciones en comparación con otros orquestadores, como Kubernetes).</text:p>
      <text:p text:style-name="P12"/>
      <text:p text:style-name="P12">Para definir el comportamiento que realizará Docker Compose, utilizaremos un fichero de configuración escrito en formato <text:span text:style-name="T12">YAML</text:span>.</text:p>
      <text:p text:style-name="P12"/>
      <text:p text:style-name="P12">Para más información <text:a xlink:type="simple" xlink:href="https://docs.docker.com/compose/" text:style-name="ListLabel_20_19" text:visited-style-name="ListLabel_20_19"><text:span text:style-name="T25">https://docs.docker.com/compose/</text:span></text:a></text:p>
      <text:list xml:id="list65446126508418" text:continue-numbering="true" text:style-name="WWNum2">
        <text:list-item>
          <text:list>
            <text:list-item>
              <text:p text:style-name="P36"><text:bookmark text:name="_iol64q9i0w94"/>Instalando Docker Compose</text:p>
            </text:list-item>
          </text:list>
        </text:list-item>
      </text:list>
      <text:p text:style-name="P12">En versiones antiguas de <text:span text:style-name="T23">“Docker Compose”, </text:span><text:span text:style-name="T24">este se instalaba con un ejecutable aparte (por este motivo en muchos manuales verás el comando de “</text:span><text:span text:style-name="T23">Docker Compose</text:span><text:span text:style-name="T24">” escrito como “</text:span><text:span text:style-name="T23">docker-compose</text:span><text:span text:style-name="T24">”.</text:span> </text:p>
      <text:p text:style-name="P12">Sin embargo, en las versiones actuales, dado su importancia, “Docker Compose” se ha integrado como un plugin de Docker y si hemos realizado la instalación de Docker como se propone en este curso y en la documentación oficial, ya lo tendremos.</text:p>
      <text:p text:style-name="P12">En el momento de la redacción de este documento, la última versión es la <text:span text:style-name="T12">2.39.4</text:span>. Podemos ver una captura con la forma de llamarlo actual, como un comando más de Docker “<text:span text:style-name="T23">docker compose</text:span>”.</text:p>
      <text:p text:style-name="P1"><draw:frame draw:style-name="fr1" draw:name="image4.png" text:anchor-type="as-char" svg:width="5.7811in" svg:height="0.7291in" draw:z-index="0"><draw:image xlink:href="Pictures/100002010000022B000000465E1CD3A8D12E333B.png" xlink:type="simple" xlink:show="embed" xlink:actuate="onLoad" loext:mime-type="image/png"/></draw:frame></text:p>
      <text:list xml:id="list65445322883064" text:continue-numbering="true" text:style-name="WWNum2">
        <text:list-item>
          <text:p text:style-name="P34"><text:bookmark text:name="_d522umg90fqi"/>Formato YAML y Fichero “docker-compose.yml”</text:p>
          <text:list>
            <text:list-item>
              <text:p text:style-name="P36"><text:bookmark text:name="_8ued2mxr0360"/>¿Qué es YAML?</text:p>
            </text:list-item>
          </text:list>
        </text:list-item>
      </text:list>
      <text:p text:style-name="P12">YAML es el acrónimo recursivo de “<text:span text:style-name="T23">YAML Ain't Markup Language</text:span>”, que en castellano significa, “<text:span text:style-name="T23">YAML no es un lenguaje de marcas</text:span>”. Más información en <text:a xlink:type="simple" xlink:href="https://es.wikipedia.org/wiki/YAML" text:style-name="ListLabel_20_19" text:visited-style-name="ListLabel_20_19"><text:span text:style-name="T25">https://es.wikipedia.org/wiki/YAML</text:span></text:a></text:p>
      <text:p text:style-name="P12"/>
      <text:p text:style-name="P12"><text:span text:style-name="T12">YAML</text:span> es a efectos prácticos una forma de definir información utilizando formato texto. Funciona de forma similar a <text:span text:style-name="T12">XML</text:span> o <text:span text:style-name="T12">JSON</text:span>. Si tenéis experiencia con <text:span text:style-name="T12">XML</text:span> o <text:span text:style-name="T12">JSON</text:span>, en este blog plantean y explican un ejemplo representando la misma información en los 3 formatos: </text:p>
      <text:p text:style-name="P12"><text:a xlink:type="simple" xlink:href="https://journey2theccie.wordpress.com/2020/02/28/devnet-associate-1-1-compare-data-formats-xml-json-yaml/" text:style-name="ListLabel_20_19" text:visited-style-name="ListLabel_20_19"><text:span text:style-name="T25">https://journey2theccie.wordpress.com/2020/02/28/devnet-associate-1-1-compare-data-formats-xml-json-yaml/</text:span></text:a></text:p>
      <text:p text:style-name="P12"/>
      <text:p text:style-name="P12">El uso de <text:span text:style-name="T12">YAML</text:span> dentro de “<text:span text:style-name="T23">Docker Compose</text:span>” es sencillo y fácilmente entendible con cada uno de los ejemplos. Podéis hacer un repaso previo a los principales elementos de <text:span text:style-name="T12">YAML</text:span> utilizados en ficheros “<text:span text:style-name="T23">Docker Compose</text:span>” revisando los ejemplos de YAML en la Wikipedia, disponibles en: <text:a xlink:type="simple" xlink:href="https://es.wikipedia.org/wiki/YAML#Ejemplos" text:style-name="ListLabel_20_19" text:visited-style-name="ListLabel_20_19"><text:span text:style-name="T25">https://es.wikipedia.org/wiki/YAML#Ejemplos</text:span></text:a>.</text:p>
      <text:p text:style-name="P11"><text:span text:style-name="T11"><text:s/>💬</text:span> <text:span text:style-name="T12">Interesante: </text:span>Utilidades como <text:a xlink:type="simple" xlink:href="https://onlineyamltools.com/convert-yaml-to-json" text:style-name="ListLabel_20_19" text:visited-style-name="ListLabel_20_19"><text:span text:style-name="T25">https://onlineyamltools.com/convert-yaml-to-json</text:span></text:a> nos permiten convertir <text:span text:style-name="T12">YAML</text:span> a <text:span text:style-name="T12">XML</text:span> o <text:span text:style-name="T12">JSON</text:span>.</text:p>
      <text:list xml:id="list65444351714014" text:continue-numbering="true" text:style-name="WWNum2">
        <text:list-item>
          <text:list>
            <text:list-item>
              <text:p text:style-name="P36"><text:bookmark text:name="_pmp1hg2z86dp"/>¿Qué es el fichero “docker-compose.yml”?</text:p>
            </text:list-item>
          </text:list>
        </text:list-item>
      </text:list>
      <text:p text:style-name="P12">El fichero “<text:span text:style-name="T23">docker-compose.yml</text:span>” es un fichero en formato <text:span text:style-name="T12">YAML</text:span> que definirá el comportamiento de cada configuración de “<text:span text:style-name="T23">Docker Compose</text:span>”. Lo habitual, es tener ese fichero en la raíz de nuestro proyecto. En este el próximo punto veremos que es el formato <text:span text:style-name="T12">YAML</text:span> y posteriormente presentaremos un ejemplo básico y comprensible de un fichero “<text:span text:style-name="T23">docker-compose.yml</text:span>”.</text:p>
      <text:list xml:id="list65445845317822" text:continue-numbering="true" text:style-name="WWNum2">
        <text:list-item>
          <text:list>
            <text:list-item>
              <text:p text:style-name="P38"><text:bookmark text:name="_nuwz5zje0gof"/>¿Qué información podemos especificar en nuestro fichero “docker-compose.yml”?</text:p>
            </text:list-item>
          </text:list>
        </text:list-item>
      </text:list>
      <text:p text:style-name="P12">La especificación completa para la versión 3 del fichero “<text:span text:style-name="T23">docker-compose.yml</text:span>” está definida en <text:a xlink:type="simple" xlink:href="https://docs.docker.com/compose/compose-file/compose-file-v3/" text:style-name="ListLabel_20_19" text:visited-style-name="ListLabel_20_19"><text:span text:style-name="T25">https://docs.docker.com/compose/compose-file/compose-file-v3/</text:span></text:a></text:p>
      <text:p text:style-name="P12"/>
      <text:p text:style-name="P12">A continuación, vamos a definir los más importantes:</text:p>
      <text:list xml:id="list1583461993" text:style-name="WWNum1">
        <text:list-item>
          <text:p text:style-name="P27"><text:span text:style-name="T12">version</text:span>: permite indicar la versión de la especificación del fichero “docker-compose.yml” no es necesario desde la versión 1.27.0 de “<text:span text:style-name="T23">Docker Compose</text:span>”.</text:p>
        </text:list-item>
        <text:list-item>
          <text:p text:style-name="P29"><text:span text:style-name="T12">services</text:span>: array asociativo con las diferentes plantillas de cada contenedor.</text:p>
        </text:list-item>
        <text:list-item>
          <text:p text:style-name="P29"><text:span text:style-name="T12">build</text:span>: usado en las plantillas de contenedores. Sirve para indicar si debemos construir la imagen a partir de un “<text:span text:style-name="T23">Dockerfile</text:span>”. Aunque tiene varias formas de uso detalladas en <text:a xlink:type="simple" xlink:href="https://docs.docker.com/compose/compose-file/compose-file-v3/#build" text:style-name="ListLabel_20_19" text:visited-style-name="ListLabel_20_19"><text:span text:style-name="T25">https://docs.docker.com/compose/compose-file/compose-file-v3/#build</text:span></text:a>, la forma más habitual de usarla es indicar en qué directorio está nuestro “<text:span text:style-name="T23">Dockerfile</text:span>” de la forma “<text:span text:style-name="T23">build: ./directorio</text:span>”.</text:p>
        </text:list-item>
        <text:list-item>
          <text:p text:style-name="P29"><text:span text:style-name="T12">command</text:span>: sobreescribe el comando por defecto a la imagen. Se usa de la forma “<text:span text:style-name="T23">command: /bin/bash”</text:span>.</text:p>
        </text:list-item>
        <text:list-item>
          <text:p text:style-name="P29"><text:span text:style-name="T12">container_name</text:span>: especifica un nombre de contenedor (si no, se generará automáticamente). Se usa de la forma “<text:span text:style-name="T23">container_name: micontenedor</text:span>”</text:p>
        </text:list-item>
        <text:list-item>
          <text:p text:style-name="P29"><text:span text:style-name="T12">depends_on</text:span>: indica que esta plantilla de contenedor, depende de que se haya creado un contenedor previo de la/s plantilla/s especificada/s. Los servicios también son detenidos en orden inverso a la dependencia. Se puden ver ejemplos en <text:a xlink:type="simple" xlink:href="https://docs.docker.com/compose/compose-file/compose-file-v3/#depends_on" text:style-name="ListLabel_20_19" text:visited-style-name="ListLabel_20_19"><text:span text:style-name="T25">https://docs.docker.com/compose/compose-file/compose-file-v3/#depends_on</text:span></text:a></text:p>
        </text:list-item>
        <text:list-item>
          <text:p text:style-name="P29"><text:span text:style-name="T12">env_file y environment</text:span>: permite definir variables de entorno en la plantilla del contenedor.</text:p>
          <text:list>
            <text:list-item>
              <text:p text:style-name="P31"><text:span text:style-name="T12">env_file</text:span> especifica un fichero o lista de ficheros donde están definidas las variables de entorno, similar a “<text:span text:style-name="T23">env_file: .env</text:span>”</text:p>
            </text:list-item>
            <text:list-item>
              <text:p text:style-name="P31"><text:span text:style-name="T12">environment</text:span> especifica una lista de variables de entorno con su valor. Ejemplos en <text:s/><text:a xlink:type="simple" xlink:href="https://docs.docker.com/compose/compose-file/compose-file-v3/#environment" text:style-name="ListLabel_20_19" text:visited-style-name="ListLabel_20_19"><text:span text:style-name="T25">https://docs.docker.com/compose/compose-file/compose-file-v3/#environment</text:span></text:a></text:p>
            </text:list-item>
          </text:list>
        </text:list-item>
        <text:list-item>
          <text:p text:style-name="P29"><text:span text:style-name="T12">expose / ports</text:span>: permite definir un conjunto de puertos que se exportarán en el contenedor. Ejemplos en <text:a xlink:type="simple" xlink:href="https://docs.docker.com/compose/compose-file/compose-file-v3/#expose" text:style-name="ListLabel_20_19" text:visited-style-name="ListLabel_20_19"><text:span text:style-name="T25">https://docs.docker.com/compose/compose-file/compose-file-v3/#expose</text:span></text:a> y en <text:a xlink:type="simple" xlink:href="https://docs.docker.com/compose/compose-file/compose-file-v3/#ports" text:style-name="ListLabel_20_19" text:visited-style-name="ListLabel_20_19"><text:span text:style-name="T25">https://docs.docker.com/compose/compose-file/compose-file-v3/#ports</text:span></text:a>.</text:p>
        </text:list-item>
        <text:list-item>
          <text:p text:style-name="P29"><text:span text:style-name="T12">image</text:span>: específica la imagen en la que se basa el contenedor. No es necesario cuando se especifica a partir de un “Dockerfile”.</text:p>
        </text:list-item>
        <text:list-item>
          <text:p text:style-name="P29"><text:span text:style-name="T12">network_mode</text:span>: especifica el modo de red, de forma similar al parámetro --network de Docker. Los modos soportados se detallan en el siguiente enlace <text:a xlink:type="simple" xlink:href="https://docs.docker.com/compose/compose-file/compose-file-v3/#network_mode" text:style-name="ListLabel_20_19" text:visited-style-name="ListLabel_20_19"><text:span text:style-name="T25">https://docs.docker.com/compose/compose-file/compose-file-v3/#network_mode</text:span></text:a></text:p>
        </text:list-item>
        <text:list-item>
          <text:p text:style-name="P29"><text:span text:style-name="T12">networks</text:span>: define las redes a crear para poner en marcha nuestros contenedores. Ejemplos en <text:a xlink:type="simple" xlink:href="https://docs.docker.com/compose/compose-file/compose-file-v3/#networks" text:style-name="ListLabel_20_19" text:visited-style-name="ListLabel_20_19"><text:span text:style-name="T25">https://docs.docker.com/compose/compose-file/compose-file-v3/#networks</text:span></text:a></text:p>
        </text:list-item>
        <text:list-item>
          <text:p text:style-name="P29"><text:span text:style-name="T12">restart</text:span>: indica cuando debe reiniciarse el contenedor. El valor por defecto es “<text:span text:style-name="T23">no</text:span>” (no se reinicia). Otros valores soportados son “<text:span text:style-name="T12">always</text:span>” (se reinicia cuando el contenedor se para) y “<text:span text:style-name="T23">on-failure</text:span>” (se reinicia si el contenedor se para y devuelve un valor de salida distinto de cero) y “unless-stoped” (se reinicia siempre, excepto si el contenedor es parado manualmente con “<text:span text:style-name="T23">docker stop</text:span>”).</text:p>
          <text:list>
            <text:list-item>
              <text:p text:style-name="P31">Ejemplos <text:a xlink:type="simple" xlink:href="https://docs.docker.com/compose/compose-file/compose-file-v3/#restart" text:style-name="ListLabel_20_19" text:visited-style-name="ListLabel_20_19"><text:span text:style-name="T25">https://docs.docker.com/compose/compose-file/compose-file-v3/#restart</text:span></text:a></text:p>
            </text:list-item>
          </text:list>
        </text:list-item>
        <text:list-item>
          <text:p text:style-name="P29"><text:span text:style-name="T12">tmpfs</text:span>: establece una lista de directorios a montar en formato “tmpfs” en el contenedor. Ejemplos en <text:a xlink:type="simple" xlink:href="https://docs.docker.com/compose/compose-file/compose-file-v3/#tmpfs" text:style-name="ListLabel_20_19" text:visited-style-name="ListLabel_20_19"><text:span text:style-name="T25">https://docs.docker.com/compose/compose-file/compose-file-v3/#tmpfs</text:span></text:a></text:p>
        </text:list-item>
        <text:list-item>
          <text:p text:style-name="P29"><text:span text:style-name="T12">volumes</text:span>: establece una lista de volúmenes, ya sea en formato “<text:span text:style-name="T23">bind mount</text:span>” o volumen Docker. Si quieres reutilizar un volumen entre distintas plantillas, además debes definir la variable “<text:span text:style-name="T23">volumes</text:span>” fuera de las plantillas de contenedores. Ejemplos <text:a xlink:type="simple" xlink:href="https://docs.docker.com/compose/compose-file/compose-file-v3/#volumes" text:style-name="ListLabel_20_19" text:visited-style-name="ListLabel_20_19"><text:span text:style-name="T25">https://docs.docker.com/compose/compose-file/compose-file-v3/#volumes</text:span></text:a></text:p>
        </text:list-item>
      </text:list>
      <text:list xml:id="list65445574761626" text:continue-list="list65445845317822" text:style-name="WWNum2">
        <text:list-item>
          <text:list>
            <text:list-item>
              <text:p text:style-name="P37"><text:bookmark text:name="_6k0x7xeu5d8c"/>Entendiendo un fichero “docker-compose.yml” con ejemplo Wordpress</text:p>
            </text:list-item>
          </text:list>
        </text:list-item>
      </text:list>
      <text:p text:style-name="P12">En este apartado vamos a ver un ejemplo de “<text:span text:style-name="T23">docker-compose.yml</text:span>” para poner en marcha Wordpress. En primer lugar, crearemos un directorio “<text:span text:style-name="T23">miwordpress</text:span>” o similar, nos situaremos dentro del directorio y allí crearemos el fichero “<text:span text:style-name="T23">docker-compose.yml</text:span>”.</text:p>
      <text:p text:style-name="P12"/>
      <text:p text:style-name="P12">El contenido completo del fichero sería el siguiente:</text:p>
      <table:table table:name="Table1" table:style-name="Table1">
        <table:table-column table:style-name="Table1.A"/>
        <table:table-row table:style-name="Table1.1">
          <table:table-cell table:style-name="Table1.A1" office:value-type="string">
            <text:p text:style-name="P32"><text:span text:style-name="T30">version: </text:span><text:span text:style-name="T31">"3.9"</text:span><text:span text:style-name="T30"><text:line-break/> <text:s text:c="3"/><text:line-break/>services:<text:line-break/> <text:s/>db:<text:line-break/><text:tab/>image: mariadb:10.11.2<text:line-break/><text:tab/>volumes:<text:line-break/> <text:s/><text:tab/> <text:s text:c="2"/>- db_data:/var/lib/mysql<text:line-break/><text:tab/>restart: always<text:line-break/><text:tab/>environment:<text:line-break/> <text:s/><text:tab/> <text:s text:c="2"/>MYSQL_ROOT_PASSWORD: somewordpress<text:line-break/> <text:s/><text:tab/> <text:s text:c="2"/>MYSQL_DATABASE: wordpress<text:line-break/> <text:s/><text:tab/> <text:s text:c="2"/>MYSQL_USER: wordpress<text:line-break/> <text:s/><text:tab/> <text:s text:c="2"/>MYSQL_PASSWORD: wordpress<text:line-break/> <text:s text:c="3"/><text:line-break/> <text:s/>wordpress:<text:line-break/><text:tab/>depends_on:<text:line-break/> <text:s/><text:tab/> <text:s text:c="2"/>- db<text:line-break/><text:tab/>image: wordpress:latest<text:line-break/><text:tab/>ports:<text:line-break/> <text:s/><text:tab/> <text:s text:c="2"/>- </text:span><text:span text:style-name="T31">"8000:80"</text:span><text:span text:style-name="T30"><text:line-break/><text:tab/>restart: always<text:line-break/><text:tab/>environment:<text:line-break/> <text:s/><text:tab/> <text:s text:c="2"/>WORDPRESS_DB_HOST: db:</text:span><text:span text:style-name="T32">3306</text:span><text:span text:style-name="T30"><text:line-break/> <text:s/><text:tab/> <text:s text:c="2"/>WORDPRESS_DB_USER: wordpress<text:line-break/> <text:s/><text:tab/> <text:s text:c="2"/>WORDPRESS_DB_PASSWORD: wordpress<text:line-break/> <text:s/><text:tab/> <text:s text:c="2"/>WORDPRESS_DB_NAME: wordpress</text:span></text:p>
            <text:p text:style-name="P32"><text:span text:style-name="T30">volumes:</text:span></text:p>
            <text:p text:style-name="P32"><text:span text:style-name="T30"><text:s text:c="2"/>db_data:</text:span></text:p>
          </table:table-cell>
        </table:table-row>
      </table:table>
      <text:p text:style-name="P12"><text:soft-page-break/></text:p>
      <text:p text:style-name="P12">Procedemos a analizar el contenido del fichero:</text:p>
      <text:list xml:id="list65445209276002" text:continue-numbering="true" text:style-name="WWNum2">
        <text:list-item>
          <text:list>
            <text:list-item>
              <text:list>
                <text:list-item>
                  <text:p text:style-name="P39"><text:bookmark text:name="_7dt1pwaeiuxq"/>Palabra clave “version”</text:p>
                </text:list-item>
              </text:list>
            </text:list-item>
          </text:list>
        </text:list-item>
      </text:list>
      <table:table table:name="Table2" table:style-name="Table2">
        <table:table-column table:style-name="Table2.A"/>
        <table:table-row table:style-name="Table2.1">
          <table:table-cell table:style-name="Table2.A1" office:value-type="string">
            <text:p text:style-name="P32"><text:span text:style-name="T30">version: </text:span><text:span text:style-name="T31">"3.9"</text:span></text:p>
          </table:table-cell>
        </table:table-row>
      </table:table>
      <text:p text:style-name="P12">Aquí tenemos definido en formato YAML un par variable/valor (la variable es “<text:span text:style-name="T23">version</text:span>” y el valor es “<text:span text:style-name="T23">3.9</text:span>”). “<text:span text:style-name="T23">Docker Compose</text:span>” ha ido ampliándose con el tiempo, así que aquí indicamos indicando la versión del formato de fichero. Este dato es opcional desde la versión “<text:span text:style-name="T23">1.27.0</text:span>” de “<text:span text:style-name="T23">Docker Compose</text:span>”, ya que es capaz de auto detectarlo.</text:p>
      <text:list xml:id="list65444832436703" text:continue-numbering="true" text:style-name="WWNum2">
        <text:list-item>
          <text:list>
            <text:list-item>
              <text:list>
                <text:list-item>
                  <text:p text:style-name="P39"><text:bookmark text:name="_23v1wffp3muz"/>Palabra clave “services” y contenedor “db”</text:p>
                </text:list-item>
              </text:list>
            </text:list-item>
          </text:list>
        </text:list-item>
      </text:list>
      <table:table table:name="Table3" table:style-name="Table3">
        <table:table-column table:style-name="Table3.A"/>
        <table:table-row table:style-name="Table3.1">
          <table:table-cell table:style-name="Table3.A1" office:value-type="string">
            <text:p text:style-name="P32"><text:span text:style-name="T30">services:</text:span></text:p>
            <text:p text:style-name="P32"><text:span text:style-name="T30"><text:s text:c="2"/>db:</text:span></text:p>
            <text:p text:style-name="P32"><text:span text:style-name="T30"><text:tab/>image: mariadb:10.11.2</text:span></text:p>
            <text:p text:style-name="P32"><text:span text:style-name="T30"><text:tab/>volumes:</text:span></text:p>
            <text:p text:style-name="P32"><text:span text:style-name="T30"><text:s text:c="2"/><text:tab/> <text:s text:c="2"/>- db_data:/var/lib/mysql</text:span></text:p>
            <text:p text:style-name="P32"><text:span text:style-name="T30"><text:tab/>restart: always</text:span></text:p>
            <text:p text:style-name="P32"><text:span text:style-name="T30"><text:tab/>environment:</text:span></text:p>
            <text:p text:style-name="P32"><text:span text:style-name="T30"><text:s text:c="2"/><text:tab/> <text:s text:c="2"/>MARIADB_ROOT_PASSWORD: somewordpress</text:span></text:p>
            <text:p text:style-name="P32"><text:span text:style-name="T30"><text:s text:c="2"/><text:tab/> <text:s text:c="2"/>MARIADB_DATABASE: wordpress</text:span></text:p>
            <text:p text:style-name="P32"><text:span text:style-name="T30"><text:s text:c="2"/><text:tab/> <text:s text:c="2"/>MARIADB_USER: wordpress</text:span></text:p>
            <text:p text:style-name="P32"><text:span text:style-name="T30"><text:s text:c="2"/><text:tab/> <text:s text:c="2"/>MARIADB_PASSWORD: wordpress</text:span></text:p>
          </table:table-cell>
        </table:table-row>
      </table:table>
      <text:p text:style-name="P12">En primer lugar, establece la variable “<text:span text:style-name="T23">services</text:span>”. Siguiendo el formato <text:span text:style-name="T12">YAML</text:span>, lo que almacena “<text:span text:style-name="T23">services</text:span>” es un array asociativo con las variables “<text:span text:style-name="T23">db</text:span>” y posteriormente “<text:span text:style-name="T23">wordpress</text:span>” (no se ve en este fragmento). Para saber que un elemento está contenido en otro, lo detecta mediante el nivel de los espacios (de forma similar a lenguajes como <text:span text:style-name="T12">Python</text:span>).</text:p>
      <text:p text:style-name="P12"/>
      <text:p text:style-name="P12">Cada una de esas variables, define un contenedor. En este caso, <text:s/>la plantilla de contenedor “<text:span text:style-name="T23">db</text:span>”, es también un array asociativo en formato <text:span text:style-name="T12">YAML</text:span> y define las siguientes propiedades:</text:p>
      <table:table table:name="Table4" table:style-name="Table4">
        <table:table-column table:style-name="Table4.A"/>
        <table:table-row table:style-name="Table4.1">
          <table:table-cell table:style-name="Table4.A1" office:value-type="string">
            <text:p text:style-name="P32"><text:span text:style-name="T30"><text:tab/>image: mariadb:10.11.2</text:span></text:p>
          </table:table-cell>
        </table:table-row>
      </table:table>
      <text:p text:style-name="P12">Define la imagen que utilizará el contenedor.</text:p>
      <table:table table:name="Table5" table:style-name="Table5">
        <table:table-column table:style-name="Table5.A"/>
        <table:table-row table:style-name="Table5.1">
          <table:table-cell table:style-name="Table5.A1" office:value-type="string">
            <text:p text:style-name="P32"><text:span text:style-name="T30"><text:tab/>volumes:<text:line-break/> <text:s/><text:tab/> <text:s text:c="2"/>- db_data:/var/lib/mysql</text:span></text:p>
          </table:table-cell>
        </table:table-row>
      </table:table>
      <text:p text:style-name="P12"/>
      <text:p text:style-name="P12">Define qué volúmenes contendrá esta imagen. En este caso, los volúmenes en sí, se definen como una lista, de un solo elemento. Sabemos que es una lista porque en YAML empiezan con “<text:span text:style-name="T23">-</text:span>”. </text:p>
      <text:p text:style-name="P12">En este caso, se define el volumen “db_data” que se mapea con el directorio del contenedor “/var/lib/mysql”. Si quisiéramos tener varios volúmenes, podríamos hacer algo similar a:</text:p>
      <table:table table:name="Table6" table:style-name="Table6">
        <table:table-column table:style-name="Table6.A"/>
        <table:table-row table:style-name="Table6.1">
          <table:table-cell table:style-name="Table6.A1" office:value-type="string">
            <text:p text:style-name="P32"><text:span text:style-name="T30"><text:tab/>volumes:<text:line-break/> <text:s/><text:tab/> <text:s text:c="2"/>- db_data:/var/lib/mysql</text:span></text:p>
            <text:p text:style-name="P32"><text:span text:style-name="T30"><text:s text:c="8"/>- otrovolumen:/directorio/otrovolumen</text:span></text:p>
          </table:table-cell>
        </table:table-row>
      </table:table>
      <text:p text:style-name="P12">Con esto ya hemos visto los 3 principales tipos elementos de YAML (par “variable/valor”, array asociativo, lista).</text:p>
      <table:table table:name="Table7" table:style-name="Table7">
        <table:table-column table:style-name="Table7.A"/>
        <table:table-row table:style-name="Table7.1">
          <table:table-cell table:style-name="Table7.A1" office:value-type="string">
            <text:p text:style-name="P32"><text:span text:style-name="T30"><text:tab/>restart: always</text:span></text:p>
          </table:table-cell>
        </table:table-row>
      </table:table>
      <text:p text:style-name="P12">Este fragmento, usando la sintaxis YAML de par variable/valor, indica que si el servidor se detiene, “<text:span text:style-name="T23">Docker Compose</text:span>” lo relance automáticamente (útil para contenedores que puedan caer por un fallo, pero sean necesarios para que la aplicación funcione).</text:p>
      <table:table table:name="Table8" table:style-name="Table8">
        <table:table-column table:style-name="Table8.A"/>
        <table:table-row table:style-name="Table8.1">
          <table:table-cell table:style-name="Table8.A1" office:value-type="string">
            <text:p text:style-name="P32"><text:span text:style-name="T30"><text:s text:c="5"/>environment:<text:line-break/> <text:s/><text:tab/> <text:s text:c="2"/>MARIADB_ROOT_PASSWORD: somewordpress<text:line-break/> <text:s/><text:tab/> <text:s text:c="2"/>MARIADB_DATABASE: wordpress<text:line-break/> <text:s/><text:tab/> <text:s text:c="2"/>MARIADB_USER: wordpress<text:line-break/> <text:s/><text:tab/> <text:s text:c="2"/>MARIADB_PASSWORD: wordpress</text:span></text:p>
          </table:table-cell>
        </table:table-row>
      </table:table>
      <text:p text:style-name="P12">En este último fragmento, se define la variable “<text:span text:style-name="T23">environment</text:span>” del contenedor. Estas contendrán, mediante un vector asociativo, el par variable/valor de cada variable de entorno definida en el contenedor. A efectos prácticos, está definiendo el password de root de <text:span text:style-name="T12">MySQL</text:span>, el nombre de una base de datos “wordpress”, un usuario con permisos de root para <text:span text:style-name="T12">MySQL </text:span>llamado “wordpress” (necesario para conexiones remotas) y su password como “wordpress”.</text:p>
      <text:list xml:id="list65446424446306" text:continue-numbering="true" text:style-name="WWNum2">
        <text:list-item>
          <text:list>
            <text:list-item>
              <text:list>
                <text:list-item>
                  <text:p text:style-name="P39"><text:bookmark text:name="_ly7kqy59h5i9"/>Palabra clave “services” y contenedor “wordpress”</text:p>
                </text:list-item>
              </text:list>
            </text:list-item>
          </text:list>
        </text:list-item>
      </text:list>
      <table:table table:name="Table9" table:style-name="Table9">
        <table:table-column table:style-name="Table9.A"/>
        <table:table-row table:style-name="Table9.1">
          <table:table-cell table:style-name="Table9.A1" office:value-type="string">
            <text:p text:style-name="P32"><text:span text:style-name="T30"><text:s text:c="2"/>wordpress:<text:line-break/><text:tab/>depends_on:<text:line-break/> <text:s/><text:tab/> <text:s text:c="2"/>- db<text:line-break/><text:tab/>image: wordpress:latest<text:line-break/><text:tab/>ports:<text:line-break/> <text:s/><text:tab/> <text:s text:c="2"/>- </text:span><text:span text:style-name="T31">"8000:80"</text:span><text:span text:style-name="T30"><text:line-break/><text:tab/>restart: always<text:line-break/><text:tab/>environment:<text:line-break/> <text:s/><text:tab/> <text:s text:c="2"/>WORDPRESS_DB_HOST: db:</text:span><text:span text:style-name="T32">3306</text:span><text:span text:style-name="T30"><text:line-break/> <text:s/><text:tab/> <text:s text:c="2"/>WORDPRESS_DB_USER: wordpress<text:line-break/> <text:s/><text:tab/> <text:s text:c="2"/>WORDPRESS_DB_PASSWORD: wordpress<text:line-break/> <text:s/><text:tab/> <text:s text:c="2"/>WORDPRESS_DB_NAME: wordpress</text:span></text:p>
          </table:table-cell>
        </table:table-row>
      </table:table>
      <text:p text:style-name="P12">En este caso, se está definiendo, dentro de services, la plantilla del contenedor “<text:span text:style-name="T23">wordpress</text:span>”. </text:p>
      <text:p text:style-name="P12"/>
      <text:p text:style-name="P12">Pasamos a revisar sus fragmentos: </text:p>
      <table:table table:name="Table10" table:style-name="Table10">
        <table:table-column table:style-name="Table10.A"/>
        <table:table-row table:style-name="Table10.1">
          <table:table-cell table:style-name="Table10.A1" office:value-type="string">
            <text:p text:style-name="P32"><text:span text:style-name="T30"><text:tab/>depends_on:<text:line-break/> <text:s/><text:tab/> <text:s text:c="2"/>- db</text:span></text:p>
          </table:table-cell>
        </table:table-row>
      </table:table>
      <text:p text:style-name="P12">Indica que este contenedor depende del contenedor “<text:span text:style-name="T23">db</text:span>”, por lo cual el contenedor “<text:span text:style-name="T23">db</text:span>” deberá ponerse en marcha antes de iniciar nuestro contenedor “<text:span text:style-name="T23">wordpress</text:span>”.</text:p>
      <table:table table:name="Table11" table:style-name="Table11">
        <table:table-column table:style-name="Table11.A"/>
        <table:table-row table:style-name="Table11.1">
          <table:table-cell table:style-name="Table11.A1" office:value-type="string">
            <text:p text:style-name="P32"><text:span text:style-name="T30"><text:tab/>image: wordpress:latest</text:span></text:p>
          </table:table-cell>
        </table:table-row>
      </table:table>
      <text:p text:style-name="P12">Como se ha comentado anteriormente, indica la imágen en que se basa el contenedor.</text:p>
      <table:table table:name="Table12" table:style-name="Table12">
        <table:table-column table:style-name="Table12.A"/>
        <table:table-row table:style-name="Table12.1">
          <table:table-cell table:style-name="Table12.A1" office:value-type="string">
            <text:p text:style-name="P32"><text:span text:style-name="T30"><text:tab/>ports:<text:line-break/> <text:s/><text:tab/> <text:s text:c="2"/>- </text:span><text:span text:style-name="T31">"8000:80"</text:span></text:p>
          </table:table-cell>
        </table:table-row>
      </table:table>
      <text:p text:style-name="P12">Indica que el puerto “<text:span text:style-name="T23">80</text:span>” de ese contenedor se mapea con el puerto “<text:span text:style-name="T23">8000</text:span>” del anfitrión.</text:p>
      <text:p text:style-name="P12"/>
      <table:table table:name="Table13" table:style-name="Table13">
        <table:table-column table:style-name="Table13.A"/>
        <table:table-row table:style-name="Table13.1">
          <table:table-cell table:style-name="Table13.A1" office:value-type="string">
            <text:p text:style-name="P25"><text:span text:style-name="T30"><text:tab/>restart: always</text:span></text:p>
          </table:table-cell>
        </table:table-row>
      </table:table>
      <text:p text:style-name="P12">Como se ha comentado anteriormente, indica que si el contenedor se para, se reinicie automáticamente.</text:p>
      <table:table table:name="Table14" table:style-name="Table14">
        <table:table-column table:style-name="Table14.A"/>
        <table:table-row table:style-name="Table14.1">
          <table:table-cell table:style-name="Table14.A1" office:value-type="string">
            <text:p text:style-name="P32"><text:span text:style-name="T30">environment:<text:line-break/> <text:s/><text:tab/> <text:s text:c="2"/>WORDPRESS_DB_HOST: db:</text:span><text:span text:style-name="T32">3306</text:span><text:span text:style-name="T30"><text:line-break/> <text:s/><text:tab/> <text:s text:c="2"/>WORDPRESS_DB_USER: wordpress<text:line-break/> <text:s/><text:tab/> <text:s text:c="2"/>WORDPRESS_DB_PASSWORD: wordpress<text:line-break/> <text:s/><text:tab/> <text:s text:c="2"/>WORDPRESS_DB_NAME: wordpress</text:span></text:p>
          </table:table-cell>
        </table:table-row>
      </table:table>
      <text:p text:style-name="P12"/>
      <text:p text:style-name="P12">De forma similar al anterior punto, definimos el valor de distintas “variables de entorno” del contenedor “<text:span text:style-name="T23">wordpress</text:span>”.</text:p>
      <text:list xml:id="list65445962566207" text:continue-numbering="true" text:style-name="WWNum2">
        <text:list-item>
          <text:list>
            <text:list-item>
              <text:list>
                <text:list-item>
                  <text:p text:style-name="P39"><text:bookmark text:name="_m9ryhrogt94t"/>Palabra clave “volumes” fuera de las plantillas de contenedores</text:p>
                </text:list-item>
              </text:list>
            </text:list-item>
          </text:list>
        </text:list-item>
      </text:list>
      <table:table table:name="Table15" table:style-name="Table15">
        <table:table-column table:style-name="Table15.A"/>
        <table:table-row table:style-name="Table15.1">
          <table:table-cell table:style-name="Table15.A1" office:value-type="string">
            <text:p text:style-name="P32"><text:span text:style-name="T30">volumes:<text:line-break/> <text:s/>db_data:</text:span></text:p>
          </table:table-cell>
        </table:table-row>
      </table:table>
      <text:p text:style-name="P12">Simplemente, indica que el volumen “<text:span text:style-name="T23">db_data</text:span>” está disponible para otros contenedores puestos en marcha con “<text:span text:style-name="T23">Docker Compose</text:span>”.</text:p>
      <text:list xml:id="list65444581329498" text:continue-numbering="true" text:style-name="WWNum2">
        <text:list-item>
          <text:list>
            <text:list-item>
              <text:p text:style-name="P38"><text:bookmark text:name="_u97uhdr25vm9"/>Lanzando nuestro ejemplo Wordpress “docker-compose.yml”</text:p>
            </text:list-item>
          </text:list>
        </text:list-item>
      </text:list>
      <text:p text:style-name="P12">Una vez creado y entendido nuestro fichero “<text:span text:style-name="T23">docker-compose.yml</text:span>”, podemos poner en marcha nuestro servicio situándonos en el directorio donde está este fichero y escribiendo:</text:p>
      <table:table table:name="Table16" table:style-name="Table16">
        <table:table-column table:style-name="Table16.A"/>
        <table:table-row table:style-name="Table16.1">
          <table:table-cell table:style-name="Table16.A1" office:value-type="string">
            <text:p text:style-name="P32"><text:span text:style-name="T30">docker compose up -d</text:span></text:p>
          </table:table-cell>
        </table:table-row>
      </table:table>
      <text:p text:style-name="P12">Con la opción “<text:span text:style-name="T23">up</text:span>” indicamos que se interprete la plantilla definida en “<text:span text:style-name="T23">docker-compose.yml</text:span>” y con “<text:span text:style-name="T23">-d</text:span>” indicamos la ejecución en segundo plano (Nota: si nos da problemas, probemos sin usar “-d” para poder recabar mayor información de lo que está ocurriendo en los contenedores). Al acabar observaremos algo similar a:</text:p>
      <text:p text:style-name="P13"><draw:frame draw:style-name="fr1" draw:name="image3.png" text:anchor-type="as-char" svg:width="6.6929in" svg:height="1.3752in" draw:z-index="0"><draw:image xlink:href="Pictures/100002010000029F0000008A46926128CC89CCF3.png" xlink:type="simple" xlink:show="embed" xlink:actuate="onLoad" loext:mime-type="image/png"/></draw:frame></text:p>
      <text:p text:style-name="P12">Observamos, que tal como hemos definido, primero se descarga y pone en marcha el contenedor basado en la plantilla “<text:span text:style-name="T23">db</text:span>”, al cual se le da nombre “<text:span text:style-name="T23">miwordpress-db-1</text:span>”, ya que establece el nombre del directorio como base “<text:span text:style-name="T23">miwordpress</text:span>”, luego el de la plantilla, y luego un número según el número de contenedor creado. </text:p>
      <text:p text:style-name="P12">Posteriormente, se crea de igual forma el contenedor basado en la plantilla “<text:span text:style-name="T23">wordpress</text:span>”.</text:p>
      <text:p text:style-name="P12">Si accedemos a <text:a xlink:type="simple" xlink:href="http://localhost:8000" text:style-name="ListLabel_20_19" text:visited-style-name="ListLabel_20_19"><text:span text:style-name="T25">http://localhost:8000</text:span></text:a> observaremos que todo funciona correctamente.</text:p>
      <text:p text:style-name="P12">Podemos detener todos los contenedores con el comando:</text:p>
      <table:table table:name="Table17" table:style-name="Table17">
        <table:table-column table:style-name="Table17.A"/>
        <table:table-row table:style-name="Table17.1">
          <table:table-cell table:style-name="Table17.A1" office:value-type="string">
            <text:p text:style-name="P32"><text:span text:style-name="T30">docker compose down</text:span></text:p>
          </table:table-cell>
        </table:table-row>
      </table:table>
      <text:p text:style-name="P12"/>
      <text:list xml:id="list65444726815814" text:continue-numbering="true" text:style-name="WWNum2">
        <text:list-item>
          <text:p text:style-name="P35"><text:bookmark text:name="_szx9b3bxh3t8"/>Comandos de “Docker Compose”</text:p>
        </text:list-item>
      </text:list>
      <text:p text:style-name="P12"><text:soft-page-break/>En este apartado vamos a definir los principales comandos de “Docker Compose”.</text:p>
      <text:list xml:id="list65444763307824" text:continue-numbering="true" text:style-name="WWNum2">
        <text:list-item>
          <text:list>
            <text:list-item>
              <text:p text:style-name="P36"><text:bookmark text:name="_xior0f1yt5wx"/>Comando “up”</text:p>
            </text:list-item>
          </text:list>
        </text:list-item>
      </text:list>
      <text:p text:style-name="P12">Con el comando “<text:span text:style-name="T23">up</text:span>” se interpretará la plantilla “<text:span text:style-name="T23">docker-compose.yml”</text:span> y se lanzarán los contenedores necesarios. El detalle de su funcionamiento y parámetros está definido en la siguiente dirección <text:a xlink:type="simple" xlink:href="https://docs.docker.com/compose/reference/up/" text:style-name="ListLabel_20_19" text:visited-style-name="ListLabel_20_19"><text:span text:style-name="T25">https://docs.docker.com/compose/reference/up/</text:span></text:a></text:p>
      <text:p text:style-name="P12"><text:span text:style-name="T29">Algunos de los usos más típicos son:</text:span></text:p>
      <table:table table:name="Table18" table:style-name="Table18">
        <table:table-column table:style-name="Table18.A"/>
        <table:table-row table:style-name="Table18.1">
          <table:table-cell table:style-name="Table18.A1" office:value-type="string">
            <text:p text:style-name="P32"><text:span text:style-name="T30">docker compose up -d</text:span></text:p>
          </table:table-cell>
        </table:table-row>
      </table:table>
      <text:p text:style-name="P12">Interpreta la plantilla y crea la aplicación, pero con el parámetro “<text:span text:style-name="T23">-d</text:span>” actúa en segundo plano.</text:p>
      <table:table table:name="Table19" table:style-name="Table19">
        <table:table-column table:style-name="Table19.A"/>
        <table:table-row table:style-name="Table19.1">
          <table:table-cell table:style-name="Table19.A1" office:value-type="string">
            <text:p text:style-name="P25"><text:span text:style-name="T30">docker compose up -d -f mifichero.yml</text:span></text:p>
          </table:table-cell>
        </table:table-row>
      </table:table>
      <text:p text:style-name="P12">El parámetro “<text:span text:style-name="T23">-f</text:span>” permite indicar un nombre de fichero <text:span text:style-name="T12">YAML</text:span> para “<text:span text:style-name="T23">Docker Compose</text:span>”.</text:p>
      <table:table table:name="Table20" table:style-name="Table20">
        <table:table-column table:style-name="Table20.A"/>
        <table:table-row table:style-name="Table20.1">
          <table:table-cell table:style-name="Table20.A1" office:value-type="string">
            <text:p text:style-name="P32"><text:span text:style-name="T30">docker compose up -d --force-recreate</text:span></text:p>
          </table:table-cell>
        </table:table-row>
      </table:table>
      <text:p text:style-name="P12">El parámetro “<text:span text:style-name="T23">--force-recreate</text:span>” fuerza a reconstruir contenedores incluso si ya existen en tu máquina.</text:p>
      <table:table table:name="Table21" table:style-name="Table21">
        <table:table-column table:style-name="Table21.A"/>
        <table:table-row table:style-name="Table21.1">
          <table:table-cell table:style-name="Table21.A1" office:value-type="string">
            <text:p text:style-name="P32"><text:span text:style-name="T30">docker compose up -d --scale db=3</text:span></text:p>
          </table:table-cell>
        </table:table-row>
      </table:table>
      <text:p text:style-name="P12">El parámetro “<text:span text:style-name="T23">--scale</text:span>” indica que del servicio “<text:span text:style-name="T23">db</text:span>” se creen tres contenedores, realizando un escalado local. El propio “<text:span text:style-name="T23">Docker Compose</text:span>” se encargará mediante algoritmo “round robin” de distribuir las peticiones al host “db” (como el nombre del servicio) a cada uno de los contenedores escalados. Esto se verá más claramente en uno de los casos prácticos propuestos.</text:p>
      <text:list xml:id="list65444366082738" text:continue-numbering="true" text:style-name="WWNum2">
        <text:list-item>
          <text:list>
            <text:list-item>
              <text:p text:style-name="P36"><text:bookmark text:name="_9fff24ruva7h"/>Comando “down”</text:p>
            </text:list-item>
          </text:list>
        </text:list-item>
      </text:list>
      <text:p text:style-name="P12">Con el comando “<text:span text:style-name="T23">down</text:span>” se interpretará la plantilla y se paran los contenedores necesarios. </text:p>
      <text:p text:style-name="P12">El detalle de su funcionamiento y parámetros está definido en la siguiente dirección <text:a xlink:type="simple" xlink:href="https://docs.docker.com/compose/reference/down/" text:style-name="ListLabel_20_19" text:visited-style-name="ListLabel_20_19"><text:span text:style-name="T25">https://docs.docker.com/compose/reference/down/</text:span></text:a></text:p>
      <text:p text:style-name="P12"><text:span text:style-name="T29">Algunos de los usos más típicos son:</text:span></text:p>
      <table:table table:name="Table22" table:style-name="Table22">
        <table:table-column table:style-name="Table22.A"/>
        <table:table-row table:style-name="Table22.1">
          <table:table-cell table:style-name="Table22.A1" office:value-type="string">
            <text:p text:style-name="P32"><text:span text:style-name="T30">docker compose down</text:span></text:p>
          </table:table-cell>
        </table:table-row>
      </table:table>
      <text:p text:style-name="P12">Detiene todos los contenedores.</text:p>
      <table:table table:name="Table23" table:style-name="Table23">
        <table:table-column table:style-name="Table23.A"/>
        <table:table-row table:style-name="Table23.1">
          <table:table-cell table:style-name="Table23.A1" office:value-type="string">
            <text:p text:style-name="P32"><text:span text:style-name="T30">docker compose down -v</text:span></text:p>
          </table:table-cell>
        </table:table-row>
      </table:table>
      <text:p text:style-name="P12">Elimina los volúmenes creados en la plantilla </text:p>
      <table:table table:name="Table24" table:style-name="Table24">
        <table:table-column table:style-name="Table24.A"/>
        <table:table-row table:style-name="Table24.1">
          <table:table-cell table:style-name="Table24.A1" office:value-type="string">
            <text:p text:style-name="P32"><text:span text:style-name="T30">docker compose down -t 5</text:span></text:p>
          </table:table-cell>
        </table:table-row>
      </table:table>
      <text:p text:style-name="P12">Establece un “timeout” para la parada de contenedores de 5 segundos. El valor por defecto si no se indica nada es de 10 segundos.</text:p>
      <text:list xml:id="list65444549253811" text:continue-numbering="true" text:style-name="WWNum2">
        <text:list-item>
          <text:list>
            <text:list-item>
              <text:p text:style-name="P36"><text:bookmark text:name="_xva38v3h67y8"/>Comando “build”</text:p>
            </text:list-item>
          </text:list>
        </text:list-item>
      </text:list>
      <text:p text:style-name="P12">Comando que simplemente crea las imágenes definidas en la plantilla“<text:span text:style-name="T23">docker-compose.yml”</text:span>. </text:p>
      <text:p text:style-name="P12">Su funcionamiento se detalla en <text:a xlink:type="simple" xlink:href="https://docs.docker.com/compose/reference/build/" text:style-name="ListLabel_20_19" text:visited-style-name="ListLabel_20_19"><text:span text:style-name="T25">https://docs.docker.com/compose/reference/build/</text:span></text:a></text:p>
      <text:list xml:id="list65444524124945" text:continue-numbering="true" text:style-name="WWNum2">
        <text:list-item>
          <text:list>
            <text:list-item>
              <text:p text:style-name="P36"><text:bookmark text:name="_ojytel83r42m"/>Comando “pull”</text:p>
            </text:list-item>
          </text:list>
        </text:list-item>
      </text:list>
      <text:p text:style-name="P12">Comando descarga las imagenes de contenedores necesarias para “<text:span text:style-name="T23">docker-compose.yml”</text:span>. </text:p>
      <text:p text:style-name="P12">Su funcionamiento se detalla en <text:a xlink:type="simple" xlink:href="https://docs.docker.com/compose/reference/pull/" text:style-name="ListLabel_20_19" text:visited-style-name="ListLabel_20_19"><text:span text:style-name="T25">https://docs.docker.com/compose/reference/pull/</text:span></text:a></text:p>
      <text:list xml:id="list65445316456108" text:continue-numbering="true" text:style-name="WWNum2">
        <text:list-item>
          <text:list>
            <text:list-item>
              <text:p text:style-name="P36"><text:bookmark text:name="_xj0cnbxnyixc"/>Comando “run”</text:p>
            </text:list-item>
          </text:list>
        </text:list-item>
      </text:list>
      <text:p text:style-name="P12">Comando que permite lanzar un comando contra un servicio concreto definido en la plantilla “<text:span text:style-name="T23">docker-compose.yml”</text:span>. El detalle de su funcionamiento está disponible en <text:a xlink:type="simple" xlink:href="https://docs.docker.com/compose/reference/run/" text:style-name="ListLabel_20_19" text:visited-style-name="ListLabel_20_19"><text:span text:style-name="T25">https://docs.docker.com/compose/reference/run/</text:span></text:a> </text:p>
      <text:list xml:id="list65445525855302" text:continue-numbering="true" text:style-name="WWNum2">
        <text:list-item>
          <text:list>
            <text:list-item>
              <text:p text:style-name="P36"><text:bookmark text:name="_4etovnopfizp"/>Comando “pause”/”unpause”</text:p>
            </text:list-item>
          </text:list>
        </text:list-item>
      </text:list>
      <text:p text:style-name="P12">Con el comando “<text:span text:style-name="T23">pause</text:span>”/”<text:span text:style-name="T12">unpause</text:span>” se pausan/retoman los contenedores de la plantilla.</text:p>
      <text:p text:style-name="P12">El detalle de su funcionamiento y parámetros está definido en la siguiente dirección <text:a xlink:type="simple" xlink:href="https://docs.docker.com/compose/reference/pause/" text:style-name="ListLabel_20_19" text:visited-style-name="ListLabel_20_19"><text:span text:style-name="T25">https://docs.docker.com/compose/reference/pause/</text:span></text:a></text:p>
      <text:list xml:id="list65446177153079" text:continue-numbering="true" text:style-name="WWNum2">
        <text:list-item>
          <text:list>
            <text:list-item>
              <text:p text:style-name="P36"><text:bookmark text:name="_45kwgxc0x6qw"/>Comando “start”/”stop”</text:p>
            </text:list-item>
          </text:list>
        </text:list-item>
      </text:list>
      <text:p text:style-name="P12">Con el comando “<text:span text:style-name="T23">start</text:span>”/”<text:span text:style-name="T23">stop</text:span>” podemos iniciar/parar sin parámetros todos los servicios de la plantilla o con parámetros, el servicio que deseemos de esa plantilla. También inicia/para sus dependencias, si las tiene.</text:p>
      <text:p text:style-name="P12">El detalle de su funcionamiento y parámetros está definido en:</text:p>
      <text:list xml:id="list875638117" text:style-name="WWNum3">
        <text:list-item>
          <text:p text:style-name="P28"><text:a xlink:type="simple" xlink:href="https://docs.docker.com/compose/reference/start/" text:style-name="ListLabel_20_19" text:visited-style-name="ListLabel_20_19"><text:span text:style-name="T25">https://docs.docker.com/compose/reference/start/</text:span></text:a></text:p>
        </text:list-item>
        <text:list-item>
          <text:p text:style-name="P30"><text:a xlink:type="simple" xlink:href="https://docs.docker.com/compose/reference/stop/" text:style-name="ListLabel_20_19" text:visited-style-name="ListLabel_20_19"><text:span text:style-name="T25">https://docs.docker.com/compose/reference/stop/</text:span></text:a></text:p>
        </text:list-item>
      </text:list>
      <text:p text:style-name="P12"/>
      <text:p text:style-name="P12"><text:span text:style-name="T29">Ejemplo</text:span>:</text:p>
      <table:table table:name="Table25" table:style-name="Table25">
        <table:table-column table:style-name="Table25.A"/>
        <table:table-row table:style-name="Table25.1">
          <table:table-cell table:style-name="Table25.A1" office:value-type="string">
            <text:p text:style-name="P32"><text:span text:style-name="T30">docker compose start db</text:span></text:p>
          </table:table-cell>
        </table:table-row>
      </table:table>
      <text:p text:style-name="P12">Pone en marcha el servicio “<text:span text:style-name="T23">db</text:span>” de la plantilla.</text:p>
      <table:table table:name="Table26" table:style-name="Table26">
        <table:table-column table:style-name="Table26.A"/>
        <table:table-row table:style-name="Table26.1">
          <table:table-cell table:style-name="Table26.A1" office:value-type="string">
            <text:p text:style-name="P25"><text:span text:style-name="T30">docker compose stop db</text:span></text:p>
          </table:table-cell>
        </table:table-row>
      </table:table>
      <text:p text:style-name="P12">Detiene el servicio “<text:span text:style-name="T23">db</text:span>” de la plantilla.</text:p>
      <text:list xml:id="list65446279982792" text:continue-list="list65446177153079" text:style-name="WWNum2">
        <text:list-item>
          <text:list>
            <text:list-item>
              <text:p text:style-name="P36"><text:bookmark text:name="_kjvzp8llg93o"/>Comando “ps”</text:p>
            </text:list-item>
          </text:list>
        </text:list-item>
      </text:list>
      <text:p text:style-name="P12">Similar al comando “<text:span text:style-name="T23">docker ps</text:span>”, solo que aplicado a los contenedores de la plantilla. El detalle de su funcionamiento y parámetros está definido en la siguiente dirección <text:a xlink:type="simple" xlink:href="https://docs.docker.com/compose/reference/ps/" text:style-name="ListLabel_20_19" text:visited-style-name="ListLabel_20_19"><text:span text:style-name="T25">https://docs.docker.com/compose/reference/ps/</text:span></text:a></text:p>
      <text:list xml:id="list65445715163225" text:continue-numbering="true" text:style-name="WWNum2">
        <text:list-item>
          <text:list>
            <text:list-item>
              <text:p text:style-name="P36"><text:bookmark text:name="_vo7rg3pndq31"/>Comando “exec”</text:p>
            </text:list-item>
          </text:list>
        </text:list-item>
      </text:list>
      <text:p text:style-name="P12">El comando “<text:span text:style-name="T23">exec</text:span>” es similar a “<text:span text:style-name="T23">docker exec</text:span>”. Nos permite ejecutar un comando los contenedores con una plantilla determinada. El detalle de su funcionamiento está definido en </text:p>
      <text:p text:style-name="P12"><text:a xlink:type="simple" xlink:href="https://docs.docker.com/compose/reference/exec/" text:style-name="ListLabel_20_19" text:visited-style-name="ListLabel_20_19"><text:span text:style-name="T25">https://docs.docker.com/compose/reference/exec/</text:span></text:a></text:p>
      <text:p text:style-name="P12"><text:span text:style-name="T29">Ejemplo</text:span>:</text:p>
      <table:table table:name="Table27" table:style-name="Table27">
        <table:table-column table:style-name="Table27.A"/>
        <table:table-row table:style-name="Table27.1">
          <table:table-cell table:style-name="Table27.A1" office:value-type="string">
            <text:p text:style-name="P32"><text:span text:style-name="T30">docker compose </text:span><text:span text:style-name="T33">exec</text:span><text:span text:style-name="T30"> db mariadb --version</text:span></text:p>
          </table:table-cell>
        </table:table-row>
      </table:table>
      <text:list xml:id="list65444976715947" text:continue-numbering="true" text:style-name="WWNum2">
        <text:list-item>
          <text:list>
            <text:list-item>
              <text:p text:style-name="P36"><text:bookmark text:name="_socshlxlf8xr"/>Comando “rm”</text:p>
            </text:list-item>
          </text:list>
        </text:list-item>
      </text:list>
      <text:p text:style-name="P12">El comando “<text:span text:style-name="T23">rm</text:span>” elimina todos los contenedores parados según la plantilla determinada en “<text:span text:style-name="T23">docker-compose.yml</text:span>”. El detalle de su funcionamiento está definido en <text:a xlink:type="simple" xlink:href="https://docs.docker.com/compose/reference/rm/" text:style-name="ListLabel_20_19" text:visited-style-name="ListLabel_20_19"><text:span text:style-name="T25">https://docs.docker.com/compose/reference/rm/</text:span></text:a> </text:p>
      <text:list xml:id="list65444350704591" text:continue-numbering="true" text:style-name="WWNum2">
        <text:list-item>
          <text:p text:style-name="P35"><text:bookmark text:name="_40h3y9oo6b45"/>Bibliografía</text:p>
        </text:list-item>
      </text:list>
      <text:p text:style-name="P9"><text:soft-page-break/>[1] Docker Docs <text:a xlink:type="simple" xlink:href="https://docs.docker.com/" text:style-name="ListLabel_20_19" text:visited-style-name="ListLabel_20_19"><text:span text:style-name="T25">https://docs.docker.com/</text:span></text:a></text:p>
      <text:p text:style-name="P9">[2] Docker Compose <text:a xlink:type="simple" xlink:href="https://docs.docker.com/compose/" text:style-name="ListLabel_20_19" text:visited-style-name="ListLabel_20_19"><text:span text:style-name="T25">https://docs.docker.com/compos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y Kubernetes <text:tab/><text:tab/>UD06. Docker Compose</text:span></text:p>
      </style:header>
      <style:footer>
        <text:p text:style-name="MP4"><text:span text:style-name="MT1">Curso Introducción a Docker y Kubernetes<text:tab/><text:tab/>UD06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7" meta:image-count="5" meta:object-count="0" meta:page-count="5" meta:paragraph-count="202" meta:word-count="2523" meta:character-count="18594" meta:non-whitespace-character-count="15968"/>
    <meta:generator>LibreOfficeDev/6.0.5.2$Linux_X86_64 LibreOffice_project/</meta:generator>
  </office:meta>
</office:document-meta>
</file>