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C0000033AC9838D1AEFB35EBC.png" manifest:media-type="image/png"/>
  <manifest:file-entry manifest:full-path="Pictures/10000201000004C3000000961FB82D977D77343E.png" manifest:media-type="image/png"/>
  <manifest:file-entry manifest:full-path="Pictures/10000201000004DB0000005F5A96F50D36AE61ED.png" manifest:media-type="image/png"/>
  <manifest:file-entry manifest:full-path="Pictures/10000201000003AE0000004C7288E3B9C4C24882.png" manifest:media-type="image/png"/>
  <manifest:file-entry manifest:full-path="Pictures/10000201000004EB0000009AF2BDEBA6804D6DC0.png" manifest:media-type="image/png"/>
  <manifest:file-entry manifest:full-path="Pictures/10000201000004E8000000AE5AE02B74BADD27D4.png" manifest:media-type="image/png"/>
  <manifest:file-entry manifest:full-path="Pictures/100002010000007600000029ABF5F7A91F7A9EF9.png" manifest:media-type="image/png"/>
  <manifest:file-entry manifest:full-path="Pictures/10000201000001F600000049BC4E44B5FE80419A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text-align="center" style:justify-single-word="false" fo:break-before="auto" fo:break-after="auto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9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30" style:family="paragraph" style:parent-style-name="Standard" style:list-style-name="WWNum2">
      <style:paragraph-properties fo:margin-left="1in" fo:margin-right="0in" fo:text-indent="-0.25in" style:auto-text-indent="false" fo:break-before="auto" fo:break-after="auto"/>
    </style:style>
    <style:style style:name="P31" style:family="paragraph" style:parent-style-name="Heading_20_1" style:list-style-name="WWNum1">
      <style:paragraph-properties fo:break-before="auto" fo:break-after="auto"/>
    </style:style>
    <style:style style:name="P32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33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fo:font-size="9pt" fo:font-weight="bold" style:font-size-asian="9pt" style:font-weight-asian="bold" style:font-size-complex="9pt" style:font-weight-complex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size="9pt" fo:font-weight="bold" style:font-size-asian="9pt" style:font-weight-asian="bold" style:font-size-complex="9pt" style:font-weight-complex="bold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 style:font-style-complex="italic"/>
    </style:style>
    <style:style style:name="T20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 style:font-style-complex="italic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color="#333333" style:font-name="Consolas" fo:font-weight="bold" fo:background-color="#f8f8f8" loext:char-shading-value="0" style:font-name-asian="Consolas1" style:font-weight-asian="bold" style:font-name-complex="Consolas1" style:font-weight-complex="bold"/>
    </style:style>
    <style:style style:name="T23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4" style:family="text">
      <style:text-properties fo:color="#008080" style:font-name="Consolas" fo:background-color="#f8f8f8" loext:char-shading-value="0" style:font-name-asian="Consolas1" style:font-name-complex="Consolas1"/>
    </style:style>
    <style:style style:name="T25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6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7" style:family="text">
      <style:text-properties fo:color="#dd1144" style:font-name="Consolas" fo:background-color="#f8f8f8" loext:char-shading-value="0" style:font-name-asian="Consolas1" style:font-name-complex="Consolas1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style:text-underline-style="none"/>
    </style:style>
    <style:style style:name="T30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bookmark text:name="_aczyuw2yex2w"/><text:span text:style-name="T1">Introducción a Docker y Kubernetes</text:span><text:span text:style-name="T2"><text:line-break/></text:span><text:span text:style-name="T3">UD 06. Caso práctico 02 - Django con Docker Compose</text:span></text:p>
      <text:p text:style-name="P1"><draw:frame draw:style-name="fr1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><draw:frame draw:style-name="fr1" draw:name="image9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4"/>
      <text:p text:style-name="P5"><text:span text:style-name="T5">Autor: Sergi García Barea</text:span></text:p>
      <text:p text:style-name="P2"><text:span text:style-name="T5">Actualizado Enero 2026</text:span></text:p>
      <text:p text:style-name="P5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10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span text:style-name="T13">1. </text:span><text:a xlink:type="simple" xlink:href="#_dbh0n1vac4c8" text:style-name="Index_20_Link" text:visited-style-name="Index_20_Link"><text:span text:style-name="T17">Introducción</text:span></text:a><text:span text:style-name="T17"><text:tab/>3</text:span></text:p>
          <text:p text:style-name="P13"><text:span text:style-name="T13">2. </text:span><text:a xlink:type="simple" xlink:href="#_vyhbfp4t666x" text:style-name="Index_20_Link" text:visited-style-name="Index_20_Link"><text:span text:style-name="T17">Ficheros “Dockerfile” y “requirements.txt” del caso práctico</text:span></text:a><text:span text:style-name="T17"><text:tab/>3</text:span></text:p>
          <text:p text:style-name="P13"><text:span text:style-name="T13">3. </text:span><text:a xlink:type="simple" xlink:href="#_ejyez7bpu11s" text:style-name="Index_20_Link" text:visited-style-name="Index_20_Link"><text:span text:style-name="T17">Fichero “docker-compose.yml” del caso práctico</text:span></text:a><text:span text:style-name="T17"><text:tab/>3</text:span></text:p>
          <text:p text:style-name="P13"><text:span text:style-name="T13">4. </text:span><text:a xlink:type="simple" xlink:href="#_3b05p2f899fh" text:style-name="Index_20_Link" text:visited-style-name="Index_20_Link"><text:span text:style-name="T17">Paso 1: Poniendo en marcha el sistema</text:span></text:a><text:span text:style-name="T17"><text:tab/>4</text:span></text:p>
          <text:p text:style-name="P13"><text:span text:style-name="T13">5. </text:span><text:a xlink:type="simple" xlink:href="#_af8o4jtq1igj" text:style-name="Index_20_Link" text:visited-style-name="Index_20_Link"><text:span text:style-name="T17">Paso 2: Creando proyecto Django y conectando a la base de datos</text:span></text:a><text:span text:style-name="T17"><text:tab/>5</text:span></text:p>
          <text:p text:style-name="P13"><text:span text:style-name="T13">6. </text:span><text:a xlink:type="simple" xlink:href="#_z42tus8s8rh0" text:style-name="Index_20_Link" text:visited-style-name="Index_20_Link"><text:span text:style-name="T17">Paso 3: Reiniciando el sistema</text:span></text:a><text:span text:style-name="T17"><text:tab/>5</text:span></text:p>
          <text:p text:style-name="P14"><text:span text:style-name="T13">7. </text:span><text:a xlink:type="simple" xlink:href="#_aktea99seyu7" text:style-name="Index_20_Link" text:visited-style-name="Index_20_Link"><text:span text:style-name="T17">Bibliografía</text:span></text:a><text:span text:style-name="T17"><text:tab/>7</text:span></text:p>
        </text:index-body>
      </text:table-of-content>
      <text:p text:style-name="P15"/>
      <text:p text:style-name="P15"/>
      <text:p text:style-name="P17"><text:span text:style-name="T14">UD06. Caso práctico 02</text:span></text:p>
      <text:list xml:id="list1036887689" text:style-name="WWNum1">
        <text:list-item>
          <text:p text:style-name="P31"><text:bookmark text:name="_dbh0n1vac4c8"/>Introducción</text:p>
        </text:list-item>
      </text:list>
      <text:p text:style-name="P10">En este caso práctico vamos a poner en marcha un servidor web en Python con Django, conectado a una base de datos PostgreSQL. Construiremos la imagen del servidor a partir de un Dockerfile y estableceremos que tenga persistencia tanto el código de la aplicación como el contenido de la base de datos.</text:p>
      <text:list xml:id="list41539985634411" text:continue-numbering="true" text:style-name="WWNum1">
        <text:list-item>
          <text:p text:style-name="P32"><text:bookmark text:name="_vyhbfp4t666x"/>Ficheros “Dockerfile” y “requirements.txt” del caso práctico</text:p>
        </text:list-item>
      </text:list>
      <text:p text:style-name="P10">El contenido del fichero “<text:span text:style-name="T18">Dockerfile</text:span>” que incluimos comentado, es el siguiente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><text:span text:style-name="T19">#Imagen base</text:span><text:span text:style-name="T21"><text:line-break/></text:span><text:span text:style-name="T22">FROM</text:span><text:span text:style-name="T21"> python:</text:span><text:span text:style-name="T24">3.7</text:span><text:span text:style-name="T21"><text:line-break/></text:span><text:span text:style-name="T19">#Definimos la variable de entorno PYTHONBUFFERED</text:span><text:span text:style-name="T21"><text:line-break/></text:span><text:span text:style-name="T22">ENV</text:span><text:span text:style-name="T21"> PYTHONUNBUFFERED=</text:span><text:span text:style-name="T24">1</text:span><text:span text:style-name="T21"><text:line-break/></text:span><text:span text:style-name="T19">#Establecemos como directorio de trabajo /code</text:span><text:span text:style-name="T21"><text:line-break/></text:span><text:span text:style-name="T22">WORKDIR</text:span><text:span text:style-name="T21"> /code<text:line-break/></text:span><text:span text:style-name="T19">#Copiamos requirements.txt del anfitrión a la imagen</text:span><text:span text:style-name="T21"><text:line-break/></text:span><text:span text:style-name="T22">COPY</text:span><text:span text:style-name="T21"> requirements.txt /code/<text:line-break/></text:span><text:span text:style-name="T19">#Instalamos las dependencias de Python indicadas en requirements</text:span><text:span text:style-name="T21"><text:line-break/></text:span><text:span text:style-name="T22">RUN</text:span><text:span text:style-name="T21"> pip install -r requirements.txt</text:span></text:p>
          </table:table-cell>
        </table:table-row>
      </table:table>
      <text:p text:style-name="P10"/>
      <text:p text:style-name="P10">Básicamente, este Dockerfile, a partir de la versión 3 de la imagen “<text:span text:style-name="T18">python</text:span>”, establece un directorio de trabajo (/code), copia del anfitrión “<text:span text:style-name="T18">requirements.txt</text:span>” (que contiene dependencias que deseamos instalar de Python) y las instala usando “pip”.</text:p>
      <text:p text:style-name="P10"/>
      <text:p text:style-name="P10">El contenido del fichero “<text:span text:style-name="T18">requirements.txt</text:span>” es el siguiente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<text:span text:style-name="T21">Django&gt;=</text:span><text:span text:style-name="T24">3.0</text:span><text:span text:style-name="T21">,&lt;</text:span><text:span text:style-name="T24">4.0</text:span><text:span text:style-name="T21"><text:line-break/>psycopg2-binary&gt;=</text:span><text:span text:style-name="T24">2.8</text:span></text:p>
          </table:table-cell>
        </table:table-row>
      </table:table>
      <text:p text:style-name="P10"/>
      <text:p text:style-name="P10">El resultado de construir esta imagen, será una imagen con Python 3, Django con una versión de la rama 3.X y la biblioteca psycopg2 con una versión superior o igual a la 2.8.</text:p>
      <text:list xml:id="list41539790903467" text:continue-numbering="true" text:style-name="WWNum1">
        <text:list-item>
          <text:p text:style-name="P32"><text:bookmark text:name="_ejyez7bpu11s"/>Fichero “docker-compose.yml” del caso práctico</text:p>
        </text:list-item>
      </text:list>
      <text:p text:style-name="P10">El contenido del fichero “<text:span text:style-name="T18">docker-compose.yml</text:span>” que incluimos comentado, es el siguiente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3"><text:span text:style-name="T20">#Versión del fichero docker-compose 3.9. No obligatorio desde la versión de docker-compose 1.27.0</text:span><text:span text:style-name="T23"><text:line-break/>version: </text:span><text:span text:style-name="T26">"3.9"</text:span><text:span text:style-name="T23"><text:line-break/><text:line-break/></text:span><text:span text:style-name="T20">#Indicamos los servicios</text:span><text:span text:style-name="T23"><text:line-break/>services:<text:line-break/> <text:s/></text:span><text:span text:style-name="T20">#Base de datos</text:span><text:span text:style-name="T23"><text:line-break/> <text:s/>db:<text:line-break/><text:tab/></text:span><text:span text:style-name="T20">#Se basa en Postgres</text:span><text:span text:style-name="T23"><text:line-break/><text:tab/>image: postgres<text:line-break/><text:tab/></text:span><text:span text:style-name="T20">#Guarda la persistencia de la base de datos en el directorio</text:span><text:span text:style-name="T23"><text:line-break/><text:tab/></text:span><text:span text:style-name="T20">#./datos/db de donde lancemos Docker Compose</text:span><text:span text:style-name="T23"><text:line-break/><text:tab/>volumes:<text:line-break/> <text:s/><text:tab/>- ./datos/db:/var/lib/postgresql/data<text:line-break/><text:tab/></text:span><text:span text:style-name="T20">#Establece variables de entorno para indicar base de datos, usuario y password</text:span><text:span text:style-name="T23"><text:line-break/><text:tab/>environment:<text:line-break/> <text:s/><text:tab/>- POSTGRES_DB=postgres<text:line-break/> <text:s/><text:tab/>- POSTGRES_USER=postgres<text:line-break/> <text:s/><text:tab/>- POSTGRES_PASSWORD=postgres<text:line-break/> <text:s/></text:span><text:span text:style-name="T20">#Crea una aplicación web con Django</text:span><text:span text:style-name="T23"><text:line-break/> <text:s/>web:<text:line-break/><text:tab/></text:span><text:span text:style-name="T20">#Construye la imagen a partir de un Dockerfile del directorio actual</text:span><text:span text:style-name="T23"><text:line-break/><text:tab/>build: .<text:line-break/><text:tab/></text:span><text:span text:style-name="T20">#Comando por defecto al crear contenedor, lanzar manage.py para que</text:span><text:span text:style-name="T23"><text:line-break/><text:tab/></text:span><text:span text:style-name="T20">#lance el servidor web con Django en el puerto 8000</text:span><text:span text:style-name="T23"><text:line-break/><text:tab/>command: python manage.py runserver </text:span><text:span text:style-name="T25">0.0</text:span><text:span text:style-name="T23">.</text:span><text:span text:style-name="T25">0.0</text:span><text:span text:style-name="T23">:</text:span><text:span text:style-name="T25">8000</text:span><text:span text:style-name="T23"><text:line-break/><text:tab/></text:span><text:span text:style-name="T20">#Mapea el código del proyecto Django</text:span><text:span text:style-name="T23"><text:line-break/><text:tab/></text:span><text:span text:style-name="T20"># dentro de la carpeta ./codigo del anfitrión</text:span><text:span text:style-name="T23"><text:line-break/><text:tab/>volumes:<text:line-break/> <text:s/><text:tab/>- ./codigo:/code<text:line-break/><text:tab/></text:span><text:span text:style-name="T20">#Enlaza puerto 8000 de contenedor con puerto 8000 de anfitrión</text:span><text:span text:style-name="T23"><text:line-break/><text:tab/>ports:<text:line-break/> <text:s/><text:tab/>- </text:span><text:span text:style-name="T26">"8000:8000"</text:span><text:span text:style-name="T23"><text:line-break/><text:tab/></text:span><text:span text:style-name="T20">#Este contenedor depende de "db"</text:span><text:span text:style-name="T23"><text:line-break/><text:tab/>depends_on:<text:line-break/> <text:s/><text:tab/>- db</text:span></text:p>
          </table:table-cell>
        </table:table-row>
      </table:table>
      <text:p text:style-name="P10"/>
      <text:p text:style-name="P10">En este caso concreto, lo que estamos haciendo es:</text:p>
      <text:list xml:id="list211637488" text:style-name="WWNum2">
        <text:list-item>
          <text:p text:style-name="P24">Poner en marcha la base de datos.</text:p>
        </text:list-item>
        <text:list-item>
          <text:p text:style-name="P26">Enlazar la persistencia de la base de datos a la carpeta local “<text:span text:style-name="T18">./datos/db</text:span>”, que se creerá en el directorio local donde lancemos “<text:span text:style-name="T18">Docker Compose</text:span>”. </text:p>
        </text:list-item>
        <text:list-item>
          <text:p text:style-name="P26">Crear una imagen a partir del “<text:span text:style-name="T18">Dockerfile</text:span>” de nuestro directorio actual y una vez creada:</text:p>
          <text:list>
            <text:list-item>
              <text:p text:style-name="P29">Si se cumple la dependencia con “<text:span text:style-name="T18">db</text:span>”, lanzar un contenedor con dicha imagen.</text:p>
            </text:list-item>
            <text:list-item>
              <text:p text:style-name="P30">Establecer como comando de inicio del contenedor el comando para iniciar el servidor web Python con “<text:span text:style-name="T18">Django</text:span>”.</text:p>
            </text:list-item>
            <text:list-item>
              <text:p text:style-name="P30"><text:soft-page-break/>Enlazar la persistencia del código del servidor a una carpeta “<text:span text:style-name="T18">./codigo</text:span>” que se creará en el directorio local donde lancemos “<text:span text:style-name="T18">Docker Compose</text:span>”-</text:p>
            </text:list-item>
            <text:list-item>
              <text:p text:style-name="P30">Mapee puerto 8000 de contenedor con puerto 8000 del anfitrión.</text:p>
            </text:list-item>
          </text:list>
        </text:list-item>
      </text:list>
      <text:p text:style-name="P10"/>
      <text:list xml:id="list41540024088792" text:continue-list="list41539790903467" text:style-name="WWNum1">
        <text:list-item>
          <text:p text:style-name="P32"><text:bookmark text:name="_3b05p2f899fh"/>Paso 1: Poniendo en marcha el sistema</text:p>
        </text:list-item>
      </text:list>
      <text:p text:style-name="P10">Previamente a poner en marcha el sistema y de manera opcional, podemos usar el comando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3"><text:span text:style-name="T21">docker compose build</text:span></text:p>
          </table:table-cell>
        </table:table-row>
      </table:table>
      <text:p text:style-name="P10">para que construya la imagen del Dockerfile previamente a lanzar el servicio, obteniendo:</text:p>
      <text:p text:style-name="P10"><draw:frame draw:style-name="fr1" draw:name="image4.png" text:anchor-type="as-char" svg:width="6.6929in" svg:height="0.9307in" draw:z-index="0"><draw:image xlink:href="Pictures/10000201000004E8000000AE5AE02B74BADD27D4.png" xlink:type="simple" xlink:show="embed" xlink:actuate="onLoad" loext:mime-type="image/png"/></draw:frame></text:p>
      <text:p text:style-name="P10">Sí queremos descargar imágenes ya creadas antes de poner en marcha el sistema, con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3"><text:span text:style-name="T21">docker compose pull</text:span></text:p>
          </table:table-cell>
        </table:table-row>
      </table:table>
      <text:p text:style-name="P10">Si las descargamos, obtenemos algo similar a:</text:p>
      <text:p text:style-name="P10"><draw:frame draw:style-name="fr1" draw:name="image8.png" text:anchor-type="as-char" svg:width="6.6929in" svg:height="0.8193in" draw:z-index="0"><draw:image xlink:href="Pictures/10000201000004EB0000009AF2BDEBA6804D6DC0.png" xlink:type="simple" xlink:show="embed" xlink:actuate="onLoad" loext:mime-type="image/png"/></draw:frame></text:p>
      <text:p text:style-name="P10">Para poner en marcha el sistema, simplemente nos situamos en el directorio donde tengamos el fichero “<text:span text:style-name="T18">docker-compose.yml</text:span>” de este caso práctico y escribimos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2"><text:span text:style-name="T21">docker compose up -d</text:span></text:p>
          </table:table-cell>
        </table:table-row>
      </table:table>
      <text:p text:style-name="P10">La opción “<text:span text:style-name="T18">-d</text:span>” indica que “<text:span text:style-name="T18">Docker Compose</text:span>” se ejecute en segundo plano.</text:p>
      <text:p text:style-name="P10">La opción “<text:span text:style-name="T18">up</text:span>”, descarga y construye imágenes (si no estaban ya). Tras ello lanza los contenedores asociados, siguiendo orden de dependencia.</text:p>
      <text:p text:style-name="P10">Si todo ha ido bien, obtendremos un mensaje similar a este:</text:p>
      <text:p text:style-name="P11"><draw:frame draw:style-name="fr1" draw:name="image3.png" text:anchor-type="as-char" svg:width="5.2291in" svg:height="0.7602in" draw:z-index="0"><draw:image xlink:href="Pictures/10000201000001F600000049BC4E44B5FE80419A.png" xlink:type="simple" xlink:show="embed" xlink:actuate="onLoad" loext:mime-type="image/png"/></draw:frame></text:p>
      <text:list xml:id="list41539847295291" text:continue-numbering="true" text:style-name="WWNum1">
        <text:list-item>
          <text:p text:style-name="P32"><text:bookmark text:name="_af8o4jtq1igj"/>Paso 2: Creando proyecto Django y conectando a la base de datos</text:p>
        </text:list-item>
      </text:list>
      <text:p text:style-name="P10">Si tras el paso anterior, intentamos acceder a <text:a xlink:type="simple" xlink:href="http://localhost:8000" text:style-name="ListLabel_20_19" text:visited-style-name="ListLabel_20_19"><text:span text:style-name="T30">http://localhost:8000</text:span></text:a>, veremos que no se puede acceder. Eso es porque no se está sirviendo ningún proyecto Django y deberemos crear una base.</text:p>
      <text:p text:style-name="P10">Podremos crearla con el siguiente comando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3"><text:span text:style-name="T21">docker compose run web django-admin startproject ejemplodjango .</text:span></text:p>
          </table:table-cell>
        </table:table-row>
      </table:table>
      <text:p text:style-name="P10">En este comando las opciones indicadas son:</text:p>
      <text:list xml:id="list2396236129" text:style-name="WWNum3">
        <text:list-item>
          <text:p text:style-name="P25">“<text:span text:style-name="T18">run</text:span>” indica que ejecutaremos un comando.</text:p>
        </text:list-item>
        <text:list-item>
          <text:p text:style-name="P27">“<text:span text:style-name="T18">web</text:span>” indica para qué servicio es el comando.</text:p>
        </text:list-item>
        <text:list-item>
          <text:p text:style-name="P28">“<text:span text:style-name="T18">django-admin startproject ejemplodjango .</text:span>” es un comando que crea un proyecto con nombre “<text:span text:style-name="T18">ejemplodjango</text:span>” en el directorio actual del contenedor (indicado por “<text:span text:style-name="T18">.</text:span>”). Recordemos que el directorio actual es “<text:span text:style-name="T18">/code</text:span>”, que fue definido en el “<text:span text:style-name="T18">Dockerfile</text:span>”.</text:p>
        </text:list-item>
      </text:list>
      <text:p text:style-name="P10">Obtendremos algo similar a:</text:p>
      <text:p text:style-name="P10"><draw:frame draw:style-name="fr1" draw:name="image1.png" text:anchor-type="as-char" svg:width="6.6929in" svg:height="0.5417in" draw:z-index="0"><draw:image xlink:href="Pictures/10000201000003AE0000004C7288E3B9C4C24882.png" xlink:type="simple" xlink:show="embed" xlink:actuate="onLoad" loext:mime-type="image/png"/></draw:frame></text:p>
      <text:p text:style-name="P10">Tras esto aún no veremos nada, comentamos en el punto siguiente el porqué de esto y como solucionarlo.</text:p>
      <text:list xml:id="list41539390222295" text:continue-list="list41539847295291" text:style-name="WWNum1">
        <text:list-item>
          <text:p text:style-name="P32"><text:bookmark text:name="_z42tus8s8rh0"/>Paso 3: Reiniciando el sistema</text:p>
        </text:list-item>
      </text:list>
      <text:p text:style-name="P10">Si lanzamos el siguiente comando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3"><text:span text:style-name="T21">docker compose ps</text:span></text:p>
          </table:table-cell>
        </table:table-row>
      </table:table>
      <text:p text:style-name="P10">Observamos lo siguiente:</text:p>
      <text:p text:style-name="P11"><draw:frame draw:style-name="fr1" draw:name="image6.png" text:anchor-type="as-char" svg:width="6.6929in" svg:height="0.5138in" draw:z-index="0"><draw:image xlink:href="Pictures/10000201000004DB0000005F5A96F50D36AE61ED.png" xlink:type="simple" xlink:show="embed" xlink:actuate="onLoad" loext:mime-type="image/png"/></draw:frame></text:p>
      <text:p text:style-name="P10">Vemos que el servidor de la web no está en ejecución (está detenido). Eso es porque en el momento de lanzarlo no existía el proyecto Django y el comando por defecto del contenedor que habíamos definido en “<text:span text:style-name="T18">docker-compose.yml</text:span>” (“<text:span text:style-name="T18">python manage.py runserver 0.0.0.0:8000</text:span>”) no podía lanzarse, ya que “<text:span text:style-name="T18">manage.py</text:span>” no existía.</text:p>
      <text:p text:style-name="P10">Si ahora visitamos nuestro directorio “<text:span text:style-name="T18">/codigo</text:span>” del anfitrión, observamos que tenemos mapeado el proyecto Django ahí y podemos modificarlo desde nuestra máquina anfitriona.</text:p>
      <text:p text:style-name="P10">Como el usuario del contenedor es “<text:span text:style-name="T18">root</text:span>”, todos los ficheros mapeados pertenecen a “<text:span text:style-name="T18">root</text:span>”, pero podemos cambiarlos a un usuario local nuestro para facilitar la tarea con un comando similar a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3"><text:span text:style-name="T21">sudo chown -R </text:span><text:span text:style-name="T24">$USER</text:span><text:span text:style-name="T21">:</text:span><text:span text:style-name="T24">$USER</text:span><text:span text:style-name="T21"> ./codigo</text:span></text:p>
          </table:table-cell>
        </table:table-row>
      </table:table>
      <text:p text:style-name="P10">Al crear el proyecto, por defecto Django utiliza una base de datos <text:span text:style-name="T10">SQLite </text:span>en un fichero, por lo cual el servidor de bases de datos que hemos lanzado, no tiene ningún uso.</text:p>
      <text:p text:style-name="P10">Antes de relanzar el proyecto, podemos modificar el fichero “<text:span text:style-name="T18">./codigo/ejemplodjango/settings.py</text:span>” y comentar/eliminar la conexión a base de datos <text:span text:style-name="T10">SQLite </text:span>e indicar una conexión a la base de datos <text:span text:style-name="T10">PostgreSQL</text:span>. Para ello, el siguiente código lo comentaremos o eliminaremos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3"><text:span text:style-name="T21">DATABASES = {<text:line-break/><text:tab/></text:span><text:span text:style-name="T27">'default'</text:span><text:span text:style-name="T21">: {<text:line-break/> <text:s text:c="3"/><text:tab/></text:span><text:span text:style-name="T23"> <text:s text:c="3"/></text:span><text:span text:style-name="T27">'ENGINE'</text:span><text:span text:style-name="T21">: </text:span><text:span text:style-name="T27">'django.db.backends.sqlite3'</text:span><text:span text:style-name="T21">,<text:line-break/> <text:s text:c="3"/><text:tab/></text:span><text:span text:style-name="T23"> <text:s text:c="3"/></text:span><text:span text:style-name="T27">'NAME'</text:span><text:span text:style-name="T21">: BASE_DIR / </text:span><text:span text:style-name="T27">'db.sqlite3'</text:span><text:span text:style-name="T21">,<text:line-break/><text:tab/>}<text:line-break/>}</text:span></text:p>
          </table:table-cell>
        </table:table-row>
      </table:table>
      <text:p text:style-name="P10">y en su lugar colocaremos: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3"><text:span text:style-name="T21">DATABASES = {<text:line-break/><text:tab/></text:span><text:span text:style-name="T27">'default'</text:span><text:span text:style-name="T21">: {<text:line-break/> <text:s text:c="3"/><text:tab/></text:span><text:span text:style-name="T23"> <text:s text:c="3"/></text:span><text:span text:style-name="T27">'ENGINE'</text:span><text:span text:style-name="T21">: </text:span><text:span text:style-name="T27">'django.db.backends.postgresql'</text:span><text:span text:style-name="T21">,<text:line-break/> <text:s text:c="3"/><text:tab/></text:span><text:span text:style-name="T23"> <text:s text:c="3"/></text:span><text:span text:style-name="T27">'NAME'</text:span><text:span text:style-name="T21">: </text:span><text:span text:style-name="T27">'postgres'</text:span><text:span text:style-name="T21">,<text:line-break/> <text:s text:c="3"/><text:tab/></text:span><text:span text:style-name="T23"> <text:s text:c="3"/></text:span><text:span text:style-name="T27">'USER'</text:span><text:span text:style-name="T21">: </text:span><text:span text:style-name="T27">'postgres'</text:span><text:span text:style-name="T21">,<text:line-break/> <text:s text:c="3"/><text:tab/></text:span><text:span text:style-name="T23"> <text:s text:c="3"/></text:span><text:span text:style-name="T27">'PASSWORD'</text:span><text:span text:style-name="T21">: </text:span><text:span text:style-name="T27">'postgres'</text:span><text:span text:style-name="T21">,<text:line-break/> <text:s text:c="3"/><text:tab/></text:span><text:span text:style-name="T23"> <text:s text:c="3"/></text:span><text:span text:style-name="T27">'HOST'</text:span><text:span text:style-name="T21">: </text:span><text:span text:style-name="T27">'db'</text:span><text:span text:style-name="T21">,<text:line-break/> <text:s text:c="3"/><text:tab/></text:span><text:span text:style-name="T23"> <text:s text:c="3"/></text:span><text:span text:style-name="T27">'PORT'</text:span><text:span text:style-name="T21">: </text:span><text:span text:style-name="T24">5432</text:span><text:span text:style-name="T21">,<text:line-break/><text:tab/>}<text:line-break/>}</text:span></text:p>
          </table:table-cell>
        </table:table-row>
      </table:table>
      <text:p text:style-name="P10">Los datos de este fichero, deben coincidir con los indicados como variables de entorno que hemos colocado en “<text:span text:style-name="T18">docker-compose.yml</text:span>”.</text:p>
      <text:p text:style-name="P10">Tras este cambio, paramos el sistema y lo arrancamos de nuevo con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2"><text:span text:style-name="T21">docker compose down; docker compose up -d</text:span></text:p>
          </table:table-cell>
        </table:table-row>
      </table:table>
      <text:p text:style-name="P10">Podemos comprobar, que al existir ya el proyecto <text:span text:style-name="T10">Django</text:span>, el contenedor no está parado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2"><text:span text:style-name="T21">docker compose ps</text:span></text:p>
          </table:table-cell>
        </table:table-row>
      </table:table>
      <text:p text:style-name="P10">Y observamos que así es con algo similar a</text:p>
      <text:p text:style-name="P10"><draw:frame draw:style-name="fr1" draw:name="image5.png" text:anchor-type="as-char" svg:width="6.6929in" svg:height="0.8193in" draw:z-index="0"><draw:image xlink:href="Pictures/10000201000004C3000000961FB82D977D77343E.png" xlink:type="simple" xlink:show="embed" xlink:actuate="onLoad" loext:mime-type="image/png"/></draw:frame></text:p>
      <text:p text:style-name="P10"/>
      <text:p text:style-name="P10">Tras ello, accedemos a <text:a xlink:type="simple" xlink:href="http://localhost:8000" text:style-name="ListLabel_20_19" text:visited-style-name="ListLabel_20_19"><text:span text:style-name="T30">http://localhost:8000</text:span></text:a> y observamos que todo funciona adecuadamente:</text:p>
      <text:p text:style-name="P10"><draw:frame draw:style-name="fr1" draw:name="image7.png" text:anchor-type="as-char" svg:width="6.6929in" svg:height="3.8472in" draw:z-index="0"><draw:image xlink:href="Pictures/100002010000059C0000033AC9838D1AEFB35EBC.png" xlink:type="simple" xlink:show="embed" xlink:actuate="onLoad" loext:mime-type="image/png"/></draw:frame></text:p>
      <text:p text:style-name="P10"/>
      <text:p text:style-name="P10"><text:soft-page-break/>Finalmente, recordar que la persistencia de la base de datos la tenemos enlazada a nuestro directorio “<text:span text:style-name="T18">./datos/bd</text:span>” y el código que podemos manipular dentro de “<text:span text:style-name="T18">./codigo</text:span>”.</text:p>
      <text:list xml:id="list41540560675853" text:continue-numbering="true" text:style-name="WWNum1">
        <text:list-item>
          <text:p text:style-name="P32"><text:bookmark text:name="_aktea99seyu7"/>Bibliografía</text:p>
        </text:list-item>
      </text:list>
      <text:p text:style-name="P8">[1] Docker Docs <text:a xlink:type="simple" xlink:href="https://docs.docker.com/" text:style-name="ListLabel_20_19" text:visited-style-name="ListLabel_20_19"><text:span text:style-name="T30">https://docs.docker.com/</text:span></text:a></text:p>
      <text:p text:style-name="P8">[2] Docker Compose Docs <text:a xlink:type="simple" xlink:href="https://docs.docker.com/compose/" text:style-name="ListLabel_20_19" text:visited-style-name="ListLabel_20_19"><text:span text:style-name="T30">https://docs.docker.com/compose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y Kubernetes<text:tab/><text:tab/>UD06. Caso práctico 02</text:span></text:p>
      </style:header>
      <style:footer>
        <text:p text:style-name="MP4"><text:span text:style-name="MT1">Curso Introducción a Docker<text:tab/><text:tab/>UD06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3" meta:image-count="10" meta:object-count="0" meta:page-count="3" meta:paragraph-count="95" meta:word-count="1269" meta:character-count="8347" meta:non-whitespace-character-count="7049"/>
    <meta:generator>LibreOfficeDev/6.0.5.2$Linux_X86_64 LibreOffice_project/</meta:generator>
  </office:meta>
</office:document-meta>
</file>