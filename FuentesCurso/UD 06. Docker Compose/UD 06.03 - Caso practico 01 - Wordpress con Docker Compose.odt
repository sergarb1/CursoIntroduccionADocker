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30000006D9E7073114658E4C3.png" manifest:media-type="image/png"/>
  <manifest:file-entry manifest:full-path="Pictures/10000201000002900000006E4C4563D6BBDC9F70.png" manifest:media-type="image/png"/>
  <manifest:file-entry manifest:full-path="Pictures/100002010000059D0000022F6A6A2E16D1A406EF.png" manifest:media-type="image/png"/>
  <manifest:file-entry manifest:full-path="Pictures/10000201000003090000007039632694095EFE94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Heading_20_1" style:list-style-name="WWNum2">
      <style:paragraph-properties fo:break-before="auto" fo:break-after="auto"/>
    </style:style>
    <style:style style:name="P28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9pt" fo:font-weight="bold" style:font-size-asian="9pt" style:font-weight-asian="bold" style:font-size-complex="9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3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text-underline-style="none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 y Kubernetes</text:span><text:span text:style-name="T2"><text:line-break/></text:span><text:span text:style-name="T3">UD 06. Caso práctico 01 - Wordpress + MariaDB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 Barea</text:span></text:p>
      <text:p text:style-name="P2"><text:span text:style-name="T5">Actualizado Enero 2026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13">1. </text:span><text:a xlink:type="simple" xlink:href="#_dbh0n1vac4c8" text:style-name="Index_20_Link" text:visited-style-name="Index_20_Link"><text:span text:style-name="T17">Introducción</text:span></text:a><text:span text:style-name="T17"><text:tab/>3</text:span></text:p>
          <text:p text:style-name="P13"><text:span text:style-name="T13">2. </text:span><text:a xlink:type="simple" xlink:href="#_vyhbfp4t666x" text:style-name="Index_20_Link" text:visited-style-name="Index_20_Link"><text:span text:style-name="T17">Fichero “docker-compose.yml” del caso práctico</text:span></text:a><text:span text:style-name="T17"><text:tab/>3</text:span></text:p>
          <text:p text:style-name="P13"><text:span text:style-name="T13">3. </text:span><text:a xlink:type="simple" xlink:href="#_3b05p2f899fh" text:style-name="Index_20_Link" text:visited-style-name="Index_20_Link"><text:span text:style-name="T17">Paso 1: Poniendo en marcha el sistema</text:span></text:a><text:span text:style-name="T17"><text:tab/>4</text:span></text:p>
          <text:p text:style-name="P13"><text:span text:style-name="T13">4. </text:span><text:a xlink:type="simple" xlink:href="#_9p0xnot11ut4" text:style-name="Index_20_Link" text:visited-style-name="Index_20_Link"><text:span text:style-name="T17">Paso 2: Parando el sistema</text:span></text:a><text:span text:style-name="T17"><text:tab/>5</text:span></text:p>
          <text:p text:style-name="P13"><text:span text:style-name="T13">5. </text:span><text:a xlink:type="simple" xlink:href="#_i551rgm75761" text:style-name="Index_20_Link" text:visited-style-name="Index_20_Link"><text:span text:style-name="T17">Paso 3: Re-lanzando el sistema</text:span></text:a><text:span text:style-name="T17"><text:tab/>5</text:span></text:p>
          <text:p text:style-name="P14"><text:span text:style-name="T13">6. </text:span><text:a xlink:type="simple" xlink:href="#_72yv1gty1dke" text:style-name="Index_20_Link" text:visited-style-name="Index_20_Link"><text:span text:style-name="T17">Bibliografía</text:span></text:a><text:span text:style-name="T17"><text:tab/>5</text:span></text:p>
        </text:index-body>
      </text:table-of-content>
      <text:p text:style-name="P15"/>
      <text:p text:style-name="P15"/>
      <text:p text:style-name="P17"><text:span text:style-name="T14">UD06. Caso práctico 01</text:span></text:p>
      <text:list xml:id="list2147335868" text:style-name="WWNum2">
        <text:list-item>
          <text:p text:style-name="P27"><text:bookmark text:name="_dbh0n1vac4c8"/>Introducción</text:p>
        </text:list-item>
      </text:list>
      <text:p text:style-name="P10">En este caso práctico vamos a poner en marcha el popular CMS Wordpress. Para ello usaremos un fichero “<text:span text:style-name="T18">docker-compose.yml</text:span>” comentado que nos pondrá en marcha dos contenedores: el primero utilizando “<text:span text:style-name="T18">Apache + PHP</text:span>”, junto con una versión instalada de <text:span text:style-name="T10">Wordpress</text:span>, mientras que el segundo contendrá un servidor de bases de datos MariaDB. Este ejemplo es similar al propuesto como ejemplo durante el contenido de la unidad.</text:p>
      <text:list xml:id="list41453738961231" text:continue-numbering="true" text:style-name="WWNum2">
        <text:list-item>
          <text:p text:style-name="P28"><text:bookmark text:name="_vyhbfp4t666x"/>Fichero “docker-compose.yml” del caso práctico</text:p>
        </text:list-item>
      </text:list>
      <text:p text:style-name="P10">El contenido del fichero “<text:span text:style-name="T18">docker-compose.yml</text:span>” que incluimos comentado,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19">#Versión del fichero docker-compose 3.9. No obligatorio desde la versión de docker-compose 1.27.0</text:span><text:span text:style-name="T20"><text:line-break/>version: </text:span><text:span text:style-name="T22">"3.9"</text:span><text:span text:style-name="T20"><text:line-break/><text:line-break/></text:span><text:span text:style-name="T19">#Indicamos los servicios a lanzar</text:span><text:span text:style-name="T20"><text:line-break/>services:<text:line-break/> <text:s/></text:span><text:span text:style-name="T19">#Plantill del servicio "db"</text:span><text:span text:style-name="T20"><text:line-break/> <text:s/>db:<text:line-break/><text:tab/></text:span><text:span text:style-name="T19">#Se basa en la imagen "mariadb", version 10.11.2</text:span><text:span text:style-name="T20"><text:line-break/><text:tab/>image: </text:span><text:span text:style-name="T23">mariadb:10.11.2</text:span><text:span text:style-name="T20"><text:line-break/><text:tab/></text:span><text:span text:style-name="T19">#Mapea en el volumen "db_data" el directorio "/var/lib/mysql", lo que da persistencia al contenido de</text:span><text:span text:style-name="T20"><text:line-break/><text:tab/></text:span><text:span text:style-name="T19">#Wordpress almacenado en la base de datos</text:span><text:span text:style-name="T20"><text:line-break/><text:tab/>volumes:<text:line-break/> <text:s text:c="4"/><text:tab/>- db_data:/var/lib/mysql<text:line-break/><text:tab/></text:span><text:span text:style-name="T19">#Indica que siempre que el servicio finalice, se reiniciará</text:span><text:span text:style-name="T20"><text:line-break/><text:tab/>restart: always<text:line-break/><text:tab/></text:span><text:span text:style-name="T19">#Define un conjunto de variables de entorno para estos contenedores,</text:span><text:span text:style-name="T20"><text:line-break/><text:tab/></text:span><text:span text:style-name="T19">#indicando password de root de mariadb, nombre de base de datos,</text:span><text:span text:style-name="T20"><text:line-break/><text:tab/></text:span><text:span text:style-name="T19"># usuario con permisos root (necesario para conexiones remotas) y password de ese usuario</text:span><text:span text:style-name="T20"><text:line-break/><text:tab/>environment:<text:line-break/> <text:s text:c="4"/><text:tab/>MARIADB_ROOT_PASSWORD: somewordpress<text:line-break/> <text:s text:c="4"/><text:tab/>MARIADB_DATABASE: wordpress<text:line-break/> <text:s text:c="4"/><text:tab/>MARIADB_USER: wordpress<text:line-break/> <text:s text:c="4"/><text:tab/>MARIADB_PASSWORD: wordpress<text:line-break/> <text:s/></text:span><text:span text:style-name="T19">#Plantilla del servicio "wordpress"</text:span><text:span text:style-name="T20"><text:line-break/> <text:s/>wordpress:<text:line-break/><text:tab/></text:span><text:span text:style-name="T19">#Indicamos que para lanzar este servicio, debe estar en marcha "db"</text:span><text:span text:style-name="T20"><text:line-break/><text:tab/>depends_on:<text:line-break/> <text:s text:c="4"/><text:tab/>- db<text:line-break/><text:tab/></text:span><text:span text:style-name="T19">#Indicamos que basa en la imagen "wordpress", version "latest"</text:span><text:span text:style-name="T20"><text:line-break/><text:tab/>image: wordpress:latest<text:line-break/><text:tab/></text:span><text:span text:style-name="T19">#Indicamos que el puerto 80 del contenedor se mapea con el puerto 8000 del anfitrion</text:span><text:span text:style-name="T20"><text:line-break/><text:tab/>ports:<text:line-break/> <text:s text:c="4"/><text:tab/>- </text:span><text:span text:style-name="T22">"8000:80"</text:span><text:span text:style-name="T20"><text:line-break/><text:tab/></text:span><text:span text:style-name="T19">#Indica que siempre que el servicio finalice, se reiniciará</text:span><text:span text:style-name="T20"><text:line-break/><text:tab/>restart: always<text:line-break/><text:tab/></text:span><text:span text:style-name="T19">#Definimos “variables de entorno”. Definimos donde conectarnos a la base de datos,</text:span><text:span text:style-name="T20"><text:line-break/><text:tab/></text:span><text:span text:style-name="T19">#usuario de la base de datos, password de la base de datos y nombre de la base de datos</text:span><text:span text:style-name="T20"><text:line-break/><text:tab/>environment:<text:line-break/> <text:s text:c="4"/><text:tab/>WORDPRESS_DB_HOST: db:</text:span><text:span text:style-name="T23">3306</text:span><text:span text:style-name="T20"><text:line-break/> <text:s text:c="4"/><text:tab/>WORDPRESS_DB_USER: wordpress<text:line-break/> <text:s text:c="4"/><text:tab/>WORDPRESS_DB_PASSWORD: wordpress<text:line-break/> <text:s text:c="4"/><text:tab/>WORDPRESS_DB_NAME: wordpress<text:line-break/><text:tab/></text:span><text:span text:style-name="T19">#Indicamos los volúmenes creados y compartidos a lo largo del fichero docker-compose.yml</text:span><text:span text:style-name="T20"><text:line-break/>volumes:<text:line-break/> <text:s/>db_data:</text:span></text:p>
          </table:table-cell>
        </table:table-row>
      </table:table>
      <text:p text:style-name="P10">Este fichero se ha explicado en detalle de forma didáctica durante la unidad, pero aquí repasamos las claves más importantes:</text:p>
      <text:list xml:id="list2139902542" text:style-name="WWNum1">
        <text:list-item>
          <text:p text:style-name="P23">Indicamos que los servidores de bases de datos (“<text:span text:style-name="T18">db</text:span>”)</text:p>
          <text:list>
            <text:list-item>
              <text:p text:style-name="P25">Enlacen su información a un volumen, dotándolo de persistencia.</text:p>
            </text:list-item>
            <text:list-item>
              <text:p text:style-name="P25">Definan una serie de variables de entorno definiendo usuarios, contraseñas y bases de datos a usar.</text:p>
            </text:list-item>
          </text:list>
        </text:list-item>
        <text:list-item>
          <text:p text:style-name="P24">Indicamos que los servidores con Apache + PHP + Wordpress (“<text:span text:style-name="T18">wordpress</text:span>”):</text:p>
          <text:list>
            <text:list-item>
              <text:p text:style-name="P25">Para iniciarse, debe iniciarse antes un servicio “<text:span text:style-name="T18">db</text:span>”.</text:p>
            </text:list-item>
            <text:list-item>
              <text:p text:style-name="P25">Establece variables de entorno definiendo valores para la conexión de base de datos de Wordpress.</text:p>
            </text:list-item>
            <text:list-item>
              <text:p text:style-name="P26">Enlaza puerto 80 del contenedor a puerto 8000 del anfitrión.</text:p>
            </text:list-item>
          </text:list>
        </text:list-item>
      </text:list>
      <text:list xml:id="list41454530403605" text:continue-list="list41453738961231" text:style-name="WWNum2">
        <text:list-item>
          <text:p text:style-name="P28"><text:bookmark text:name="_3b05p2f899fh"/>Paso 1: Poniendo en marcha el sistema</text:p>
        </text:list-item>
      </text:list>
      <text:p text:style-name="P10">Para poner en marcha este sistema, simplemente nos situamos en el directorio donde tengamos el fichero “<text:span text:style-name="T18">docker-compose.yml</text:span>” de este caso práctico y escribimo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1">docker compose up -d</text:span></text:p>
          </table:table-cell>
        </table:table-row>
      </table:table>
      <text:p text:style-name="P10">La opción “<text:span text:style-name="T18">-d</text:span>” indica que “<text:span text:style-name="T18">Docker Compose</text:span>” se ejecute en segundo plano.</text:p>
      <text:p text:style-name="P10">La opción “<text:span text:style-name="T18">up</text:span>”, descarga y construye imágenes (si no estaban ya). Tras ello lanza los contenedores asociados, siguiendo orden de dependencia.</text:p>
      <text:p text:style-name="P10"/>
      <text:p text:style-name="P11"><draw:frame draw:style-name="fr1" draw:name="image2.png" text:anchor-type="as-char" svg:width="6.6929in" svg:height="0.9583in" draw:z-index="0"><draw:image xlink:href="Pictures/10000201000003090000007039632694095EFE94.png" xlink:type="simple" xlink:show="embed" xlink:actuate="onLoad" loext:mime-type="image/png"/></draw:frame></text:p>
      <text:p text:style-name="P10">Tras ello, podemos probar que todo es correcto accediendo a <text:a xlink:type="simple" xlink:href="http://localhost:8000" text:style-name="ListLabel_20_10" text:visited-style-name="ListLabel_20_10"><text:span text:style-name="T26">http://localhost:8000</text:span></text:a> donde veremos algo similar a:</text:p>
      <text:p text:style-name="P11"><text:soft-page-break/><draw:frame draw:style-name="fr1" draw:name="image5.png" text:anchor-type="as-char" svg:width="5.2807in" svg:height="2.0453in" draw:z-index="0"><draw:image xlink:href="Pictures/100002010000059D0000022F6A6A2E16D1A406EF.png" xlink:type="simple" xlink:show="embed" xlink:actuate="onLoad" loext:mime-type="image/png"/></draw:frame></text:p>
      <text:p text:style-name="P10">Y simplemente podremos proseguir a poner en marcha nuestro sitio Wordpress.</text:p>
      <text:list xml:id="list41454170144560" text:continue-numbering="true" text:style-name="WWNum2">
        <text:list-item>
          <text:p text:style-name="P28"><text:bookmark text:name="_9p0xnot11ut4"/>Paso 2: Parando el sistema</text:p>
        </text:list-item>
      </text:list>
      <text:p text:style-name="P10">Parar el sistema es tan sencillo como utilizar el comando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1">docker compose down</text:span></text:p>
          </table:table-cell>
        </table:table-row>
      </table:table>
      <text:p text:style-name="P11"><draw:frame draw:style-name="fr1" draw:name="image7.png" text:anchor-type="as-char" svg:width="6.6929in" svg:height="1.1252in" draw:z-index="0"><draw:image xlink:href="Pictures/10000201000002900000006E4C4563D6BBDC9F70.png" xlink:type="simple" xlink:show="embed" xlink:actuate="onLoad" loext:mime-type="image/png"/></draw:frame></text:p>
      <text:p text:style-name="P10">Con ello se pararán y eliminarán los contenedores. No se eliminarán ni las imágenes ni los volúmenes (el sistema Wordpress mantiene la persistencia, al tener mapeados la información de la base de datos a un volumen).</text:p>
      <text:list xml:id="list41455005619455" text:continue-numbering="true" text:style-name="WWNum2">
        <text:list-item>
          <text:p text:style-name="P28"><text:bookmark text:name="_i551rgm75761"/>Paso 3: Re-lanzando el sistema</text:p>
        </text:list-item>
      </text:list>
      <text:p text:style-name="P10">Relanzar el sistema es tan sencillo como volver a lanzar el comando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1">docker compose up -d</text:span></text:p>
          </table:table-cell>
        </table:table-row>
      </table:table>
      <text:p text:style-name="P11"><draw:frame draw:style-name="fr1" draw:name="image6.png" text:anchor-type="as-char" svg:width="6.6929in" svg:height="1.111in" draw:z-index="0"><draw:image xlink:href="Pictures/10000201000002930000006D9E7073114658E4C3.png" xlink:type="simple" xlink:show="embed" xlink:actuate="onLoad" loext:mime-type="image/png"/></draw:frame></text:p>
      <text:p text:style-name="P10">Observamos que el sistema aprovecha las imágenes ya creadas para acelerar el proceso de puesta en marcha, simplemente creando y lanzando los contenedores.</text:p>
      <text:list xml:id="list41453256205800" text:continue-numbering="true" text:style-name="WWNum2">
        <text:list-item>
          <text:p text:style-name="P28"><text:bookmark text:name="_72yv1gty1dke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26">https://docs.docker.com/</text:span></text:a></text:p>
      <text:p text:style-name="P8">[2] Docker Compose Docs <text:a xlink:type="simple" xlink:href="https://docs.docker.com/compose/" text:style-name="ListLabel_20_10" text:visited-style-name="ListLabel_20_10"><text:span text:style-name="T26">https://docs.docker.com/compose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Caso práctico 01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7" meta:object-count="0" meta:page-count="2" meta:paragraph-count="56" meta:word-count="772" meta:character-count="5180" meta:non-whitespace-character-count="4365"/>
    <meta:generator>LibreOfficeDev/6.0.5.2$Linux_X86_64 LibreOffice_project/</meta:generator>
  </office:meta>
</office:document-meta>
</file>