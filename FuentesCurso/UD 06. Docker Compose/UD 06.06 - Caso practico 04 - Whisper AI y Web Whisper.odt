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2DE9A0599EBD0F3EF2.png" manifest:media-type="image/png"/>
  <manifest:file-entry manifest:full-path="Pictures/100002010000007600000029ABF5F7A91F7A9EF9.png" manifest:media-type="image/png"/>
  <manifest:file-entry manifest:full-path="Pictures/10000201000004E7000000FA3C96DC93D5C50B72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6. Caso práctico 04 - Whisper AI y Web Whisper</text:span></text:p>
      <text:p text:style-name="P1"><draw:frame draw:style-name="fr1" draw:name="image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vyhbfp4t666x" text:style-name="Index_20_Link" text:visited-style-name="Index_20_Link"><text:span text:style-name="T13">2. Pasos a previos para poner en marcha Whisper AI y Whisper Web<text:tab/>3</text:span></text:a></text:p>
          <text:p text:style-name="P12"><text:a xlink:type="simple" xlink:href="#_iwctescm4nq0" text:style-name="Index_20_Link" text:visited-style-name="Index_20_Link"><text:span text:style-name="T13">3. Poniendo en marcha Whisper AI y Whisper Web<text:tab/>3</text:span></text:a></text:p>
          <text:p text:style-name="P12"><text:a xlink:type="simple" xlink:href="#_72yv1gty1dke" text:style-name="Index_20_Link" text:visited-style-name="Index_20_Link"><text:span text:style-name="T13">4. Bibliografía<text:tab/>3</text:span></text:a></text:p>
        </text:index-body>
      </text:table-of-content>
      <text:p text:style-name="Standard"/>
      <text:p text:style-name="P14"/>
      <text:p text:style-name="P15"><text:span text:style-name="T14">UD06. Caso práctico 04</text:span></text:p>
      <text:list xml:id="list3229825628" text:style-name="WWNum1">
        <text:list-item>
          <text:p text:style-name="P22"><text:bookmark text:name="_dbh0n1vac4c8"/>Introducción</text:p>
        </text:list-item>
      </text:list>
      <text:p text:style-name="P10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10">Whisper Web es una web, que proporciona una interfaz gráfica web para mandar audios a transcribir a Whisper AI. Su repositorio es <text:a xlink:type="simple" xlink:href="https://codeberg.org/pluja/web-whisper" text:style-name="ListLabel_20_1" text:visited-style-name="ListLabel_20_1"><text:span text:style-name="T17">https://codeberg.org/pluja/web-whisper</text:span></text:a> </text:p>
      <text:p text:style-name="P10">En este caso práctico vamos a poner en marcha una versión Dockerizada extraido de su repositorio siguiendo las instrucciones de <text:a xlink:type="simple" xlink:href="https://codeberg.org/pluja/web-whisper/wiki/Self-Hosting" text:style-name="ListLabel_20_1" text:visited-style-name="ListLabel_20_1"><text:span text:style-name="T17">https://codeberg.org/pluja/web-whisper/wiki/Self-Hosting</text:span></text:a></text:p>
      <text:list xml:id="list42349334053686" text:continue-numbering="true" text:style-name="WWNum1">
        <text:list-item>
          <text:p text:style-name="P23"><text:bookmark text:name="_vyhbfp4t666x"/>Pasos a previos para poner en marcha Whisper AI y Whisper Web</text:p>
        </text:list-item>
      </text:list>
      <text:p text:style-name="Standard">En el propio sitio web, nos piden que clonemos el repositorio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8">git </text:span><text:span text:style-name="T19">clone</text:span><text:span text:style-name="T18"> https://codeberg.org/pluja/web-whisper</text:span></text:p>
          </table:table-cell>
        </table:table-row>
      </table:table>
      <text:p text:style-name="P10"><text:span text:style-name="T10">Nota:</text:span> en el curso os proporcionamos el resultado de clonar este repositorio en un fichero .zip.</text:p>
      <text:p text:style-name="P10">Tras ello, copiamos el fichero de ejemplo a un “docker-compose.yml” con un comando similar 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cp example.docker-compose.yml docker-compose.yml</text:span></text:p>
          </table:table-cell>
        </table:table-row>
      </table:table>
      <text:p text:style-name="P10">Tras ello, también copiaremos y renombraremos el fichero “.env” de forma similar 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8">cp example.env .env</text:span></text:p>
          </table:table-cell>
        </table:table-row>
      </table:table>
      <text:p text:style-name="P10">Para adaptar la configuración, deberemos adaptar el fichero “.env”. Como adaptarlo se detalla en </text:p>
      <text:p text:style-name="P10"><text:a xlink:type="simple" xlink:href="https://codeberg.org/pluja/web-whisper/wiki/Self-Hosting#user-content-configuration" text:style-name="ListLabel_20_1" text:visited-style-name="ListLabel_20_1"><text:span text:style-name="T17">https://codeberg.org/pluja/web-whisper/wiki/Self-Hosting#user-content-configuration</text:span></text:a></text:p>
      <text:p text:style-name="P10">Pero con los parámetros con defecto, podemos tener un funcionamiento correcto.</text:p>
      <text:list xml:id="list42348815489165" text:continue-numbering="true" text:style-name="WWNum1">
        <text:list-item>
          <text:p text:style-name="P21"><text:bookmark text:name="_iwctescm4nq0"/>Poniendo en marcha Whisper AI y Whisper Web</text:p>
        </text:list-item>
      </text:list>
      <text:p text:style-name="P10">Una vez preparados los ficheros “docker-compose.yml” y “.env”, ejecut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8">docker compose up --build -d</text:span></text:p>
          </table:table-cell>
        </table:table-row>
      </table:table>
      <text:p text:style-name="P10">Obteniendo algo similar a:</text:p>
      <text:p text:style-name="P10"/>
      <text:p text:style-name="P10"><draw:frame draw:style-name="fr1" draw:name="image4.png" text:anchor-type="as-char" svg:width="6.6929in" svg:height="1.3335in" draw:z-index="0"><draw:image xlink:href="Pictures/10000201000004E7000000FA3C96DC93D5C50B72.png" xlink:type="simple" xlink:show="embed" xlink:actuate="onLoad" loext:mime-type="image/png"/></draw:frame></text:p>
      <text:p text:style-name="P10">Cuando haya finalizado, tendremos Whisper Web con Whisper AI funcionando en <text:a xlink:type="simple" xlink:href="http://localhost:3000" text:style-name="ListLabel_20_1" text:visited-style-name="ListLabel_20_1"><text:span text:style-name="T17">http://localhost:3000</text:span></text:a> <text:s/>obteniendo algo similar a:</text:p>
      <text:p text:style-name="P11"><draw:frame draw:style-name="fr1" draw:name="image5.png" text:anchor-type="as-char" svg:width="6.6929in" svg:height="4.5417in" draw:z-index="0"><draw:image xlink:href="Pictures/10000201000003350000022DE9A0599EBD0F3EF2.png" xlink:type="simple" xlink:show="embed" xlink:actuate="onLoad" loext:mime-type="image/png"/></draw:frame></text:p>
      <text:list xml:id="list42349177984020" text:continue-numbering="true" text:style-name="WWNum1">
        <text:list-item>
          <text:p text:style-name="P23"><text:bookmark text:name="_72yv1gty1dke"/>Bibliografía</text:p>
        </text:list-item>
      </text:list>
      <text:p text:style-name="P8"><text:soft-page-break/>[1] Docker Docs <text:a xlink:type="simple" xlink:href="https://docs.docker.com/" text:style-name="ListLabel_20_1" text:visited-style-name="ListLabel_20_1"><text:span text:style-name="T17">https://docs.docker.com/</text:span></text:a></text:p>
      <text:p text:style-name="P8">[2] Docker Compose Docs <text:a xlink:type="simple" xlink:href="https://docs.docker.com/compose/" text:style-name="ListLabel_20_1" text:visited-style-name="ListLabel_20_1"><text:span text:style-name="T17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4</text:span></text:p>
      </style:header>
      <style:footer>
        <text:p text:style-name="MP4"><text:span text:style-name="MT1">Curso Introducción a Docker y Kubernetes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5" meta:object-count="0" meta:page-count="2" meta:paragraph-count="44" meta:word-count="398" meta:character-count="2722" meta:non-whitespace-character-count="2360"/>
    <meta:generator>LibreOfficeDev/6.0.5.2$Linux_X86_64 LibreOffice_project/</meta:generator>
  </office:meta>
</office:document-meta>
</file>