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F0000008DBDEA165DBEF3B9DD.png" manifest:media-type="image/png"/>
  <manifest:file-entry manifest:full-path="Pictures/100002010000059D0000008DEFF6A591F46BA7A6.png" manifest:media-type="image/png"/>
  <manifest:file-entry manifest:full-path="Pictures/10000201000004E9000000AC23CF6BAE83932BBF.png" manifest:media-type="image/png"/>
  <manifest:file-entry manifest:full-path="Pictures/100000000000059F00000091E133FA0B7542E01B.png" manifest:media-type="image/png"/>
  <manifest:file-entry manifest:full-path="Pictures/10000201000004EA000000E67A7DE4484DD3A9C7.png" manifest:media-type="image/png"/>
  <manifest:file-entry manifest:full-path="Pictures/100002010000059F0000009024E3736F6F415AEB.png" manifest:media-type="image/png"/>
  <manifest:file-entry manifest:full-path="Pictures/100002010000059F0000008AEE644C8356F917CB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start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Heading_20_1" style:list-style-name="WWNum2">
      <style:paragraph-properties fo:break-before="auto" fo:break-after="auto"/>
    </style:style>
    <style:style style:name="P28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9pt" fo:font-weight="bold" style:font-size-asian="9pt" style:font-weight-asian="bold" style:font-size-complex="9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5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8" style:family="text">
      <style:text-properties fo:color="#000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9" style:family="text">
      <style:text-properties fo:color="#000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0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1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3" style:family="text">
      <style:text-properties fo:color="#990000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text-underline-style="none"/>
    </style:style>
    <style:style style:name="T36" style:family="text">
      <style:text-properties fo:color="#1155cc"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 y Kubernetes</text:span><text:span text:style-name="T2"><text:line-break/></text:span><text:span text:style-name="T3">UD 06. Caso práctico 03 - Proxy Nginx y balanceo escalado con Docker Compose</text:span></text:p>
      <text:p text:style-name="P1"><draw:frame draw:style-name="fr1" draw:name="image9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8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Enero 2026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3">1. </text:span><text:a xlink:type="simple" xlink:href="#_dbh0n1vac4c8" text:style-name="Index_20_Link" text:visited-style-name="Index_20_Link"><text:span text:style-name="T17">Introducción</text:span></text:a><text:span text:style-name="T17"><text:tab/>3</text:span></text:p>
          <text:p text:style-name="P13"><text:span text:style-name="T17">2. </text:span><text:a xlink:type="simple" xlink:href="#_vyhbfp4t666x" text:style-name="Index_20_Link" text:visited-style-name="Index_20_Link"><text:span text:style-name="T17">Directorio “Apache”: ficheros “Dockerfile” e “index.php”</text:span></text:a><text:span text:style-name="T17"><text:tab/>3</text:span></text:p>
          <text:p text:style-name="P13"><text:span text:style-name="T17">3. </text:span><text:a xlink:type="simple" xlink:href="#_xu52i3hvtkkw" text:style-name="Index_20_Link" text:visited-style-name="Index_20_Link"><text:span text:style-name="T17">Fichero de configuración “./nginxproxy/nginx.conf”</text:span></text:a><text:span text:style-name="T17"><text:tab/>3</text:span></text:p>
          <text:p text:style-name="P13"><text:span text:style-name="T17">4. </text:span><text:a xlink:type="simple" xlink:href="#_pext87mvnrlq" text:style-name="Index_20_Link" text:visited-style-name="Index_20_Link"><text:span text:style-name="T17">Fichero de configuración “docker-compose.yml”</text:span></text:a><text:span text:style-name="T17"><text:tab/>4</text:span></text:p>
          <text:p text:style-name="P13"><text:span text:style-name="T17">5. </text:span><text:a xlink:type="simple" xlink:href="#_3b05p2f899fh" text:style-name="Index_20_Link" text:visited-style-name="Index_20_Link"><text:span text:style-name="T17">Paso 1: Poniendo en marcha el sistema</text:span></text:a><text:span text:style-name="T17"><text:tab/>4</text:span></text:p>
          <text:p text:style-name="P13"><text:span text:style-name="T17">6. </text:span><text:a xlink:type="simple" xlink:href="#_azyrdwgi0kv" text:style-name="Index_20_Link" text:visited-style-name="Index_20_Link"><text:span text:style-name="T17">Paso 2: Escalando localmente para aumentar nuevos servidores</text:span></text:a><text:span text:style-name="T17"><text:tab/>5</text:span></text:p>
          <text:p text:style-name="P14"><text:span text:style-name="T17">7. </text:span><text:a xlink:type="simple" xlink:href="#_72yv1gty1dke" text:style-name="Index_20_Link" text:visited-style-name="Index_20_Link"><text:span text:style-name="T17">Bibliografía</text:span></text:a><text:span text:style-name="T17"><text:tab/>5</text:span></text:p>
        </text:index-body>
      </text:table-of-content>
      <text:p text:style-name="P15"/>
      <text:p text:style-name="P15"/>
      <text:p text:style-name="P17"><text:span text:style-name="T14">UD06. Caso práctico 03</text:span></text:p>
      <text:list xml:id="list4288126691" text:style-name="WWNum2">
        <text:list-item>
          <text:p text:style-name="P27"><text:bookmark text:name="_dbh0n1vac4c8"/>Introducción</text:p>
        </text:list-item>
      </text:list>
      <text:p text:style-name="P10">En este caso práctico vamos a poner en marcha un sistema de balanceo de carga, aprovechando el propio escalado que nos brinda “<text:span text:style-name="T18">Docker Compose</text:span>”. Tendremos como punto de entrada un proxy utilizando “<text:span text:style-name="T18">Nginx</text:span>” y los encargados de servir las imágenes serán servidores “<text:span text:style-name="T18">Apache + PHP</text:span>”.</text:p>
      <text:list xml:id="list41903366730607" text:continue-numbering="true" text:style-name="WWNum2">
        <text:list-item>
          <text:p text:style-name="P28"><text:bookmark text:name="_vyhbfp4t666x"/>Directorio “Apache”: ficheros “Dockerfile” e “index.php”</text:p>
        </text:list-item>
      </text:list>
      <text:p text:style-name="P10">En este caso práctico, construiremos una imagen con un servidor web “<text:span text:style-name="T18">Apache + PHP</text:span>”. Para construirlo tenemos dos ficheros: “<text:span text:style-name="T18">Dockerfile</text:span>” e “<text:span text:style-name="T18">index.php</text:span>”. Aquí el contenido del primer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9">#Imagen base: PHP 7.2 con apache</text:span><text:span text:style-name="T21"><text:line-break/></text:span><text:span text:style-name="T22">FROM</text:span><text:span text:style-name="T21"> php:</text:span><text:span text:style-name="T26">7.2</text:span><text:span text:style-name="T21">-apache<text:line-break/></text:span><text:span text:style-name="T19">#Copiamos del anfitrión "index.php" a la imagen</text:span><text:span text:style-name="T21"><text:line-break/></text:span><text:span text:style-name="T22">COPY</text:span><text:span text:style-name="T21"> index.php /var/www/html/</text:span></text:p>
          </table:table-cell>
        </table:table-row>
      </table:table>
      <text:p text:style-name="P10">Este parte de una imagen base y simplemente copia del anfitrión el fichero “<text:span text:style-name="T18">index.php</text:span>” al directorio “<text:span text:style-name="T18">/var/www/html</text:span>” de la imagen.</text:p>
      <text:p text:style-name="P10">El contenido del fichero “<text:span text:style-name="T18">index.php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8">&lt;html&gt;</text:span><text:span text:style-name="T23"><text:line-break/> <text:s text:c="3"/></text:span><text:span text:style-name="T28">&lt;body&gt;</text:span><text:span text:style-name="T23"><text:line-break/> <text:s text:c="2"/><text:tab/> </text:span><text:span text:style-name="T28">&lt;h1&gt;</text:span><text:span text:style-name="T23">Servido por: Servidor con IP </text:span><text:span text:style-name="T30">&lt;?php</text:span><text:span text:style-name="T23"> </text:span><text:span text:style-name="T24">echo</text:span><text:span text:style-name="T23"> $_SERVER[</text:span><text:span text:style-name="T31">'SERVER_ADDR'</text:span><text:span text:style-name="T23">];</text:span><text:span text:style-name="T30">?&gt;</text:span><text:span text:style-name="T23"><text:line-break/> <text:s text:c="2"/><text:tab/> y hostname </text:span><text:span text:style-name="T30">&lt;?php</text:span><text:span text:style-name="T23"> </text:span><text:span text:style-name="T24">echo</text:span><text:span text:style-name="T23"> gethostname(); </text:span><text:span text:style-name="T30">?&gt;</text:span><text:span text:style-name="T28">&lt;/h1&gt;</text:span><text:span text:style-name="T23"><text:line-break/> <text:s text:c="3"/></text:span><text:span text:style-name="T28">&lt;/body&gt;</text:span><text:span text:style-name="T23"><text:line-break/></text:span><text:span text:style-name="T28">&lt;/html</text:span><text:span text:style-name="T23">&gt;</text:span></text:p>
          </table:table-cell>
        </table:table-row>
      </table:table>
      <text:p text:style-name="P10"/>
      <text:p text:style-name="P10">Básicamente, imprimirá la IP desde la que se sirve la petición y el hostname de la máquina que lo sirve (que en este caso, será el identificador Docker de la imagen).</text:p>
      <text:list xml:id="list41901780319271" text:continue-numbering="true" text:style-name="WWNum2">
        <text:list-item>
          <text:p text:style-name="P28"><text:bookmark text:name="_xu52i3hvtkkw"/>Fichero de configuración “./nginxproxy/nginx.conf”</text:p>
        </text:list-item>
      </text:list>
      <text:p text:style-name="P10">El fichero “<text:span text:style-name="T18">./nginxproxy/nginx.conf</text:span>” es un fichero que enlazaremos desde nuestro anfitrión con la imagen “<text:span text:style-name="T18">nginx</text:span>” que usaremos en “Docker Compose” y que nos permitirá configurar un proxy para tener un acceso común al sistema. Su contenido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9">user</text:span><text:span text:style-name="T25"> nginx;<text:line-break/></text:span><text:span text:style-name="T33">events</text:span><text:span text:style-name="T25"> {<text:line-break/><text:tab/></text:span><text:span text:style-name="T29">worker_connections</text:span><text:span text:style-name="T25"> <text:s text:c="2"/></text:span><text:span text:style-name="T27">1000</text:span><text:span text:style-name="T25">;<text:line-break/>}<text:line-break/></text:span><text:span text:style-name="T33">http</text:span><text:span text:style-name="T25"> {<text:line-break/> <text:s text:c="3"/><text:tab/></text:span><text:span text:style-name="T33">server</text:span><text:span text:style-name="T25"> {<text:line-break/> <text:s text:c="9"/><text:tab/></text:span><text:span text:style-name="T29">listen</text:span><text:span text:style-name="T25"> </text:span><text:span text:style-name="T27">4000</text:span><text:span text:style-name="T25">;<text:line-break/> <text:s text:c="9"/><text:tab/></text:span><text:span text:style-name="T29">location</text:span><text:span text:style-name="T25"> / {<text:line-break/> <text:s text:c="11"/><text:tab/></text:span><text:span text:style-name="T29">proxy_pass</text:span><text:span text:style-name="T25"> http://apache:80;<text:line-break/> <text:s text:c="9"/><text:tab/>}<text:line-break/> <text:s text:c="3"/><text:tab/>}<text:line-break/>}</text:span></text:p>
          </table:table-cell>
        </table:table-row>
      </table:table>
      <text:p text:style-name="P10">Este fichero indica que “<text:span text:style-name="T18">nginx</text:span>” escuchará en el puerto 4000 y hará de proxy con el host llamado “<text:span text:style-name="T18">apache</text:span>” en el puerto 80. El propio “<text:span text:style-name="T18">Docker Compose</text:span>” se encargará de que ese host “<text:span text:style-name="T18">apache</text:span>” se balancee entre las imágenes que escalemos.</text:p>
      <text:list xml:id="list41901997756218" text:continue-numbering="true" text:style-name="WWNum2">
        <text:list-item>
          <text:p text:style-name="P28"><text:bookmark text:name="_pext87mvnrlq"/>Fichero de configuración “docker-compose.yml”</text:p>
        </text:list-item>
      </text:list>
      <text:p text:style-name="P10">El contenido del fichero “<text:span text:style-name="T18">docker-compose.yml</text:span>” que incluimos comentado, es el siguiente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5">version: </text:span><text:span text:style-name="T32">"3.9"</text:span><text:span text:style-name="T25"><text:line-break/></text:span><text:span text:style-name="T20">#Versión del fichero docker-compose 3.9. No obligatorio desde la versión de docker-compose 1.27.0</text:span><text:span text:style-name="T25"><text:line-break/><text:line-break/></text:span><text:span text:style-name="T20">#Indicamos los servicios a lanzar</text:span><text:span text:style-name="T25"><text:line-break/>services:<text:line-break/> <text:s/></text:span><text:span text:style-name="T20">#Plantill del servicio "apache"</text:span><text:span text:style-name="T25"><text:line-break/> <text:s/>apache:<text:line-break/><text:tab/></text:span><text:span text:style-name="T20">#Lo construimos con el Dockerfile del directorio "apache"</text:span><text:span text:style-name="T25"><text:line-break/><text:tab/>build: ./apache<text:line-break/><text:tab/></text:span><text:span text:style-name="T20">#Indica que siempre que el servicio finalice, se reiniciará</text:span><text:span text:style-name="T25"><text:line-break/><text:tab/>restart: always<text:line-break/><text:tab/></text:span><text:span text:style-name="T20">#Expone el puerto 80 de cada contenedor creado</text:span><text:span text:style-name="T25"><text:line-break/><text:tab/>ports:<text:line-break/> <text:tab/>- </text:span><text:span text:style-name="T32">"80"</text:span><text:span text:style-name="T25"><text:line-break/><text:line-break/></text:span><text:span text:style-name="T20">#Plantilla de nginx</text:span><text:span text:style-name="T25"><text:line-break/> <text:s/>nginxproxy:<text:line-break/><text:tab/>image: nginx:latest<text:line-break/><text:tab/></text:span><text:span text:style-name="T20">#Mapeamos el fichero de configuración de nuestro anfitrión al contenedor</text:span><text:span text:style-name="T25"><text:line-break/><text:tab/>volumes:<text:line-break/> <text:s/><text:tab/>- ./nginxproxy/nginx.conf:/etc/nginx/nginx.conf:ro<text:line-break/><text:tab/></text:span><text:span text:style-name="T20">#Indicamos que depende de apache</text:span><text:span text:style-name="T25"><text:line-break/><text:tab/>depends_on:<text:line-break/> <text:s/><text:tab/>- apache<text:line-break/><text:tab/></text:span><text:span text:style-name="T20">#Enlaza el puerto 4000 del contenedor con el 4000 del anfitrión</text:span><text:span text:style-name="T25"><text:line-break/><text:tab/>ports:<text:line-break/> <text:s/><text:tab/>- </text:span><text:span text:style-name="T32">"4000:4000"</text:span></text:p>
          </table:table-cell>
        </table:table-row>
      </table:table>
      <text:p text:style-name="P10"/>
      <text:p text:style-name="P10">Este fichero realiza las siguientes acciones:</text:p>
      <text:list xml:id="list3734510281" text:style-name="WWNum1">
        <text:list-item>
          <text:p text:style-name="P23">Define la plantilla para Apache, indicando que su imagen debe construirse con un “Dockerfile” situado en el directorio “./apache”. Los contenedores con esta plantilla:</text:p>
          <text:list>
            <text:list-item>
              <text:p text:style-name="P25">Se reiniciará si se detienen.</text:p>
            </text:list-item>
            <text:list-item>
              <text:p text:style-name="P25">Tendrán expuesto el puerto 80.</text:p>
            </text:list-item>
          </text:list>
        </text:list-item>
        <text:list-item>
          <text:p text:style-name="P24">Define la plantilla “nginx”. Esta plantilla:</text:p>
          <text:list>
            <text:list-item>
              <text:p text:style-name="P25">Depende de al menos un contenedor “apache” funcionando. </text:p>
            </text:list-item>
            <text:list-item>
              <text:p text:style-name="P25"><text:soft-page-break/>Enlaza el fichero de configuración de “Nginx” desde al anfitrión-</text:p>
            </text:list-item>
            <text:list-item>
              <text:p text:style-name="P26">Mapea puerto 4000 del contenedor en 4000 del anfitrión.</text:p>
            </text:list-item>
          </text:list>
        </text:list-item>
      </text:list>
      <text:list xml:id="list41903040004458" text:continue-list="list41901997756218" text:style-name="WWNum2">
        <text:list-item>
          <text:p text:style-name="P28"><text:bookmark text:name="_3b05p2f899fh"/>Paso 1: Poniendo en marcha el sistema</text:p>
        </text:list-item>
      </text:list>
      <text:p text:style-name="P10">Podemos poner en marcha todo el sistema montado, simplemente con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1">docker compose up -d</text:span></text:p>
          </table:table-cell>
        </table:table-row>
      </table:table>
      <text:p text:style-name="P10">La opción “<text:span text:style-name="T18">-d</text:span>” indica que “<text:span text:style-name="T18">Docker Compose</text:span>” se ejecute en segundo plano.</text:p>
      <text:p text:style-name="P10">La opción “<text:span text:style-name="T18">up</text:span>”, descarga y construye imágenes (si no estaban ya). Tras ello lanza los contenedores asociados, siguiendo orden de dependencia.</text:p>
      <text:p text:style-name="P10"/>
      <text:p text:style-name="P10"/>
      <text:p text:style-name="P10"/>
      <text:p text:style-name="P10"/>
      <text:p text:style-name="P10">Si todo ha ido bien, el sistema comenzará a crear y descargar imágenes en orden de dependencia, obteniendo un mensaje similar a este:</text:p>
      <text:p text:style-name="P10"><draw:frame draw:style-name="fr1" draw:name="image7.png" text:anchor-type="as-char" svg:width="6.6929in" svg:height="1.222in" draw:z-index="0"><draw:image xlink:href="Pictures/10000201000004EA000000E67A7DE4484DD3A9C7.png" xlink:type="simple" xlink:show="embed" xlink:actuate="onLoad" loext:mime-type="image/png"/></draw:frame></text:p>
      <text:p text:style-name="P10">Una vez finalizado el sistema de puesta en marcha, podemos, probar que todo funciona OK accediendo a <text:a xlink:type="simple" xlink:href="http://localhost:4000" text:style-name="ListLabel_20_10" text:visited-style-name="ListLabel_20_10"><text:span text:style-name="T36">http://localhost:4000</text:span></text:a> donde observaremos algo similar a:</text:p>
      <text:p text:style-name="P11"><draw:frame draw:style-name="fr1" draw:name="image6.png" text:anchor-type="as-char" svg:width="6.6929in" svg:height="0.6807in" draw:z-index="0"><draw:image xlink:href="Pictures/100000000000059F00000091E133FA0B7542E01B.png" xlink:type="simple" xlink:show="embed" xlink:actuate="onLoad" loext:mime-type="image/png"/></draw:frame></text:p>
      <text:p text:style-name="P11">Este mensaje indica la IP y hostname (ID contenedor Docker) de la máquina que lo ha servido.</text:p>
      <text:p text:style-name="P11">En este caso, al haber realizado simplemente “<text:span text:style-name="T18">docker-compose up -d</text:span>” solo nos ha creado un servidor “<text:span text:style-name="T18">apache</text:span>”, por lo cual aunque recarguemos la página, obtendremos el mismo mensaje.</text:p>
      <text:list xml:id="list41903141736308" text:continue-numbering="true" text:style-name="WWNum2">
        <text:list-item>
          <text:p text:style-name="P28"><text:bookmark text:name="_azyrdwgi0kv"/>Paso 2: Escalando localmente para aumentar nuevos servidores</text:p>
        </text:list-item>
      </text:list>
      <text:p text:style-name="P10">Con el sistema en marcha y un contenedor lanzado, si aplicamos la siguiente orden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21">docker compose up -d --scale apache=4</text:span></text:p>
          </table:table-cell>
        </table:table-row>
      </table:table>
      <text:p text:style-name="P10">se añadirán 3 contenedores más “apache”, hasta un total de 4, de forma similar a:</text:p>
      <text:p text:style-name="P10"><draw:frame draw:style-name="fr1" draw:name="image10.png" text:anchor-type="as-char" svg:width="6.6929in" svg:height="0.9165in" draw:z-index="0"><draw:image xlink:href="Pictures/10000201000004E9000000AC23CF6BAE83932BBF.png" xlink:type="simple" xlink:show="embed" xlink:actuate="onLoad" loext:mime-type="image/png"/></draw:frame></text:p>
      <text:p text:style-name="P10">Si ahora accedemos a <text:a xlink:type="simple" xlink:href="http://localhost:4000" text:style-name="ListLabel_20_10" text:visited-style-name="ListLabel_20_10"><text:span text:style-name="T36">http://localhost:4000</text:span></text:a>, cada vez que recarguemos la página, obtendremos una IP y un hostname diferente, dependiendo de cuál de los 4 contenedores te sirva la petición.</text:p>
      <text:p text:style-name="P10"/>
      <text:p text:style-name="P10"><text:span text:style-name="T37">¿Cómo es esto posible, si no hemos especificado ni nombre de contenedor ni IP ni ningún otro dato? </text:span></text:p>
      <text:p text:style-name="P10">En este caso, “<text:span text:style-name="T18">Docker Compose</text:span>” se encarga que las peticiones al host “<text:span text:style-name="T18">apache</text:span>” (nombre que le hemos dado al servicio en el fichero “<text:span text:style-name="T18">docker-compose.yml</text:span>”) <text:s/>se repartan de forma transparente <text:s/>usando “round robin” entre los servidores escalados a partir de ese servicio.</text:p>
      <text:p text:style-name="P10">Aquí los 4 ejemplos según quien haya servido la petición.</text:p>
      <text:p text:style-name="P10"><draw:frame draw:style-name="fr1" draw:name="image2.png" text:anchor-type="as-char" svg:width="3.1547in" svg:height="0.2984in" draw:z-index="0"><draw:image xlink:href="Pictures/100002010000059F0000008AEE644C8356F917CB.png" xlink:type="simple" xlink:show="embed" xlink:actuate="onLoad" loext:mime-type="image/png"/></draw:frame><draw:frame draw:style-name="fr1" draw:name="image4.png" text:anchor-type="as-char" svg:width="3.2445in" svg:height="0.311in" draw:z-index="0"><draw:image xlink:href="Pictures/100002010000059D0000008DEFF6A591F46BA7A6.png" xlink:type="simple" xlink:show="embed" xlink:actuate="onLoad" loext:mime-type="image/png"/></draw:frame></text:p>
      <text:p text:style-name="P10"><draw:frame draw:style-name="fr1" draw:name="image5.png" text:anchor-type="as-char" svg:width="3.1138in" svg:height="0.3102in" draw:z-index="0"><draw:image xlink:href="Pictures/100002010000059F0000009024E3736F6F415AEB.png" xlink:type="simple" xlink:show="embed" xlink:actuate="onLoad" loext:mime-type="image/png"/></draw:frame><draw:frame draw:style-name="fr1" draw:name="image3.png" text:anchor-type="as-char" svg:width="3.1138in" svg:height="0.3063in" draw:z-index="0"><draw:image xlink:href="Pictures/100002010000059F0000008DBDEA165DBEF3B9DD.png" xlink:type="simple" xlink:show="embed" xlink:actuate="onLoad" loext:mime-type="image/png"/></draw:frame></text:p>
      <text:list xml:id="list41902658021757" text:continue-numbering="true" text:style-name="WWNum2">
        <text:list-item>
          <text:p text:style-name="P28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36">https://docs.docker.com/</text:span></text:a></text:p>
      <text:p text:style-name="P8">[2] Docker Compose Docs <text:a xlink:type="simple" xlink:href="https://docs.docker.com/compose/" text:style-name="ListLabel_20_10" text:visited-style-name="ListLabel_20_10"><text:span text:style-name="T36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3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0" meta:object-count="0" meta:page-count="2" meta:paragraph-count="71" meta:word-count="938" meta:character-count="6199" meta:non-whitespace-character-count="5220"/>
    <meta:generator>LibreOfficeDev/6.0.5.2$Linux_X86_64 LibreOffice_project/</meta:generator>
  </office:meta>
</office:document-meta>
</file>