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F000003021D5D901B35526F1D.png" manifest:media-type="image/png"/>
  <manifest:file-entry manifest:full-path="Pictures/1000020100000424000000DAB4D4EEBB0E4628C9.png" manifest:media-type="image/png"/>
  <manifest:file-entry manifest:full-path="Pictures/100002010000041E0000007E052F8FA46139C89E.png" manifest:media-type="image/png"/>
  <manifest:file-entry manifest:full-path="Pictures/10000201000001CE000001DB7A3519471F65B85B.png" manifest:media-type="image/png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7" style:family="paragraph" style:parent-style-name="Standard">
      <style:paragraph-properties fo:margin-left="0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text-align="center" style:justify-single-word="false" fo:break-before="auto" fo:break-after="auto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4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7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9" style:family="paragraph" style:parent-style-name="Heading_20_1" style:list-style-name="WWNum2">
      <style:paragraph-properties fo:break-before="auto" fo:break-after="auto"/>
    </style:style>
    <style:style style:name="P30" style:family="paragraph" style:parent-style-name="Heading_20_1" style:list-style-name="WWNum2">
      <style:paragraph-properties fo:text-align="justify" style:justify-single-word="false" fo:break-before="auto" fo:break-after="auto"/>
    </style:style>
    <style:style style:name="P31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color="#000000" style:text-underline-style="none" fo:font-weight="bold" style:font-weight-asian="bold" style:font-weight-complex="bold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1155cc" style:text-underline-style="solid" style:text-underline-width="auto" style:text-underline-color="font-color"/>
    </style:style>
    <style:style style:name="T19" style:family="text">
      <style:text-properties fo:color="#333333" style:font-name="Consolas" fo:font-size="9pt" fo:background-color="#f8f8f8" loext:char-shading-value="0" style:font-name-asian="Consolas1" style:font-size-asian="9pt" style:font-name-complex="Consolas1" style:font-size-complex="9pt"/>
    </style:style>
    <style:style style:name="T20" style:family="text">
      <style:text-properties fo:color="#333333" style:font-name="Consolas" fo:background-color="#f8f8f8" loext:char-shading-value="0" style:font-name-asian="Consolas1" style:font-name-complex="Consolas1"/>
    </style:style>
    <style:style style:name="T21" style:family="text">
      <style:text-properties fo:color="#0086b3" style:font-name="Consolas" fo:background-color="#f8f8f8" loext:char-shading-value="0" style:font-name-asian="Consolas1" style:font-name-complex="Consolas1"/>
    </style:style>
    <style:style style:name="T22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bookmark text:name="_aczyuw2yex2w"/><text:span text:style-name="T1">Introducción a Docker y Kubernetes</text:span><text:span text:style-name="T2"><text:line-break/></text:span><text:span text:style-name="T3">UD 07. Caso práctico 04 - cTop y Glances, monitores de Docker en consola</text:span></text:p>
      <text:p text:style-name="P1"><draw:frame draw:style-name="fr1" draw:name="image6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><draw:frame draw:style-name="fr1" draw:name="image1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4"/>
      <text:p text:style-name="P3"/>
      <text:p text:style-name="P5"/>
      <text:p text:style-name="P6"><text:span text:style-name="T5">Autor: Sergi García Barea</text:span></text:p>
      <text:p text:style-name="P6"><text:span text:style-name="T5">Actualizado Enero 2026</text:span></text:p>
      <text:p text:style-name="P6"><text:span text:style-name="T6">Licencia</text:span></text:p>
      <text:p text:style-name="P7"/>
      <text:p text:style-name="P8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4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><text:span text:style-name="T6">Nomenclatura</text:span></text:p>
      <text:p text:style-name="P9">A lo largo de este tema se utilizarán distintos símbolos para distinguir elementos importantes dentro del contenido. Estos símbolos son:</text:p>
      <text:p text:style-name="P9"/>
      <text:p text:style-name="P10"><text:span text:style-name="T9"><text:s/>📖 </text:span><text:span text:style-name="T10">Importante</text:span></text:p>
      <text:p text:style-name="P11"/>
      <text:p text:style-name="P10"><text:span text:style-name="T11"><text:s/>❕</text:span><text:span text:style-name="T12"> </text:span><text:span text:style-name="T10">Atención</text:span></text:p>
      <text:p text:style-name="P11"/>
      <text:p text:style-name="P10"><text:span text:style-name="T9"><text:s/>💬</text:span> <text:span text:style-name="T10">Interesant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a xlink:type="simple" xlink:href="#_dbh0n1vac4c8" text:style-name="Index_20_Link" text:visited-style-name="Index_20_Link"><text:span text:style-name="T13">1. Introducción<text:tab/>2</text:span></text:a></text:p>
          <text:p text:style-name="P13"><text:a xlink:type="simple" xlink:href="#_vyhbfp4t666x" text:style-name="Index_20_Link" text:visited-style-name="Index_20_Link"><text:span text:style-name="T13">2. Instalando “cTop”<text:tab/>3</text:span></text:a></text:p>
          <text:p text:style-name="P13"><text:a xlink:type="simple" xlink:href="#_2lq1cm5185i" text:style-name="Index_20_Link" text:visited-style-name="Index_20_Link"><text:span text:style-name="T13">3. Iniciando y utilizando “cTop”<text:tab/>3</text:span></text:a></text:p>
          <text:p text:style-name="P13"><text:a xlink:type="simple" xlink:href="#_g0kl6n10bud4" text:style-name="Index_20_Link" text:visited-style-name="Index_20_Link"><text:span text:style-name="T13">4. Instalando “Glances” y puesta en marcha<text:tab/>4</text:span></text:a></text:p>
          <text:p text:style-name="P13"><text:a xlink:type="simple" xlink:href="#_npb3xsf007ps" text:style-name="Index_20_Link" text:visited-style-name="Index_20_Link"><text:span text:style-name="T13">5. Bibliografía<text:tab/>4</text:span></text:a></text:p>
        </text:index-body>
      </text:table-of-content>
      <text:p text:style-name="P15"/>
      <text:p text:style-name="P16"><text:span text:style-name="T14">UD07. Caso práctico 04</text:span></text:p>
      <text:list xml:id="list2186384670" text:style-name="WWNum2">
        <text:list-item>
          <text:p text:style-name="P29"><text:bookmark text:name="_dbh0n1vac4c8"/>Introducción</text:p>
        </text:list-item>
      </text:list>
      <text:p text:style-name="P11">En este caso práctico vamos a tratar con dos herramientas de consola utilizadas para monitorizar información de nuestros contenedores Docker: “<text:span text:style-name="T17">cTop</text:span>” y “<text:span text:style-name="T17">Glances</text:span>”.</text:p>
      <text:list xml:id="list44617734312185" text:continue-numbering="true" text:style-name="WWNum2">
        <text:list-item>
          <text:p text:style-name="P30"><text:bookmark text:name="_vyhbfp4t666x"/>Instalando “cTop”</text:p>
        </text:list-item>
      </text:list>
      <text:p text:style-name="P11">En esta parte del caso práctico vamos a instalar y probar “<text:span text:style-name="T17">cTop</text:span>”, un monitor de contenedores Docker al estilo de “<text:span text:style-name="T17">Top</text:span>” para procesos. Además, incluye algunas ligeras utilidades para gestión de Docker desde consola. Su website oficial es <text:a xlink:type="simple" xlink:href="https://ctop.sh/" text:style-name="ListLabel_20_19" text:visited-style-name="ListLabel_20_19"><text:span text:style-name="T18">https://ctop.sh/</text:span></text:a>, que nos enlaza con su repositorio oficial de Github <text:a xlink:type="simple" xlink:href="https://github.com/bcicen/ctop" text:style-name="ListLabel_20_19" text:visited-style-name="ListLabel_20_19"><text:span text:style-name="T18">https://github.com/bcicen/ctop</text:span></text:a></text:p>
      <text:p text:style-name="P11"/>
      <text:p text:style-name="P11">En la sección de su web <text:a xlink:type="simple" xlink:href="https://github.com/bcicen/ctop#install" text:style-name="ListLabel_20_19" text:visited-style-name="ListLabel_20_19"><text:span text:style-name="T18">https://github.com/bcicen/ctop#install</text:span></text:a> se definen distintas formas de instalar “<text:span text:style-name="T17">cTop</text:span>”. En sistemas Linux recomendamos la siguiente:</text:p>
      <text:p text:style-name="P11"/>
      <text:p text:style-name="P11">En primer lugar, descargamos el comando en “<text:span text:style-name="T17">/usr/local/bin</text:span>”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1"><text:span text:style-name="T19">sudo wget https://github.com/bcicen/ctop/releases/download/v0.7.7/ctop-0.7.7-linux-amd64 -O /usr/local/bin/ctop</text:span></text:p>
          </table:table-cell>
        </table:table-row>
      </table:table>
      <text:p text:style-name="P11">y tras ello, damos permisos de ejecución al fichero descargado con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2"><text:span text:style-name="T20">sudo chmod +x /usr/</text:span><text:span text:style-name="T21">local</text:span><text:span text:style-name="T20">/bin/ctop</text:span></text:p>
          </table:table-cell>
        </table:table-row>
      </table:table>
      <text:p text:style-name="P11">“<text:span text:style-name="T17">cTop</text:span>” se instalará dentro de “<text:span text:style-name="T17">/usr/local/bin</text:span>”. En pantalla obtendremos algo similar a:</text:p>
      <text:p text:style-name="P12"><draw:frame draw:style-name="fr1" draw:name="image2.png" text:anchor-type="as-char" svg:width="4.1528in" svg:height="4.2693in" draw:z-index="0"><draw:image xlink:href="Pictures/10000201000001CE000001DB7A3519471F65B85B.png" xlink:type="simple" xlink:show="embed" xlink:actuate="onLoad" loext:mime-type="image/png"/></draw:frame></text:p>
      <text:list xml:id="list44616819641268" text:continue-numbering="true" text:style-name="WWNum2">
        <text:list-item>
          <text:p text:style-name="P30"><text:bookmark text:name="_2lq1cm5185i"/>Iniciando y utilizando “cTop”</text:p>
        </text:list-item>
      </text:list>
      <text:p text:style-name="P11">Para poner en marcha “<text:span text:style-name="T17">cTop</text:span>”, simplemente deberemos escribir lo siguiente en consola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2"><text:span text:style-name="T20">ctop</text:span></text:p>
          </table:table-cell>
        </table:table-row>
      </table:table>
      <text:p text:style-name="P11"><text:s/>y nos aparecerá una interfaz similar a esta mostrando contenedores en ejecución:</text:p>
      <text:p text:style-name="P11"><draw:frame draw:style-name="fr1" draw:name="image5.png" text:anchor-type="as-char" svg:width="6.6929in" svg:height="0.8055in" draw:z-index="0"><draw:image xlink:href="Pictures/100002010000041E0000007E052F8FA46139C89E.png" xlink:type="simple" xlink:show="embed" xlink:actuate="onLoad" loext:mime-type="image/png"/></draw:frame></text:p>
      <text:p text:style-name="P11">Para movernos entre los contenedores, utilizaremos los cursores teclado. Si pulsamos “intro” se nos mostrarán algunas opciones del contenedor seleccionado como se ve en la siguiente imágen:</text:p>
      <text:p text:style-name="P11"><draw:frame draw:style-name="fr1" draw:name="image7.png" text:anchor-type="as-char" svg:width="6.6929in" svg:height="1.3752in" draw:z-index="0"><draw:image xlink:href="Pictures/1000020100000424000000DAB4D4EEBB0E4628C9.png" xlink:type="simple" xlink:show="embed" xlink:actuate="onLoad" loext:mime-type="image/png"/></draw:frame></text:p>
      <text:p text:style-name="P11">Estas opciones permiten:</text:p>
      <text:list xml:id="list2981307688" text:style-name="WWNum1">
        <text:list-item>
          <text:p text:style-name="P23">Observar vista detallada del contenedor (single view).</text:p>
        </text:list-item>
        <text:list-item>
          <text:p text:style-name="P25">Observar logs del contenedor.</text:p>
        </text:list-item>
        <text:list-item>
          <text:p text:style-name="P25">Lanzar/Detener/pausar/reiniciar el contenedor.</text:p>
        </text:list-item>
        <text:list-item>
          <text:p text:style-name="P25">Lanzar una shell asociada a ese contenedor.</text:p>
        </text:list-item>
        <text:list-item>
          <text:p text:style-name="P27">Cancelar acción.</text:p>
        </text:list-item>
      </text:list>
      <text:p text:style-name="P11">Además de las citadas, algunas de las teclas más importantes son:</text:p>
      <text:list xml:id="list1583824162" text:style-name="WWNum3">
        <text:list-item>
          <text:p text:style-name="P24"><text:soft-page-break/><text:span text:style-name="T10">Tecla “s”:</text:span> nos permite elegir el criterio de ordenación de los contenedores mostrados.</text:p>
        </text:list-item>
        <text:list-item>
          <text:p text:style-name="P26"><text:span text:style-name="T10">Tecla “l”</text:span>: nos permite observar los logs del contenedor seleccionado.</text:p>
        </text:list-item>
        <text:list-item>
          <text:p text:style-name="P26"><text:span text:style-name="T10">Tecla “r” </text:span>: invierte el orden de los contenedores.</text:p>
        </text:list-item>
        <text:list-item>
          <text:p text:style-name="P26"><text:span text:style-name="T10">Tecla “f”:</text:span> permite filtrar contenedores por nombre.</text:p>
        </text:list-item>
        <text:list-item>
          <text:p text:style-name="P26"><text:span text:style-name="T10">Tecla “c”</text:span>: permite elegir qué columnas mostrar.</text:p>
        </text:list-item>
        <text:list-item>
          <text:p text:style-name="P28"><text:span text:style-name="T10">Tecla “a”</text:span>: permite mostrar/ocultar contenedores parados.</text:p>
        </text:list-item>
      </text:list>
      <text:list xml:id="list44617085975998" text:continue-list="list44616819641268" text:style-name="WWNum2">
        <text:list-item>
          <text:p text:style-name="P30"><text:bookmark text:name="_g0kl6n10bud4"/>Instalando “Glances” y puesta en marcha</text:p>
        </text:list-item>
      </text:list>
      <text:p text:style-name="P11">“<text:span text:style-name="T17">Glances</text:span>” es un monitor de recursos del sistema multiplataforma. Su documentación está disponible en <text:a xlink:type="simple" xlink:href="https://glances.readthedocs.io/en/latest/index.html" text:style-name="ListLabel_20_19" text:visited-style-name="ListLabel_20_19"><text:span text:style-name="T18">https://glances.readthedocs.io/en/latest/index.html</text:span></text:a>. </text:p>
      <text:p text:style-name="P11">Para instalar “<text:span text:style-name="T17">Glances</text:span>” en Ubuntu, sencillamente haremos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2"><text:span text:style-name="T20">sudo apt install glances</text:span></text:p>
          </table:table-cell>
        </table:table-row>
      </table:table>
      <text:p text:style-name="P11">Una vez instalado, accederemos simplemente ejecutando el siguiente comando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2"><text:span text:style-name="T20">glances</text:span></text:p>
          </table:table-cell>
        </table:table-row>
      </table:table>
      <text:p text:style-name="P11">Obtendremos un resultado similar a este, donde hay información del sistema, incluida información relacionada con los contenedores</text:p>
      <text:p text:style-name="P12"><draw:frame draw:style-name="fr1" draw:name="image3.png" text:anchor-type="as-char" svg:width="4.7571in" svg:height="2.5756in" draw:z-index="0"><draw:image xlink:href="Pictures/100002010000058F000003021D5D901B35526F1D.png" xlink:type="simple" xlink:show="embed" xlink:actuate="onLoad" loext:mime-type="image/png"/></draw:frame></text:p>
      <text:list xml:id="list44617205803071" text:continue-numbering="true" text:style-name="WWNum2">
        <text:list-item>
          <text:p text:style-name="P30"><text:bookmark text:name="_npb3xsf007ps"/>Bibliografía</text:p>
        </text:list-item>
      </text:list>
      <text:p text:style-name="P9">[1] Docker Docs <text:a xlink:type="simple" xlink:href="https://docs.docker.com/" text:style-name="ListLabel_20_19" text:visited-style-name="ListLabel_20_19"><text:span text:style-name="T18">https://docs.docker.com/</text:span></text:a></text:p>
      <text:p text:style-name="P9">[2] cTop <text:a xlink:type="simple" xlink:href="https://ctop.sh/" text:style-name="ListLabel_20_19" text:visited-style-name="ListLabel_20_19"><text:span text:style-name="T18">https://ctop.sh/</text:span></text:a> y <text:a xlink:type="simple" xlink:href="https://github.com/bcicen/ctop" text:style-name="ListLabel_20_19" text:visited-style-name="ListLabel_20_19"><text:span text:style-name="T18">https://github.com/bcicen/ctop</text:span></text:a> </text:p>
      <text:p text:style-name="P9">[3] Glances <text:a xlink:type="simple" xlink:href="https://glances.readthedocs.io" text:style-name="ListLabel_20_19" text:visited-style-name="ListLabel_20_19"><text:span text:style-name="T18">https://glances.readthedocs.io</text:span></text:a> 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y Kubernetes<text:tab/><text:tab/>UD07. Caso práctico 04</text:span></text:p>
      </style:header>
      <style:footer>
        <text:p text:style-name="MP4"><text:span text:style-name="MT1">Curso Introducción a Docker<text:tab/><text:tab/>UD07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7" meta:object-count="0" meta:page-count="2" meta:paragraph-count="63" meta:word-count="508" meta:character-count="3578" meta:non-whitespace-character-count="3133"/>
    <meta:generator>LibreOfficeDev/6.0.5.2$Linux_X86_64 LibreOffice_project/</meta:generator>
  </office:meta>
</office:document-meta>
</file>