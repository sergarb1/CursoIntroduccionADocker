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C00000356E0DA381E03BC7135.png" manifest:media-type="image/png"/>
  <manifest:file-entry manifest:full-path="Pictures/10000201000001B80000008DB187DADDE7A474CF.png" manifest:media-type="image/png"/>
  <manifest:file-entry manifest:full-path="Pictures/10000201000001A6000001AE3BB67C7F75FA3371.png" manifest:media-type="image/png"/>
  <manifest:file-entry manifest:full-path="Pictures/100002010000059F000000DFA562C94851214412.png" manifest:media-type="image/png"/>
  <manifest:file-entry manifest:full-path="Pictures/1000020100000535000003CC3954EE1EDF7B2554.png" manifest:media-type="image/png"/>
  <manifest:file-entry manifest:full-path="Pictures/10000201000003FA0000027B915CF4B402A4BFBA.png" manifest:media-type="image/png"/>
  <manifest:file-entry manifest:full-path="Pictures/100002010000007600000029ABF5F7A91F7A9EF9.png" manifest:media-type="image/png"/>
  <manifest:file-entry manifest:full-path="Pictures/100002010000059D00000351650B771D5174E684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text-align="start" style:justify-single-word="false" fo:break-before="auto" fo:break-after="auto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2" style:family="text">
      <style:text-properties fo:color="#999999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 y Kubernetes</text:span><text:span text:style-name="T2"><text:line-break/></text:span><text:span text:style-name="T3">UD 07. Caso práctico 01 - Desarrollando con Visual Studio Code en un contenedor</text:span></text:p>
      <text:p text:style-name="P1"><draw:frame draw:style-name="fr1" draw:name="image10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8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4"><text:span text:style-name="T5">Autor: Sergi García Barea</text:span></text:p>
      <text:p text:style-name="P4"><text:span text:style-name="T5">Actualizado Enero 2026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4"><text:span text:style-name="T14">2. </text:span><text:a xlink:type="simple" xlink:href="#_vyhbfp4t666x" text:style-name="Index_20_Link" text:visited-style-name="Index_20_Link"><text:span text:style-name="T9">Visual Studio Code y plugins para Docker</text:span></text:a><text:span text:style-name="T9"><text:tab/>3</text:span></text:p>
          <text:p text:style-name="P14"><text:span text:style-name="T14">3. </text:span><text:a xlink:type="simple" xlink:href="#_qvrem7ds00j7" text:style-name="Index_20_Link" text:visited-style-name="Index_20_Link"><text:span text:style-name="T9">Creando y editando aplicación en PHP dentro de un contenedor</text:span></text:a><text:span text:style-name="T9"><text:tab/>3</text:span></text:p>
          <text:p text:style-name="P15"><text:span text:style-name="T14">4. </text:span><text:a xlink:type="simple" xlink:href="#_72yv1gty1dke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16"/>
      <text:p text:style-name="P16"/>
      <text:p text:style-name="P18"><text:span text:style-name="T15">UD07. Caso práctico 01</text:span></text:p>
      <text:list xml:id="list381785975" text:style-name="WWNum1">
        <text:list-item>
          <text:p text:style-name="P25"><text:bookmark text:name="_dbh0n1vac4c8"/>Introducción</text:p>
        </text:list-item>
      </text:list>
      <text:p text:style-name="P10">En este caso práctico vamos a utilizar el editor multiplataforma “<text:span text:style-name="T18">Visual Studio Code</text:span>” junto con plugins relacionados con Docker para poder desarrollar una sencilla aplicación web en un contenedor.</text:p>
      <text:list xml:id="list43849992603361" text:continue-numbering="true" text:style-name="WWNum1">
        <text:list-item>
          <text:p text:style-name="P26"><text:bookmark text:name="_vyhbfp4t666x"/>Visual Studio Code y plugins para Docker</text:p>
        </text:list-item>
      </text:list>
      <text:p text:style-name="P10">Podemos descargar el editor “Visual Studio Code” en <text:a xlink:type="simple" xlink:href="https://code.visualstudio.com/" text:style-name="ListLabel_20_1" text:visited-style-name="ListLabel_20_1"><text:span text:style-name="T19">https://code.visualstudio.com/</text:span></text:a> y en sí no lo conocemos y queremos saber más, podemos acceder a <text:a xlink:type="simple" xlink:href="https://code.visualstudio.com/learn" text:style-name="ListLabel_20_1" text:visited-style-name="ListLabel_20_1"><text:span text:style-name="T19">https://code.visualstudio.com/learn</text:span></text:a></text:p>
      <text:p text:style-name="P10"/>
      <text:p text:style-name="P10">Al instalarlo, si detecta Docker instalado en el sistema, el propio editor nos sugerirá una serie de plugins. Estos plugins son los que se pueden ver en la imagen:</text:p>
      <text:p text:style-name="P10"/>
      <text:p text:style-name="P11"><draw:frame draw:style-name="fr1" draw:name="image1.png" text:anchor-type="as-char" svg:width="5.1181in" svg:height="3.1728in" draw:z-index="0"><draw:image xlink:href="Pictures/10000201000003FA0000027B915CF4B402A4BFBA.png" xlink:type="simple" xlink:show="embed" xlink:actuate="onLoad" loext:mime-type="image/png"/></draw:frame></text:p>
      <text:p text:style-name="P10">Los plugins recomendados son:</text:p>
      <text:p text:style-name="P10"><text:a xlink:type="simple" xlink:href="https://marketplace.visualstudio.com/items?itemName=ms-azuretools.vscode-docker" text:style-name="ListLabel_20_1" text:visited-style-name="ListLabel_20_1"><text:span text:style-name="T19">https://marketplace.visualstudio.com/items?itemName=ms-azuretools.vscode-docker</text:span></text:a></text:p>
      <text:p text:style-name="P10"><text:a xlink:type="simple" xlink:href="https://marketplace.visualstudio.com/items?itemName=ms-vscode-remote.remote-containers" text:style-name="ListLabel_20_1" text:visited-style-name="ListLabel_20_1"><text:span text:style-name="T19">https://marketplace.visualstudio.com/items?itemName=ms-vscode-remote.remote-containers</text:span></text:a></text:p>
      <text:p text:style-name="P10"/>
      <text:p text:style-name="P10">Podemos obtener mucha información de como trabajar con contenedores con Visual Studio Code en <text:a xlink:type="simple" xlink:href="https://code.visualstudio.com/docs/containers/overview" text:style-name="ListLabel_20_1" text:visited-style-name="ListLabel_20_1"><text:span text:style-name="T19">https://code.visualstudio.com/docs/containers/overview</text:span></text:a> </text:p>
      <text:list xml:id="list43849518417514" text:continue-numbering="true" text:style-name="WWNum1">
        <text:list-item>
          <text:p text:style-name="P26"><text:bookmark text:name="_qvrem7ds00j7"/>Creando y editando aplicación en PHP dentro de un contenedor</text:p>
        </text:list-item>
      </text:list>
      <text:p text:style-name="P10">Con el siguiente comando, podemos crear un sencillo contenedor que contendrá “<text:span text:style-name="T18">Apache+PHP</text:span>” y en cuyo directorio “<text:span text:style-name="T18">/var/www/html</text:span>” se almacena su sitio web, que se servirá por el puerto <text:span text:style-name="T11">8080</text:span>.</text:p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0">docker run -d --name servidordesarrollo -p 8080:80 php:7.2-apache</text:span></text:p>
          </table:table-cell>
        </table:table-row>
      </table:table>
      <text:p text:style-name="P10"/>
      <text:p text:style-name="P10">Una vez creado nuestro contenedor probaremos a acceder a <text:a xlink:type="simple" xlink:href="http://localhost:8080" text:style-name="ListLabel_20_1" text:visited-style-name="ListLabel_20_1"><text:span text:style-name="T19">http://localhost:8080</text:span></text:a> y observaremos algo similar a:</text:p>
      <text:p text:style-name="P10"><draw:frame draw:style-name="fr1" draw:name="image6.png" text:anchor-type="as-char" svg:width="6.6929in" svg:height="1.0417in" draw:z-index="0"><draw:image xlink:href="Pictures/100002010000059F000000DFA562C94851214412.png" xlink:type="simple" xlink:show="embed" xlink:actuate="onLoad" loext:mime-type="image/png"/></draw:frame></text:p>
      <text:p text:style-name="P10"/>
      <text:p text:style-name="P10">Tras ello, abriremos el editor Visual Studio Code y accederemos a las utilidades Docker (icono de la ballena) y accederemos a un menú con distintas (opciones) tal como se ve en la imagen:</text:p>
      <text:p text:style-name="P11"><draw:frame draw:style-name="fr1" draw:name="image5.png" text:anchor-type="as-char" svg:width="6.6929in" svg:height="4.8752in" draw:z-index="0"><draw:image xlink:href="Pictures/1000020100000535000003CC3954EE1EDF7B2554.png" xlink:type="simple" xlink:show="embed" xlink:actuate="onLoad" loext:mime-type="image/png"/></draw:frame></text:p>
      <text:p text:style-name="P10">Ahí hay diversas pestañas. Algunas de las más destacadas son “<text:span text:style-name="T18">Containers</text:span>” (información de los contenedores), “<text:span text:style-name="T18">Images</text:span>” (información de las imágenes disponibles), “<text:span text:style-name="T18">Networks</text:span>” (con información de las redes entre contenedores) o “<text:span text:style-name="T18">Volumes</text:span>” (con información de los volúmenes creados).</text:p>
      <text:p text:style-name="P10"/>
      <text:p text:style-name="P10">Siguiendo el caso práctico, si desplegamos la pestaña del menú “<text:span text:style-name="T18">Containers</text:span>”, veremos todos los contenedores y podremos operar sobre ellos. En la siguiente imagen, vemos el contenedor que hemos creado anteriormente en funcionamiento.</text:p>
      <text:p text:style-name="P11"><draw:frame draw:style-name="fr1" draw:name="image9.png" text:anchor-type="as-char" svg:width="2.5484in" svg:height="2.5953in" draw:z-index="0"><draw:image xlink:href="Pictures/10000201000001A6000001AE3BB67C7F75FA3371.png" xlink:type="simple" xlink:show="embed" xlink:actuate="onLoad" loext:mime-type="image/png"/></draw:frame></text:p>
      <text:p text:style-name="P12"><text:soft-page-break/>Utilizando el botón derecho, podremos parar/iniciar el contenedor, obtener más información, etc. También podemos observar información, simplemente dejando el cursor encima del contenedor.</text:p>
      <text:p text:style-name="P12"/>
      <text:p text:style-name="P10">Para proseguir con nuestro caso práctico, vamos a pulsar el botón derecho sobre el contenedor y seleccionaremos la opción “<text:span text:style-name="T18">Attach Visual Studio Code</text:span>”. Esto abrirá una nueva instancia de Visual Studio Code conectada a dicho contenedor. Podemos comprobar que es correcto observando en la parte inferior de la pantalla de la nueva instancia algo similar a:</text:p>
      <text:p text:style-name="P11"><draw:frame draw:style-name="fr1" draw:name="image3.png" text:anchor-type="as-char" svg:width="3.3429in" svg:height="1.0665in" draw:z-index="0"><draw:image xlink:href="Pictures/10000201000001B80000008DB187DADDE7A474CF.png" xlink:type="simple" xlink:show="embed" xlink:actuate="onLoad" loext:mime-type="image/png"/></draw:frame></text:p>
      <text:p text:style-name="P9"><text:span text:style-name="T12"><text:s/>❕</text:span><text:span text:style-name="T13"> </text:span><text:span text:style-name="T11">Atención: </text:span><text:s/>este paso utiliza internamente “Dev container”. Podríamos haberlo hecho manualmente habiendo pulsado el icono de abajo a la izquierda y habiendo seleccionado a mano el contenedor.</text:p>
      <text:p text:style-name="P10">Una vez en esa instancia, podemos abrir el directorio “<text:span text:style-name="T18">/var/www/html</text:span>” y lo editaremos como si estuviéramos en local. Ahí crearemos un sencillo fichero “<text:span text:style-name="T18">index.php</text:span>” con el siguiente contenido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2">&lt;?php</text:span><text:span text:style-name="T21"><text:line-break/><text:tab/>phpinfo();<text:line-break/></text:span><text:span text:style-name="T22">?&gt;</text:span></text:p>
          </table:table-cell>
        </table:table-row>
      </table:table>
      <text:p text:style-name="P10"/>
      <text:p text:style-name="P10">En el editor nos quedará algo similar a:</text:p>
      <text:p text:style-name="P10"><draw:frame draw:style-name="fr1" draw:name="image7.png" text:anchor-type="as-char" svg:width="6.6929in" svg:height="3.9862in" draw:z-index="0"><draw:image xlink:href="Pictures/100002010000059C00000356E0DA381E03BC7135.png" xlink:type="simple" xlink:show="embed" xlink:actuate="onLoad" loext:mime-type="image/png"/></draw:frame></text:p>
      <text:p text:style-name="P10">Con esto, ya hemos modificado el contenido del contenedor, creando un fichero dentro de la carpeta “<text:span text:style-name="T18">/var/www/html</text:span>”.</text:p>
      <text:p text:style-name="P10"/>
      <text:p text:style-name="P10">Si ahora accedemos a <text:a xlink:type="simple" xlink:href="http://localhost:8080" text:style-name="ListLabel_20_1" text:visited-style-name="ListLabel_20_1"><text:span text:style-name="T19">http://localhost:8080</text:span></text:a> observamos que todo funciona correctamente y que hemos podido desarrollar una aplicación dentro de un contenedor de forma gráfica y sin necesidad de mapear ficheros a nuestra máquina anfitriona.</text:p>
      <text:p text:style-name="P10"/>
      <text:p text:style-name="P10"><draw:frame draw:style-name="fr1" draw:name="image2.png" text:anchor-type="as-char" svg:width="6.6929in" svg:height="3.9583in" draw:z-index="0"><draw:image xlink:href="Pictures/100002010000059D00000351650B771D5174E684.png" xlink:type="simple" xlink:show="embed" xlink:actuate="onLoad" loext:mime-type="image/png"/></draw:frame></text:p>
      <text:list xml:id="list43849967364284" text:continue-numbering="true" text:style-name="WWNum1">
        <text:list-item>
          <text:p text:style-name="P26"><text:bookmark text:name="_72yv1gty1dke"/>Bibliografía</text:p>
        </text:list-item>
      </text:list>
      <text:p text:style-name="P8">[1] Docker Docs <text:a xlink:type="simple" xlink:href="https://docs.docker.com/" text:style-name="ListLabel_20_1" text:visited-style-name="ListLabel_20_1"><text:span text:style-name="T19">https://docs.docker.com/</text:span></text:a></text:p>
      <text:p text:style-name="P8">[2] Visual Studio Code “Working with containers” </text:p>
      <text:p text:style-name="P8"><text:a xlink:type="simple" xlink:href="https://code.visualstudio.com/docs/containers/overview" text:style-name="ListLabel_20_1" text:visited-style-name="ListLabel_20_1"><text:span text:style-name="T19">https://code.visualstudio.com/docs/containers/overview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y Kubernetes<text:tab/><text:tab/>UD07. Caso práctico 01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0" meta:object-count="0" meta:page-count="2" meta:paragraph-count="54" meta:word-count="633" meta:character-count="4424" meta:non-whitespace-character-count="3830"/>
    <meta:generator>LibreOfficeDev/6.0.5.2$Linux_X86_64 LibreOffice_project/</meta:generator>
  </office:meta>
</office:document-meta>
</file>