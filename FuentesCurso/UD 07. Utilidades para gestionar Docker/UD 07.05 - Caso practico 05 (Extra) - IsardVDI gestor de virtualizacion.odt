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178F085038DDAC37C8E.png" manifest:media-type="image/png"/>
  <manifest:file-entry manifest:full-path="Pictures/10000201000005920000031E69B56DBF0F0278A8.png" manifest:media-type="image/png"/>
  <manifest:file-entry manifest:full-path="Pictures/10000201000002390000013488AD52E7B6AF50C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break-before="auto" fo:break-after="auto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0086b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7. Caso práctico 05 (Extra) - IsardVDI, gestor de virtualización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3">1. Introducción<text:tab/>2</text:span></text:a></text:p>
          <text:p text:style-name="P13"><text:a xlink:type="simple" xlink:href="#_vyhbfp4t666x" text:style-name="Index_20_Link" text:visited-style-name="Index_20_Link"><text:span text:style-name="T13">2. Instalando “IsardVDI”<text:tab/>3</text:span></text:a></text:p>
          <text:p text:style-name="P13"><text:a xlink:type="simple" xlink:href="#_fxr4hfsm9ztm" text:style-name="Index_20_Link" text:visited-style-name="Index_20_Link"><text:span text:style-name="T13">3. Puesta en marcha de “IsardVDI”<text:tab/>3</text:span></text:a></text:p>
          <text:p text:style-name="P13"><text:a xlink:type="simple" xlink:href="#_f6rea0n83waq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5"/>
      <text:p text:style-name="P16"><text:span text:style-name="T14">UD07. Caso práctico 05 (Extra)</text:span></text:p>
      <text:list xml:id="list3221305493" text:style-name="WWNum1">
        <text:list-item>
          <text:p text:style-name="P22"><text:bookmark text:name="_dbh0n1vac4c8"/>Introducción</text:p>
        </text:list-item>
      </text:list>
      <text:p text:style-name="P10">En este caso práctico vamos a poner en marcha la herramienta “<text:span text:style-name="T17">IsardVDI</text:span>”. Aunque esta herramienta no es específica de Docker, la especificamos como caso práctico, ya que además de su interés, esta se levanta con contenedores Docker.</text:p>
      <text:p text:style-name="P10">IsardVDI es un gestor de cualquier tipo de virtualización soportada por “<text:span text:style-name="T17">KVM</text:span>” <text:s/><text:a xlink:type="simple" xlink:href="https://www.linux-kvm.org" text:style-name="ListLabel_20_1" text:visited-style-name="ListLabel_20_1"><text:span text:style-name="T18">https://www.linux-kvm.org</text:span></text:a> (<text:a xlink:type="simple" xlink:href="https://es.wikipedia.org/wiki/Kernel-based_Virtual_Machine" text:style-name="ListLabel_20_1" text:visited-style-name="ListLabel_20_1"><text:span text:style-name="T18">https://es.wikipedia.org/wiki/Kernel-based_Virtual_Machine</text:span></text:a>). </text:p>
      <text:p text:style-name="P10">“<text:span text:style-name="T17">IsardVDI</text:span>” está desarrollado por gente de Barcelona. La web del oficial del proyecto es <text:a xlink:type="simple" xlink:href="https://www.isardvdi.com/" text:style-name="ListLabel_20_1" text:visited-style-name="ListLabel_20_1"><text:span text:style-name="T18">https://www.isardvdi.com/</text:span></text:a>.</text:p>
      <text:list xml:id="list44817809719463" text:continue-numbering="true" text:style-name="WWNum1">
        <text:list-item>
          <text:p text:style-name="P23"><text:bookmark text:name="_vyhbfp4t666x"/>buInstalando “IsardVDI”</text:p>
        </text:list-item>
      </text:list>
      <text:p text:style-name="P10">Para instalar seguiremos los pasos de <text:a xlink:type="simple" xlink:href="https://isard.gitlab.io/isardvdi-docs/install/#quick-start" text:style-name="ListLabel_20_1" text:visited-style-name="ListLabel_20_1"><text:span text:style-name="T18">https://isard.gitlab.io/isardvdi-docs/install/#quick-start</text:span></text:a></text:p>
      <text:p text:style-name="P10">En primer lugar, clonaremos el repositorio de IsarVDI con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git </text:span><text:span text:style-name="T20">clone</text:span><text:span text:style-name="T19"> https://gitlab.com/isard/isardvdi</text:span></text:p>
          </table:table-cell>
        </table:table-row>
      </table:table>
      <text:p text:style-name="P10">Tras ello accedemos al directorio recién creado “isardvdi”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cd</text:span><text:span text:style-name="T19"> isardvdi</text:span></text:p>
          </table:table-cell>
        </table:table-row>
      </table:table>
      <text:p text:style-name="P10">Y una vez allí copiamos la configuración de ejemplo para usarla como configuración de nuestro despliegue y ejecutamos “build.sh”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">cp isardvdi.cfg.example isardvdi.cfg</text:span></text:p>
            <text:p text:style-name="P21"><text:span text:style-name="T19">./build.sh</text:span></text:p>
          </table:table-cell>
        </table:table-row>
      </table:table>
      <text:p text:style-name="P10">Tras ello, descargamos las imágenes asociada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docker compose pull</text:span></text:p>
          </table:table-cell>
        </table:table-row>
      </table:table>
      <text:p text:style-name="P10">Y finalmente ponemos en marcha el sistema. Importante: aunque el comando haya finalizado, la <text:span text:style-name="T21">primera vez habrá que esperar dos minutos aproximadamente para que se pueble la base de datos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19">docker compose up -d</text:span></text:p>
          </table:table-cell>
        </table:table-row>
      </table:table>
      <text:p text:style-name="P10">Al ponerlo en marcha, la persistencia del sistema se realizará con los directorios del anfitrión <text:s/>“<text:span text:style-name="T10">/opt/isard</text:span>” y “<text:span text:style-name="T17">/opt/isard-local</text:span>”. Tras ponerlo en marcha observaremos algo similar a:</text:p>
      <text:p text:style-name="P11"><draw:frame draw:style-name="fr1" draw:name="image4.png" text:anchor-type="as-char" svg:width="3.3508in" svg:height="1.8161in" draw:z-index="0"><draw:image xlink:href="Pictures/10000201000002390000013488AD52E7B6AF50C9.png" xlink:type="simple" xlink:show="embed" xlink:actuate="onLoad" loext:mime-type="image/png"/></draw:frame></text:p>
      <text:p text:style-name="P10">En el caso de que queramos desinstalar la aplicación o que hubiera algún problema y queramos reinstalar todo, además de eliminar los contenedores usando “<text:span text:style-name="T17">Docker Compose</text:span>”, deberemos borrar los directorios “<text:span text:style-name="T10">/opt/isard</text:span>” y “<text:span text:style-name="T17">/opt/isard-local</text:span>”.</text:p>
      <text:list xml:id="list44816576602924" text:continue-numbering="true" text:style-name="WWNum1">
        <text:list-item>
          <text:p text:style-name="P23"><text:bookmark text:name="_fxr4hfsm9ztm"/>Puesta en marcha de “IsardVDI”</text:p>
        </text:list-item>
      </text:list>
      <text:p text:style-name="P10"><text:span text:style-name="T21">Una vez pasados los dos minutos de espera</text:span>, podremos acceder a la interfaz mediante la dirección <text:a xlink:type="simple" xlink:href="https://localhost" text:style-name="ListLabel_20_1" text:visited-style-name="ListLabel_20_1"><text:span text:style-name="T18">https://localhost</text:span></text:a>. El usuario por defecto es “<text:span text:style-name="T17">admin</text:span>” y la contraseña “<text:span text:style-name="T17">IsardVDI</text:span><text:span text:style-name="T10">”.</text:span></text:p>
      <text:p text:style-name="P12"/>
      <text:p text:style-name="P11"><draw:frame draw:style-name="fr1" draw:name="image1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10">Si todo ha ido bien, veremos una ventana como la siguiente:</text:p>
      <text:p text:style-name="P10"><draw:frame draw:style-name="fr1" draw:name="image5.png" text:anchor-type="as-char" svg:width="6.6929in" svg:height="1.972in" draw:z-index="0"><draw:image xlink:href="Pictures/10000000000004F800000178F085038DDAC37C8E.png" xlink:type="simple" xlink:show="embed" xlink:actuate="onLoad" loext:mime-type="image/png"/></draw:frame></text:p>
      <text:p text:style-name="P12"><text:soft-page-break/></text:p>
      <text:p text:style-name="P10">Una vez accedido, si quieres comprobar las bondades de IsardVDI, te recomendamos sigas su guía de primeros pasos <text:a xlink:type="simple" xlink:href="https://isard.gitlab.io/isardvdi-docs/install/first-steps/" text:style-name="ListLabel_20_1" text:visited-style-name="ListLabel_20_1"><text:span text:style-name="T18">https://isard.gitlab.io/isardvdi-docs/install/first-steps/</text:span></text:a> donde te indicará como puedes bajarte escritorios, usarlos, etc. (Nota: para visualizar los escritorios, deberás permitir ventanas emergentes.)</text:p>
      <text:list xml:id="list44817890983451" text:continue-numbering="true" text:style-name="WWNum1">
        <text:list-item>
          <text:p text:style-name="P23"><text:bookmark text:name="_f6rea0n83waq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8">https://docs.docker.com/</text:span></text:a></text:p>
      <text:p text:style-name="P8">[2] IsardVDI <text:a xlink:type="simple" xlink:href="https://www.isardvdi.com/" text:style-name="ListLabel_20_1" text:visited-style-name="ListLabel_20_1"><text:span text:style-name="T18">https://www.isardvdi.com/</text:span></text:a> y <text:a xlink:type="simple" xlink:href="https://isard.gitlab.io/isardvdi-docs/" text:style-name="ListLabel_20_1" text:visited-style-name="ListLabel_20_1"><text:span text:style-name="T18">https://isard.gitlab.io/isardvdi-docs/</text:span></text:a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5 (Extra)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8" meta:word-count="449" meta:character-count="3232" meta:non-whitespace-character-count="2820"/>
    <meta:generator>LibreOfficeDev/6.0.5.2$Linux_X86_64 LibreOffice_project/</meta:generator>
  </office:meta>
</office:document-meta>
</file>