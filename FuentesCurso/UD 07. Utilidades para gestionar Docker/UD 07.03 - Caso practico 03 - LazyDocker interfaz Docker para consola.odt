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0B207587BD1003B954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T2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 y Kubernetes</text:span><text:span text:style-name="T2"><text:line-break/></text:span><text:span text:style-name="T3">UD 07. Caso práctico 03 - LazyDocker, interfaz Docker en consol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4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5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6"/>
      <text:p text:style-name="P16"/>
      <text:p text:style-name="P18"><text:span text:style-name="T15">UD07. Caso práctico 03</text:span></text:p>
      <text:list xml:id="list3762529192" text:style-name="WWNum1">
        <text:list-item>
          <text:p text:style-name="P28"><text:bookmark text:name="_dbh0n1vac4c8"/>Introducción</text:p>
        </text:list-item>
      </text:list>
      <text:p text:style-name="P10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10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75434471211169" text:continue-numbering="true" text:style-name="WWNum1">
        <text:list-item>
          <text:p text:style-name="P29"><text:bookmark text:name="_vyhbfp4t666x"/>Instalando “LazyDocker”</text:p>
        </text:list-item>
      </text:list>
      <text:p text:style-name="P10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10"/>
      <text:p text:style-name="P10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curl https://raw.githubusercontent.com/jesseduffield/lazydocker/master/scripts/install_update_linux.sh | bash</text:span></text:p>
          </table:table-cell>
        </table:table-row>
      </table:table>
      <text:p text:style-name="P10">En pantalla obtendremos algo similar a:</text:p>
      <text:p text:style-name="P10"><draw:frame draw:style-name="fr1" draw:name="image3.png" text:anchor-type="as-char" svg:width="6.6929in" svg:height="1.7917in" draw:z-index="0"><draw:image xlink:href="Pictures/10000201000003E90000010B207587BD1003B954.png" xlink:type="simple" xlink:show="embed" xlink:actuate="onLoad" loext:mime-type="image/png"/></draw:frame></text:p>
      <text:p text:style-name="P10"/>
      <text:p text:style-name="Standard">El script instala el binario descargado en el directorio $HOME/.local/bin por defecto. Sin embargo, esto se puede cambiar estableciendo la variable de entorno DIR.</text:p>
      <text:p text:style-name="Standard"/>
      <text:p text:style-name="Standard">Si después de la instalación el comando no aparece disponible, es posible que necesites reiniciar sesión para que los cambios se apliquen. Si no quieres reiniciar, puedes ejecutarlo di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$HOME</text:span><text:span text:style-name="T21">/.</text:span><text:span text:style-name="T24">local</text:span><text:span text:style-name="T21">/bin/lazydocker</text:span></text:p>
          </table:table-cell>
        </table:table-row>
      </table:table>
      <text:list xml:id="list75433808233304" text:continue-numbering="true" text:style-name="WWNum1">
        <text:list-item>
          <text:p text:style-name="P29"><text:bookmark text:name="_2lq1cm5185i"/>Iniciando y utilizando “LazyDocker”</text:p>
        </text:list-item>
      </text:list>
      <text:p text:style-name="P10">Para poner en marcha “<text:span text:style-name="T18">LazyDocker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lazydocker</text:span></text:p>
          </table:table-cell>
        </table:table-row>
      </table:table>
      <text:p text:style-name="P10"><text:s/>y nos aparecerá una interfaz similar a la que podemos observar en:</text:p>
      <text:p text:style-name="P11"><draw:frame draw:style-name="fr1" draw:name="image4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2"/>
      <text:p text:style-name="P10">La interfaz admite tanto teclado como ratón. Para movernos por la interfaz, utilizaremos principalmente las siguientes teclas:</text:p>
      <text:list xml:id="list48228063" text:style-name="WWNum2">
        <text:list-item>
          <text:p text:style-name="P24"><text:span text:style-name="T11">Tecla “Esc” y ”q”</text:span>: saldremos de “<text:span text:style-name="T18">LazyDocker</text:span>”.</text:p>
        </text:list-item>
        <text:list-item>
          <text:p text:style-name="P25"><text:span text:style-name="T11">Teclas Izquierda y Derecha</text:span>: nos permiten movernos entre las distintas secciones de la interfaz. </text:p>
        </text:list-item>
        <text:list-item>
          <text:p text:style-name="P25"><text:span text:style-name="T11">Teclas Arriba y Abajo</text:span>: nos permiten movernos entre los distintos elementos de la sección en la que estemos.</text:p>
        </text:list-item>
        <text:list-item>
          <text:p text:style-name="P25"><text:span text:style-name="T11">Teclas Pg Up y Pg Down</text:span>: nos permiten hacer scroll en secciones con más texto que el mostrado en pantalla.</text:p>
        </text:list-item>
        <text:list-item>
          <text:p text:style-name="P25"><text:soft-page-break/><text:span text:style-name="T11">Tecla “x”:</text:span> <text:s/>nos muestra un menú relacionado con el elemento en el que estemos</text:p>
          <text:list>
            <text:list-item>
              <text:p text:style-name="P27">Por ejemplo, si estamos en un contenedor, aparecen opciones relacionadas con él, como pararlo, eliminarlo, etc.</text:p>
            </text:list-item>
          </text:list>
        </text:list-item>
        <text:list-item>
          <text:p text:style-name="P26"><text:span text:style-name="T11">Tecla “b”:</text:span> <text:s/>nos muestra “bulk commands” (comandos generales).</text:p>
        </text:list-item>
      </text:list>
      <text:p text:style-name="P10"/>
      <text:p text:style-name="P10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75434482826125" text:continue-list="list75433808233304" text:style-name="WWNum1">
        <text:list-item>
          <text:p text:style-name="P29"><text:bookmark text:name="_npb3xsf007ps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3</text:span></text:p>
      </style:header>
      <style:footer>
        <text:p text:style-name="MP4"><text:span text:style-name="MT1">Curso Introducción a Docker y Kubernetes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5" meta:object-count="0" meta:page-count="2" meta:paragraph-count="48" meta:word-count="446" meta:character-count="3106" meta:non-whitespace-character-count="2701"/>
    <meta:generator>LibreOfficeDev/6.0.5.2$Linux_X86_64 LibreOffice_project/</meta:generator>
  </office:meta>
</office:document-meta>
</file>