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2698E5E21D6C2859ED3.png" manifest:media-type="image/png"/>
  <manifest:file-entry manifest:full-path="Pictures/1000020100000595000002EBFA6C3607CF076E5B.png" manifest:media-type="image/png"/>
  <manifest:file-entry manifest:full-path="Pictures/10000000000004F9000002658D1F07832A6337BF.png" manifest:media-type="image/png"/>
  <manifest:file-entry manifest:full-path="Pictures/10000000000004F70000025B4E53F425B2988F54.png" manifest:media-type="image/png"/>
  <manifest:file-entry manifest:full-path="Pictures/100002010000059F00000343D9F995A6175F9CAC.png" manifest:media-type="image/png"/>
  <manifest:file-entry manifest:full-path="Pictures/10000201000003E3000001BEFE6E365FEE8B339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text-align="start" style:justify-single-word="false" fo:break-before="auto" fo:break-after="auto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Caso práctico 02 - Gestionando Docker con Portainer CE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3">1. Introducción<text:tab/>2</text:span></text:a></text:p>
          <text:p text:style-name="P14"><text:a xlink:type="simple" xlink:href="#_vyhbfp4t666x" text:style-name="Index_20_Link" text:visited-style-name="Index_20_Link"><text:span text:style-name="T13">2. Instalando Portainer CE<text:tab/>3</text:span></text:a></text:p>
          <text:p text:style-name="P14"><text:a xlink:type="simple" xlink:href="#_tmcuujlevdxn" text:style-name="Index_20_Link" text:visited-style-name="Index_20_Link"><text:span text:style-name="T13">3. Bibliografía<text:tab/>5</text:span></text:a></text:p>
        </text:index-body>
      </text:table-of-content>
      <text:p text:style-name="Standard"/>
      <text:p text:style-name="P16"/>
      <text:p text:style-name="P17"><text:span text:style-name="T14">UD07. Caso práctico 02</text:span></text:p>
      <text:list xml:id="list4118760433" text:style-name="WWNum1">
        <text:list-item>
          <text:p text:style-name="P25"><text:bookmark text:name="_dbh0n1vac4c8"/>Introducción</text:p>
        </text:list-item>
      </text:list>
      <text:p text:style-name="P11">En este caso práctico vamos a poner en marcha “<text:span text:style-name="T17">Portainer CE</text:span>” para gestionar nuestros contenedores Docker de manera gráfica.</text:p>
      <text:list xml:id="list75350408650312" text:continue-numbering="true" text:style-name="WWNum1">
        <text:list-item>
          <text:p text:style-name="P26"><text:bookmark text:name="_vyhbfp4t666x"/>Instalando Portainer CE</text:p>
        </text:list-item>
      </text:list>
      <text:p text:style-name="P11">En el sitio web <text:a xlink:type="simple" xlink:href="https://docs.portainer.io/start/install-ce/server/docker" text:style-name="ListLabel_20_1" text:visited-style-name="ListLabel_20_1"><text:span text:style-name="T18">https://docs.portainer.io/start/install-ce/server/docker</text:span></text:a> se encuentra información de como instalar “<text:span text:style-name="T17">Portainer CE</text:span>” en diversos sistemas. Aquí seguiremos las instrucciones para instalarlo en sistemas Linux.</text:p>
      <text:p text:style-name="P11">“<text:span text:style-name="T17">Portainer CE</text:span>” en lugar de ser una aplicación propiamente dicha, se aloja dentro de un contenedor Docker, de ahí que ponerlo en marcha sea poner en marcha sus contenedores.</text:p>
      <text:p text:style-name="P11"/>
      <text:p text:style-name="P11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docker volume create portainer_data</text:span></text:p>
          </table:table-cell>
        </table:table-row>
      </table:table>
      <text:p text:style-name="P11">Una vez creado el volumen, procederemos a lanzar el contenedor que tiene todo lo necesario para que funcione. <text:s/>“<text:span text:style-name="T17">Portainer CE</text:span>” se gestiona mediante una interfaz web, en este ejemplo mapeamos el servicio web a los puertos del anfitrión <text:span text:style-name="T20">8000 (para túnel TCP si actúa como servidor de otros agentes de Portainer CE, opcional</text:span>) y <text:span text:style-name="T20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19">docker run -d -p 8000:8000 -p 9443:9443 --name portainer --restart=always -v /var/run/docker.sock:/var/run/docker.sock -v portainer_data:/data portainer/portainer-ce:lts</text:span></text:p>
          </table:table-cell>
        </table:table-row>
      </table:table>
      <text:p text:style-name="P11"/>
      <text:p text:style-name="P10"><text:span text:style-name="T11"><text:s/>❕</text:span><text:span text:style-name="T12"> </text:span><text:span text:style-name="T10">Atención: </text:span><text:s/>para que funciones “<text:span text:style-name="T17">Portainer CE</text:span>” se enlaza el fichero “<text:span text:style-name="T17">/var/run/docker.sock</text:span>” local con el del contenedor. Un contenedor malintencionado podría tomar el control del sistema, así que estos enlaces debemos hacerlo únicamente con imágenes de confianza.</text:p>
      <text:p text:style-name="P11">Si todo ha ido bien, habremos obtenido algo similar a:</text:p>
      <text:p text:style-name="P11"><draw:frame draw:style-name="fr1" draw:name="image5.png" text:anchor-type="as-char" svg:width="6.6929in" svg:height="3in" draw:z-index="0"><draw:image xlink:href="Pictures/10000201000003E3000001BEFE6E365FEE8B339F.png" xlink:type="simple" xlink:show="embed" xlink:actuate="onLoad" loext:mime-type="image/png"/></draw:frame></text:p>
      <text:p text:style-name="P11"/>
      <text:p text:style-name="P11">Tras esto podremos acceder a la interfaz de “Portainer CE” accediendo a <text:a xlink:type="simple" xlink:href="https://localhost:9443" text:style-name="ListLabel_20_1" text:visited-style-name="ListLabel_20_1"><text:span text:style-name="T18">https://localhost:9443</text:span></text:a></text:p>
      <text:p text:style-name="P11">El primer acceso nos solicitará que generemos un password para el usuario “<text:span text:style-name="T17">admin</text:span>”, con al menos 12 caracteres de longitud. Desde aquí proponemos el password “<text:span text:style-name="T17">cefireadmindocker</text:span>”.</text:p>
      <text:p text:style-name="P11"/>
      <text:p text:style-name="P11">La pantalla que observaremos será similar a la siguiente:</text:p>
      <text:p text:style-name="P11"/>
      <text:p text:style-name="P12"><draw:frame draw:style-name="fr1" draw:name="image7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11">Si todo ha ido bien, veremos una pantalla similar a la siguiente.</text:p>
      <text:p text:style-name="P12"><draw:frame draw:style-name="fr1" draw:name="image4.png" text:anchor-type="as-char" svg:width="5.8661in" svg:height="2.7874in" draw:z-index="0"><draw:image xlink:href="Pictures/10000000000004F70000025B4E53F425B2988F54.png" xlink:type="simple" xlink:show="embed" xlink:actuate="onLoad" loext:mime-type="image/png"/></draw:frame></text:p>
      <text:p text:style-name="P13"/>
      <text:p text:style-name="P11">En nuestro caso, como hemos creado el contenedor con la opción que permitía la conexión del contenedor a nuestro Docker local “-<text:span text:style-name="T17">v /var/run/docker.sock:/var/run/docker.sock</text:span>”, simplemente, si pulsamos en el botón de la izquierda “Home” accederemos al entorno local, viendo una pantalla similar a esta:</text:p>
      <text:p text:style-name="P12"><text:soft-page-break/><draw:frame draw:style-name="fr1" draw:name="image9.png" text:anchor-type="as-char" svg:width="5.7839in" svg:height="2.7874in" draw:z-index="0"><draw:image xlink:href="Pictures/10000000000004F9000002658D1F07832A6337BF.png" xlink:type="simple" xlink:show="embed" xlink:actuate="onLoad" loext:mime-type="image/png"/></draw:frame></text:p>
      <text:p text:style-name="P13">Una vez en esa pantalla, haremos clic en “<text:span text:style-name="T17">Live connect</text:span>”, lo que nos llevará a la siguiente pantalla:</text:p>
      <text:p text:style-name="P13"/>
      <text:p text:style-name="P12"><draw:frame draw:style-name="fr1" draw:name="image1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13">Si todo ha ido bien, tendremos “<text:span text:style-name="T17">Portainer CE”</text:span> ya en funcionamiento, observando la información de nuestro Docker local tal como se ve aquí:</text:p>
      <text:p text:style-name="P12"><draw:frame draw:style-name="fr1" draw:name="image8.png" text:anchor-type="as-char" svg:width="6.6929in" svg:height="3.25in" draw:z-index="0"><draw:image xlink:href="Pictures/10000000000004F4000002698E5E21D6C2859ED3.png" xlink:type="simple" xlink:show="embed" xlink:actuate="onLoad" loext:mime-type="image/png"/></draw:frame></text:p>
      <text:p text:style-name="P11">Una vez conectados a nuestro Docker local, a través de esta interfaz, podremos tanto auditar nuestros contenedores Docker, como arrancarlos, pararlos, eliminarlos, crear contenedores a través de plantillas “<text:span text:style-name="T17">App templates</text:span>”, etc.).</text:p>
      <text:p text:style-name="P11">Con esto finalizamos el caso práctico. Os invitamos a que exploréis las distintas opciones de administración y despliegue que ofrece “<text:span text:style-name="T17">Portainer CE</text:span>”.</text:p>
      <text:list xml:id="list75350754860939" text:continue-numbering="true" text:style-name="WWNum1">
        <text:list-item>
          <text:p text:style-name="P26"><text:bookmark text:name="_tmcuujlevdxn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18">https://docs.docker.com/</text:span></text:a></text:p>
      <text:p text:style-name="P9">[2] Portanier CE Documentation <text:a xlink:type="simple" xlink:href="https://documentation.portainer.io/" text:style-name="ListLabel_20_1" text:visited-style-name="ListLabel_20_1"><text:span text:style-name="T18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2</text:span></text:p>
      </style:header>
      <style:footer>
        <text:p text:style-name="MP4"><text:span text:style-name="MT1">Curso Introducción a Docker y Kubernetes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9" meta:object-count="0" meta:page-count="2" meta:paragraph-count="47" meta:word-count="555" meta:character-count="3737" meta:non-whitespace-character-count="3216"/>
    <meta:generator>LibreOfficeDev/6.0.5.2$Linux_X86_64 LibreOffice_project/</meta:generator>
  </office:meta>
</office:document-meta>
</file>