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C000000AEA7A45214EFBE0889.png" manifest:media-type="image/png"/>
  <manifest:file-entry manifest:full-path="Pictures/10000201000003BB000000F6AEE015CAB0746185.png" manifest:media-type="image/png"/>
  <manifest:file-entry manifest:full-path="Pictures/10000201000003E7000000E3332E0CFF835A3012.png" manifest:media-type="image/png"/>
  <manifest:file-entry manifest:full-path="Pictures/10000201000001DC00000181FEB3E48A4F2A480E.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8pt" fo:font-weight="bold" style:font-name-asian="Arial1" style:font-size-asian="8pt" style:font-weight-asian="bold" style:font-name-complex="Arial1" style:font-size-complex="8pt" style:font-weight-complex="bold"/>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15%" fo:text-align="start" style:justify-single-word="false" fo:break-before="auto" fo:break-after="auto"/>
      <style:text-properties fo:color="#333333" style:font-name="Consolas" fo:background-color="#f8f8f8" style:font-name-asian="Consolas1" style:font-name-complex="Consolas1"/>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in" fo:margin-right="0in" fo:text-align="justify" style:justify-single-word="false" fo:text-indent="0in" style:auto-text-indent="false" fo:break-before="auto" fo:break-after="auto"/>
    </style:style>
    <style:style style:name="P27" style:family="paragraph" style:parent-style-name="Standard">
      <style:paragraph-properties fo:margin-left="0in" fo:margin-right="0in" fo:text-align="justify" style:justify-single-word="false" fo:text-indent="0in" style:auto-text-indent="false" fo:break-before="auto" fo:break-after="auto"/>
      <style:text-properties style:text-underline-style="solid" style:text-underline-width="auto" style:text-underline-color="font-color" fo:font-weight="bold" style:font-weight-asian="bold" style:font-weight-complex="bold"/>
    </style:style>
    <style:style style:name="P28" style:family="paragraph" style:parent-style-name="Standard">
      <style:paragraph-properties fo:margin-left="0in" fo:margin-right="0in" fo:text-align="center" style:justify-single-word="false" fo:text-indent="0in" style:auto-text-indent="false" fo:break-before="auto" fo:break-after="auto"/>
    </style:style>
    <style:style style:name="P29" style:family="paragraph" style:parent-style-name="Standard">
      <style:paragraph-properties fo:margin-left="0in" fo:margin-right="0in" fo:text-align="center" style:justify-single-word="false" fo:text-indent="0in" style:auto-text-indent="false" fo:break-before="auto" fo:break-after="auto"/>
      <style:text-properties fo:font-size="8pt" fo:font-style="italic" style:font-size-asian="8pt" style:font-style-asian="italic" style:font-size-complex="8pt" style:font-style-complex="italic"/>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4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45" style:family="paragraph" style:parent-style-name="Heading_20_1" style:list-style-name="WWNum4">
      <style:paragraph-properties fo:break-before="auto" fo:break-after="auto"/>
    </style:style>
    <style:style style:name="P46" style:family="paragraph" style:parent-style-name="Heading_20_1" style:list-style-name="WWNum4">
      <style:paragraph-properties fo:text-align="justify" style:justify-single-word="false" fo:break-before="auto" fo:break-after="auto"/>
    </style:style>
    <style:style style:name="P47" style:family="paragraph" style:parent-style-name="Heading_20_1" style:list-style-name="WWNum4">
      <style:paragraph-properties fo:margin-top="0in" fo:margin-bottom="0.0429in" loext:contextual-spacing="false" fo:text-align="justify" style:justify-single-word="false" fo:break-before="auto" fo:break-after="auto"/>
    </style:style>
    <style:style style:name="P48" style:family="paragraph" style:parent-style-name="Heading_20_1" style:list-style-name="WWNum4">
      <style:paragraph-properties fo:margin-left="0.4in" fo:margin-right="0in" fo:text-align="justify" style:justify-single-word="false" fo:text-indent="-0.3in" style:auto-text-indent="false" fo:break-before="auto" fo:break-after="auto"/>
    </style:style>
    <style:style style:name="P49" style:family="paragraph" style:parent-style-name="Heading_20_2" style:list-style-name="WWNum4">
      <style:paragraph-properties fo:text-align="justify" style:justify-single-word="false" fo:break-before="auto" fo:break-after="auto"/>
    </style:style>
    <style:style style:name="P50" style:family="paragraph" style:parent-style-name="Heading_20_2" style:list-style-name="WWNum4">
      <style:paragraph-properties fo:break-before="auto" fo:break-after="auto"/>
    </style:style>
    <style:style style:name="P5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font-weight-complex="bold"/>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font-weight-complex="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font-style-complex="normal" style:font-weight-complex="bold"/>
    </style:style>
    <style:style style:name="T15" style:family="text">
      <style:text-properties fo:color="#000000" style:text-underline-style="none" fo:font-weight="bold" style:font-weight-asian="bold" style:font-weight-complex="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font-style-complex="italic"/>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size="8pt" fo:font-style="italic" style:text-underline-style="solid" style:text-underline-width="auto" style:text-underline-color="font-color" style:font-size-asian="8pt" style:font-style-asian="italic" style:font-size-complex="8pt" style:font-style-complex="italic"/>
    </style:style>
    <style:style style:name="T25" style:family="text">
      <style:text-properties fo:font-size="8pt" fo:font-style="italic" style:font-size-asian="8pt" style:font-style-asian="italic" style:font-size-complex="8pt" style:font-style-complex="italic"/>
    </style:style>
    <style:style style:name="T26" style:family="text">
      <style:text-properties style:text-underline-style="none"/>
    </style:style>
    <style:style style:name="T27" style:family="text">
      <style:text-properties fo:color="#333333" style:font-name="Consolas" fo:font-size="9pt" fo:background-color="#f8f8f8" loext:char-shading-value="0" style:font-name-asian="Consolas1" style:font-size-asian="9pt" style:font-name-complex="Consolas1" style:font-size-complex="9pt"/>
    </style:style>
    <style:style style:name="T28" style:family="text">
      <style:text-properties fo:color="#333333" style:font-name="Consolas" fo:background-color="#f8f8f8" loext:char-shading-value="0" style:font-name-asian="Consolas1" style:font-name-complex="Consolas1"/>
    </style:style>
    <style:style style:name="T29" style:family="text">
      <style:text-properties fo:font-size="9pt" style:font-size-asian="9pt" style:font-size-complex="9pt"/>
    </style:style>
    <style:style style:name="T30" style:family="text">
      <style:text-properties fo:font-size="9pt" style:font-size-asian="9pt" style:font-size-complex="9pt" fo:background-color="#ffffff"/>
    </style:style>
    <style:style style:name="T31" style:family="text">
      <style:text-properties fo:background-color="#ffffff"/>
    </style:style>
    <style:style style:name="T32" style:family="text">
      <style:text-properties fo:color="#dd1144" style:font-name="Consolas" fo:font-size="9pt" fo:background-color="#f8f8f8" loext:char-shading-value="0" style:font-name-asian="Consolas1" style:font-size-asian="9pt" style:font-name-complex="Consolas1" style:font-size-complex="9pt"/>
    </style:style>
    <style:style style:name="T33" style:family="text">
      <style:text-properties fo:color="#008080" style:font-name="Consolas" fo:font-size="9pt" fo:background-color="#f8f8f8" loext:char-shading-value="0" style:font-name-asian="Consolas1" style:font-size-asian="9pt" style:font-name-complex="Consolas1" style:font-size-complex="9pt"/>
    </style:style>
    <style:style style:name="T3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Docker y Kubernetes</text:span><text:span text:style-name="T3"><text:line-break/></text:span><text:span text:style-name="T4">UD 08. Introducción a Kubernet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5"><draw:frame draw:style-name="fr1" draw:name="image7.png" text:anchor-type="as-char" svg:width="6.6929in" svg:height="0.4862in" draw:z-index="0"><draw:image xlink:href="Pictures/10000000000007800000008BADE10FA77D575FB0.png" xlink:type="simple" xlink:show="embed" xlink:actuate="onLoad" loext:mime-type="image/png"/></draw:frame></text:p>
      <text:p text:style-name="P2"/>
      <text:p text:style-name="P3"/>
      <text:p text:style-name="P3"/>
      <text:p text:style-name="P3"/>
      <text:p text:style-name="P4"><text:span text:style-name="T6">Autor: Sergi García Barea</text:span></text:p>
      <text:p text:style-name="P4"><text:span text:style-name="T6">Actualizado Enero 2026</text:span></text:p>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stinto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
      <text:p text:style-name="P10"><text:span text:style-name="T10"><text:s/>💬</text:span> <text:span text:style-name="T11">Interesante</text:span></text:p>
      <text:p text:style-name="P1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4">1. Introducción<text:tab/>2</text:span></text:a></text:p>
          <text:p text:style-name="P15"><text:a xlink:type="simple" xlink:href="#_vyhbfp4t666x" text:style-name="Index_20_Link" text:visited-style-name="Index_20_Link"><text:span text:style-name="T14">2. Kubernetes<text:tab/>2</text:span></text:a></text:p>
          <text:p text:style-name="P17"><text:a xlink:type="simple" xlink:href="#_b67l6dln656a" text:style-name="Index_20_Link" text:visited-style-name="Index_20_Link"><text:span text:style-name="T14">2.1 <text:s/>¿Qué es Kubernetes?<text:tab/>2</text:span></text:a></text:p>
          <text:p text:style-name="P17"><text:a xlink:type="simple" xlink:href="#_mec99ua0nohv" text:style-name="Index_20_Link" text:visited-style-name="Index_20_Link"><text:span text:style-name="T14">2.2 <text:s/>Entendiendo Kubernetes<text:tab/>3</text:span></text:a></text:p>
          <text:p text:style-name="P17"><text:a xlink:type="simple" xlink:href="#_hj9z9iqssg5j" text:style-name="Index_20_Link" text:visited-style-name="Index_20_Link"><text:span text:style-name="T14">2.3 <text:s/>¿Cómo se estructura un clúster Kubernetes?<text:tab/>3</text:span></text:a></text:p>
          <text:p text:style-name="P17"><text:a xlink:type="simple" xlink:href="#_iol64q9i0w94" text:style-name="Index_20_Link" text:visited-style-name="Index_20_Link"><text:span text:style-name="T14">2.4 <text:s/>¿Qué es un Pod?<text:tab/>3</text:span></text:a></text:p>
          <text:p text:style-name="P17"><text:a xlink:type="simple" xlink:href="#_pu6h6qdeq4fq" text:style-name="Index_20_Link" text:visited-style-name="Index_20_Link"><text:span text:style-name="T14">2.5 <text:s/>¿Qué es un despliegue de una aplicación?<text:tab/>4</text:span></text:a></text:p>
          <text:p text:style-name="P17"><text:a xlink:type="simple" xlink:href="#_cu2k0fmbcdb1" text:style-name="Index_20_Link" text:visited-style-name="Index_20_Link"><text:span text:style-name="T14">2.6 <text:s/>¿Qué es un servicio?<text:tab/>4</text:span></text:a></text:p>
          <text:p text:style-name="P17"><text:a xlink:type="simple" xlink:href="#_vyewbwkw6oow" text:style-name="Index_20_Link" text:visited-style-name="Index_20_Link"><text:span text:style-name="T14">2.7 <text:s/>¿Qué son volúmenes persistentes?<text:tab/>4</text:span></text:a></text:p>
          <text:p text:style-name="P17"><text:a xlink:type="simple" xlink:href="#_r01r6st7fhia" text:style-name="Index_20_Link" text:visited-style-name="Index_20_Link"><text:span text:style-name="T14">2.8 <text:s/>¿Cómo utilizamos despliegues de aplicación, volúmenes persistentes y servicios?<text:tab/>4</text:span></text:a></text:p>
          <text:p text:style-name="P15"><text:a xlink:type="simple" xlink:href="#_d522umg90fqi" text:style-name="Index_20_Link" text:visited-style-name="Index_20_Link"><text:span text:style-name="T14">3. Kubernetes con un solo nodo: MiniKube<text:tab/>4</text:span></text:a></text:p>
          <text:p text:style-name="P17"><text:a xlink:type="simple" xlink:href="#_8ued2mxr0360" text:style-name="Index_20_Link" text:visited-style-name="Index_20_Link"><text:span text:style-name="T14">3.1 <text:s/>Instalando MiniKube en sistemas Linux<text:tab/>5</text:span></text:a></text:p>
          <text:p text:style-name="P15"><text:a xlink:type="simple" xlink:href="#_8wpk6er5avxl" text:style-name="Index_20_Link" text:visited-style-name="Index_20_Link"><text:span text:style-name="T14">4. Utilizando Kubernetes y <text:s/>MiniKube<text:tab/>6</text:span></text:a></text:p>
          <text:p text:style-name="P15"><text:a xlink:type="simple" xlink:href="#_73kjkd7e0i1x" text:style-name="Index_20_Link" text:visited-style-name="Index_20_Link"><text:span text:style-name="T14">5. Interfaces gráficas para la gestión de Kubernetes<text:tab/>7</text:span></text:a></text:p>
          <text:p text:style-name="P15"><text:a xlink:type="simple" xlink:href="#_suxappm1ghic" text:style-name="Index_20_Link" text:visited-style-name="Index_20_Link"><text:span text:style-name="T14">6. Desplegando Kubernetes en principales proveedores<text:tab/>7</text:span></text:a></text:p>
          <text:p text:style-name="P15"><text:a xlink:type="simple" xlink:href="#_kg058fcxu2cb" text:style-name="Index_20_Link" text:visited-style-name="Index_20_Link"><text:span text:style-name="T14">7. Bibliografía<text:tab/>7</text:span></text:a></text:p>
        </text:index-body>
      </text:table-of-content>
      <text:p text:style-name="P13"/>
      <text:p text:style-name="P18"/>
      <text:p text:style-name="P18"/>
      <text:p text:style-name="P19"><text:span text:style-name="T17">UD08. Introducción a Kubernetes</text:span></text:p>
      <text:list xml:id="list2072140953" text:style-name="WWNum4">
        <text:list-item>
          <text:p text:style-name="P45"><text:bookmark text:name="_dbh0n1vac4c8"/>Introducción</text:p>
        </text:list-item>
      </text:list>
      <text:p text:style-name="P11">En esta unidad haremos una introducción a los orquestadores usando “<text:span text:style-name="T20">Kubernetes”</text:span>. Esta herramienta por sí sola es bastante extensa, por lo cual en esta unidad simplemente haremos una pequeña introducción. El objetivo de esta introducción será aclarar algunos conceptos básicos y asimilarlos mediante algunos casos prácticos sencillos. </text:p>
      <text:list xml:id="list75701833163036" text:continue-numbering="true" text:style-name="WWNum4">
        <text:list-item>
          <text:p text:style-name="P46"><text:bookmark text:name="_vyhbfp4t666x"/>Kubernetes</text:p>
          <text:list>
            <text:list-item>
              <text:p text:style-name="P49"><text:bookmark text:name="_b67l6dln656a"/>¿Qué es Kubernetes?</text:p>
            </text:list-item>
          </text:list>
        </text:list-item>
      </text:list>
      <text:p text:style-name="P11">La herramienta “<text:span text:style-name="T20">Kubernetes</text:span>”, también conocida en muchos sitios como “<text:span text:style-name="T20">K8s</text:span>”, es una herramienta que nos permite crear un clúster de contenedores y orquestar su despliegue. Cuando hablamos del término “<text:span text:style-name="T20">orquestar</text:span>”, nos referimos a que permite cosas tales como realizar despliegue automático, escalado de servicios y balanceo de carga.</text:p>
      <text:p text:style-name="P11">“<text:span text:style-name="T20">Kubernetes</text:span>” fue creado por Google y es software libre. Actualmente, lo tienen incorporado para un sencillo uso servicios como OVH, Google Cloud, Azure o AWS.</text:p>
      <text:p text:style-name="P11">Para más información, <text:a xlink:type="simple" xlink:href="https://kubernetes.io/" text:style-name="ListLabel_20_28" text:visited-style-name="ListLabel_20_28"><text:span text:style-name="T21">https://kubernetes.io/</text:span></text:a> y <text:a xlink:type="simple" xlink:href="https://kubernetes.io/docs/home/" text:style-name="ListLabel_20_28" text:visited-style-name="ListLabel_20_28"><text:span text:style-name="T21">https://kubernetes.io/docs/home/</text:span></text:a>.</text:p>
      <text:p text:style-name="P11"/>
      <text:list xml:id="list75700455461472" text:continue-numbering="true" text:style-name="WWNum4">
        <text:list-item>
          <text:list>
            <text:list-item>
              <text:p text:style-name="P49"><text:bookmark text:name="_mec99ua0nohv"/><text:soft-page-break/>Entendiendo Kubernetes</text:p>
            </text:list-item>
          </text:list>
        </text:list-item>
      </text:list>
      <text:p text:style-name="P26">Una idea muy simple para entender qué puede hacer “<text:span text:style-name="T20">Kubernetes</text:span>” por nosotros, es que nos va a liberar de preocuparnos de todo lo relacionado con el despliegue y escalado. Nosotros, mediante comandos y/o un fichero <text:span text:style-name="T11">YAML</text:span> le indicaremos cómo queremos que se despliegue nuestra aplicación y “<text:span text:style-name="T20">Kubernetes</text:span>” se encargará de todo.</text:p>
      <text:p text:style-name="P26">Google editó un cómic explicando las posibilidades de “Kubernetes”. <text:span text:style-name="T23">Es extremadamente recomendable su lectura</text:span> para comprender bien las posibilidades de “Kubernetes”</text:p>
      <text:p text:style-name="P26">Lo tenéis disponible en <text:a xlink:type="simple" xlink:href="https://cloud.google.com/kubernetes-engine/kubernetes-comic?hl=es-419" text:style-name="ListLabel_20_28" text:visited-style-name="ListLabel_20_28"><text:span text:style-name="T21">https://cloud.google.com/kubernetes-engine/kubernetes-comic?hl=es-419</text:span></text:a></text:p>
      <text:p text:style-name="P26"><text:span text:style-name="T23">Leerlo no es una pérdida de tiempo. (Nota, si no se os abre con Firefox, probad con Chrome).</text:span></text:p>
      <text:p text:style-name="P27"/>
      <text:list xml:id="list75701966266242" text:continue-numbering="true" text:style-name="WWNum4">
        <text:list-item>
          <text:list>
            <text:list-item>
              <text:p text:style-name="P49"><text:bookmark text:name="_hj9z9iqssg5j"/>¿Cómo se estructura un clúster Kubernetes?</text:p>
            </text:list-item>
          </text:list>
        </text:list-item>
      </text:list>
      <text:p text:style-name="P25">Para explicar cómo se estructura “<text:span text:style-name="T20">Kubernetes</text:span>” nos apoyaremos en la siguiente imagen</text:p>
      <text:p text:style-name="P25"/>
      <text:p text:style-name="P12"><draw:frame draw:style-name="fr1" draw:name="image6.png" text:anchor-type="as-char" svg:width="1.9339in" svg:height="1.5661in" draw:z-index="0"><draw:image xlink:href="Pictures/10000201000001DC00000181FEB3E48A4F2A480E.png" xlink:type="simple" xlink:show="embed" xlink:actuate="onLoad" loext:mime-type="image/png"/></draw:frame></text:p>
      <text:p text:style-name="P28"><text:span text:style-name="T25">Fuente imagen: </text:span><text:a xlink:type="simple" xlink:href="https://kubernetes.io/docs/tutorials/kubernetes-basics/create-cluster/cluster-intro/" text:style-name="ListLabel_20_29" text:visited-style-name="ListLabel_20_29"><text:span text:style-name="T22">https://kubernetes.io/docs/tutorials/kubernetes-basics/create-cluster/cluster-intro/</text:span></text:a><text:span text:style-name="T25"> </text:span></text:p>
      <text:p text:style-name="P29"/>
      <text:p text:style-name="P11">Un clúster “<text:span text:style-name="T20">Kubernetes</text:span>” se estructura en uno o varios nodos. El software encargado de lanzar cada nodo se llama “<text:span text:style-name="T20">Kubelet</text:span>”. <text:s/>Cada uno de estos nodos:</text:p>
      <text:list xml:id="list3452347881" text:style-name="WWNum1">
        <text:list-item>
          <text:p text:style-name="P30">Pueden estar en distintas máquinas.</text:p>
        </text:list-item>
        <text:list-item>
          <text:p text:style-name="P33">Contienen uno o varios Pods (veremos más adelante este término).</text:p>
          <text:list>
            <text:list-item>
              <text:p text:style-name="P36">Usando estos Pods, ejecutan la aplicación.</text:p>
            </text:list-item>
          </text:list>
        </text:list-item>
        <text:list-item>
          <text:p text:style-name="P33">Al menos uno de ellos es “maestro” y es el encargado de coordinar los distintos nodos.</text:p>
          <text:list>
            <text:list-item>
              <text:p text:style-name="P39">Pueden existir “réplicas” del nodo maestro.</text:p>
            </text:list-item>
          </text:list>
        </text:list-item>
      </text:list>
      <text:p text:style-name="P10"><text:span text:style-name="T12"><text:s/>❕</text:span><text:span text:style-name="T13"> </text:span><text:span text:style-name="T11">Atención: </text:span>durante esta unidad solo veremos casos prácticos con un solo nodo.</text:p>
      <text:list xml:id="list75700139302724" text:continue-list="list75701966266242" text:style-name="WWNum4">
        <text:list-item>
          <text:list>
            <text:list-item>
              <text:p text:style-name="P50"><text:bookmark text:name="_iol64q9i0w94"/>¿Qué es un Pod?</text:p>
            </text:list-item>
          </text:list>
        </text:list-item>
      </text:list>
      <text:p text:style-name="P11">“<text:span text:style-name="T20">Kubernetes</text:span>”, al contrario de lo que pueda parecer, no trabaja directamente con los contenedores, sino que la unidad mínima con la que opera son los “<text:span text:style-name="T20">Pods</text:span>”. Los “<text:span text:style-name="T20">Pods</text:span>” pueden estar formados por uno o varios contenedores Docker (estando este conjunto <text:s/>de contenedores alojados en una misma máquina), aunque es habitual que un “<text:span text:style-name="T20">Pod</text:span>” únicamente contenga un contenedor.</text:p>
      <text:p text:style-name="P11">Más información en <text:a xlink:type="simple" xlink:href="https://kubernetes.io/docs/concepts/workloads/pods/" text:style-name="ListLabel_20_28" text:visited-style-name="ListLabel_20_28"><text:span text:style-name="T21">https://kubernetes.io/docs/concepts/workloads/pods/</text:span></text:a></text:p>
      <text:list xml:id="list75700495558475" text:continue-numbering="true" text:style-name="WWNum4">
        <text:list-item>
          <text:list>
            <text:list-item>
              <text:p text:style-name="P50"><text:bookmark text:name="_pu6h6qdeq4fq"/>¿Qué es un despliegue de una aplicación?</text:p>
            </text:list-item>
          </text:list>
        </text:list-item>
      </text:list>
      <text:p text:style-name="P11">Dentro de “<text:span text:style-name="T20">Kubernetes</text:span>” un “<text:span text:style-name="T20">despliegue de una aplicación</text:span>” define unas características de una aplicación implementadas mediante uno o varios “<text:span text:style-name="T20">Pods</text:span>”. Estos son los que contienen la aplicación. La vida de estos “<text:span text:style-name="T20">Pods</text:span>” está controlada por un controlador que se encarga de tareas como escalado, reinicio o actualización. </text:p>
      <text:p text:style-name="P11">Más información en <text:a xlink:type="simple" xlink:href="https://kubernetes.io/es/docs/concepts/workloads/controllers/deployment/" text:style-name="ListLabel_20_28" text:visited-style-name="ListLabel_20_28"><text:span text:style-name="T21">https://kubernetes.io/es/docs/concepts/workloads/controllers/deployment/</text:span></text:a></text:p>
      <text:list xml:id="list75700784113664" text:continue-numbering="true" text:style-name="WWNum4">
        <text:list-item>
          <text:list>
            <text:list-item>
              <text:p text:style-name="P50"><text:bookmark text:name="_cu2k0fmbcdb1"/>¿Qué es un servicio?</text:p>
            </text:list-item>
          </text:list>
        </text:list-item>
      </text:list>
      <text:p text:style-name="P11">Dentro de “<text:span text:style-name="T20">Kubernetes</text:span>” un servicio es una forma de exponer un “<text:span text:style-name="T20">despliegue de una aplicación</text:span>” (como el indicado anteriormente) como un servicio de red. No todos los despliegues deben ser expuestos, solo aquellos que queramos que puedan ser accedidos desde fuera del clúster.</text:p>
      <text:p text:style-name="P11">Más información en <text:a xlink:type="simple" xlink:href="https://kubernetes.io/docs/concepts/services-networking/service/" text:style-name="ListLabel_20_28" text:visited-style-name="ListLabel_20_28"><text:span text:style-name="T21">https://kubernetes.io/docs/concepts/services-networking/service/</text:span></text:a></text:p>
      <text:list xml:id="list75700825729380" text:continue-numbering="true" text:style-name="WWNum4">
        <text:list-item>
          <text:list>
            <text:list-item>
              <text:p text:style-name="P50"><text:bookmark text:name="_vyewbwkw6oow"/>¿Qué son volúmenes persistentes?</text:p>
            </text:list-item>
          </text:list>
        </text:list-item>
      </text:list>
      <text:p text:style-name="P11">El concepto de volumen persistente en “<text:span text:style-name="T20">Kubernetes</text:span>” es diferente al concepto de volumen en Docker: mientras que en “Docker” un volumen simplemente es un directorio del anfitrión montado en unos contenedores, en “<text:span text:style-name="T20">Kubernetes</text:span>” los volúmenes persistentes, añade una abstracción que permite pueden estar en cualquier lugar del clúster.</text:p>
      <text:p text:style-name="P11">Más información en <text:a xlink:type="simple" xlink:href="https://kubernetes.io/docs/concepts/storage/volumes" text:style-name="ListLabel_20_28" text:visited-style-name="ListLabel_20_28"><text:span text:style-name="T21">https://kubernetes.io/docs/concepts/storage/volumes</text:span></text:a> </text:p>
      <text:list xml:id="list75701673668260" text:continue-numbering="true" text:style-name="WWNum4">
        <text:list-item>
          <text:list>
            <text:list-item>
              <text:p text:style-name="P50"><text:bookmark text:name="_r01r6st7fhia"/>¿Cómo utilizamos despliegues de aplicación, volúmenes persistentes y servicios?</text:p>
            </text:list-item>
          </text:list>
        </text:list-item>
      </text:list>
      <text:p text:style-name="P11">A efectos prácticos, mediante “<text:span text:style-name="T20">despliegues de aplicación</text:span>” lo que hacemos es crear los “<text:span text:style-name="T20">Pods</text:span>” necesarios para que funcione la aplicación. Un primer ejemplo podría ser un despliegue donde creamos una base de datos <text:span text:style-name="T11">MySQL</text:span>. Este podría además tener un volumen persistente para almacenar la base de datos.</text:p>
      <text:p text:style-name="P11">Un segundo ejemplo de despliegue podría ser desplegar una aplicación web. Un despliegue puede utilizar otro (por ejemplo, la aplicación web del segundo despliegue podría utilizar el servicio <text:span text:style-name="T11">MySQL</text:span>).</text:p>
      <text:p text:style-name="P11">Finalmente, los servicios en “<text:span text:style-name="T20">Kubernetes</text:span>” se utilizan para exponer en la red aquellas aplicaciones que queremos sean accedidas. Por ejemplo, el primer despliegue posiblemente no necesitaría ser expuesto, pero el segundo, con la aplicación web, probablemente sí.</text:p>
      <text:p text:style-name="P11"/>
      <text:list xml:id="list75701118765482" text:continue-numbering="true" text:style-name="WWNum4">
        <text:list-item>
          <text:p text:style-name="P46"><text:bookmark text:name="_d522umg90fqi"/>Kubernetes con un solo nodo: MiniKube</text:p>
        </text:list-item>
      </text:list>
      <text:p text:style-name="P11">Como hemos comentado anteriormente, en esta unidad de introducción a “<text:span text:style-name="T20">Kubernetes</text:span>”, nuestro clúster estará formado por un único nodo maestro. Esta práctica es habitual, sobre todo en momentos de desarrollo: los desarrolladores tienen un pequeño clúster mono-nodo en su máquina y una vez funciona todo correctamente, realizan el despliegue.</text:p>
      <text:p text:style-name="P11"/>
      <text:p text:style-name="P11">Para facilitarnos esta configuración, utilizaremos “<text:span text:style-name="T20">MiniKube</text:span>”. Aunque “<text:span text:style-name="T20">MiniKube</text:span>” posee distintos tipos de instalación, generalmente se ejecuta sobre una máquina virtual (<text:span text:style-name="T23">Hypervisor tipo 2)</text:span> e incluye internamente tanto “<text:span text:style-name="T20">Docker</text:span>” como “<text:span text:style-name="T20">Kubernetes</text:span>”. Más información sobre las posibles instalaciones en <text:a xlink:type="simple" xlink:href="https://minikube.sigs.k8s.io/docs/drivers/" text:style-name="ListLabel_20_28" text:visited-style-name="ListLabel_20_28"><text:span text:style-name="T21">https://minikube.sigs.k8s.io/docs/drivers/</text:span></text:a>.</text:p>
      <text:p text:style-name="P11">Al instalar “<text:span text:style-name="T20">MiniKube</text:span>”, este y configurará todo lo necesario para poder trabajar con “<text:span text:style-name="T20">Kubernetes</text:span>” en mono-nodo. <text:s/>Además, instalaremos el cliente “<text:span text:style-name="T20">kubectl</text:span>” para interactuar fácilmente vía consola.</text:p>
      <text:p text:style-name="P11">Esta configuración es muy útil para que los desarrolladores prueben sus productos desplegados en “<text:span text:style-name="T20">Kubernetes</text:span>” luego fácilmente puedan desplegarse sin ningún cambio en sitios como Google Cloud, AWS, Azure u OVH.</text:p>
      <text:p text:style-name="P11"/>
      <text:p text:style-name="P11">Más información de “<text:span text:style-name="T20">MiniKube</text:span>” <text:a xlink:type="simple" xlink:href="https://minikube.sigs.k8s.io/docs/" text:style-name="ListLabel_20_28" text:visited-style-name="ListLabel_20_28"><text:span text:style-name="T21">https://minikube.sigs.k8s.io/docs/</text:span></text:a> </text:p>
      <text:list xml:id="list75701120529982" text:continue-numbering="true" text:style-name="WWNum4">
        <text:list-item>
          <text:list>
            <text:list-item>
              <text:p text:style-name="P50"><text:bookmark text:name="_8ued2mxr0360"/>Instalando MiniKube en sistemas Linux</text:p>
            </text:list-item>
          </text:list>
        </text:list-item>
      </text:list>
      <text:p text:style-name="P11">En esta dirección <text:a xlink:type="simple" xlink:href="https://minikube.sigs.k8s.io/docs/start/" text:style-name="ListLabel_20_28" text:visited-style-name="ListLabel_20_28"><text:span text:style-name="T21">https://minikube.sigs.k8s.io/docs/start/</text:span></text:a> tenéis tanto los requisitos mínimos de hardware (<text:span text:style-name="T23">entre los que destacan tener una CPU con 2 o más núcleos y al menos 2 GB de RAM</text:span>) como distintas propuestas de instalación de “<text:span text:style-name="T20">MiniKube</text:span>”. Nosotros seguiremos la propuesta para instalarlo en sistemas Debian/Ubuntu.</text:p>
      <text:p text:style-name="P11">En primer lugar, realizaremos</text:p>
      <table:table table:name="Table1" table:style-name="Table1">
        <table:table-column table:style-name="Table1.A"/>
        <table:table-row table:style-name="Table1.1">
          <table:table-cell table:style-name="Table1.A1" office:value-type="string">
            <text:p text:style-name="P43"><text:span text:style-name="T27">curl -LO https://storage.googleapis.com/minikube/releases/latest/minikube_latest_amd64.deb</text:span></text:p>
          </table:table-cell>
        </table:table-row>
      </table:table>
      <text:p text:style-name="P11">y tras ello</text:p>
      <table:table table:name="Table2" table:style-name="Table2">
        <table:table-column table:style-name="Table2.A"/>
        <table:table-row table:style-name="Table2.1">
          <table:table-cell table:style-name="Table2.A1" office:value-type="string">
            <text:p text:style-name="P43"><text:span text:style-name="T28">sudo dpkg -i minikube_latest_amd64.deb</text:span></text:p>
          </table:table-cell>
        </table:table-row>
      </table:table>
      <text:p text:style-name="P11">Obteniendo un resultado similar a:</text:p>
      <text:p text:style-name="P11"><draw:frame draw:style-name="fr1" draw:name="image3.png" text:anchor-type="as-char" svg:width="6.6929in" svg:height="1.722in" draw:z-index="0"><draw:image xlink:href="Pictures/10000201000003BB000000F6AEE015CAB0746185.png" xlink:type="simple" xlink:show="embed" xlink:actuate="onLoad" loext:mime-type="image/png"/></draw:frame></text:p>
      <text:p text:style-name="P11">Una vez instalado, iniciaremos el clúster de “<text:span text:style-name="T20">Kubernetes</text:span>” mediante “<text:span text:style-name="T20">MiniKube</text:span>” con:</text:p>
      <table:table table:name="Table3" table:style-name="Table3">
        <table:table-column table:style-name="Table3.A"/>
        <table:table-row table:style-name="Table3.1">
          <table:table-cell table:style-name="Table3.A1" office:value-type="string">
            <text:p text:style-name="P43"><text:span text:style-name="T28">minikube start</text:span></text:p>
          </table:table-cell>
        </table:table-row>
      </table:table>
      <text:p text:style-name="P11"><text:soft-page-break/>Obteniendo un resultado similar a:</text:p>
      <text:p text:style-name="Standard"><draw:frame draw:style-name="fr1" draw:name="image5.png" text:anchor-type="as-char" svg:width="6.6929in" svg:height="1.5138in" draw:z-index="0"><draw:image xlink:href="Pictures/10000201000003E7000000E3332E0CFF835A3012.png" xlink:type="simple" xlink:show="embed" xlink:actuate="onLoad" loext:mime-type="image/png"/></draw:frame></text:p>
      <text:p text:style-name="P11">La propia instalación de “<text:span text:style-name="T20">MiniKube</text:span>” nos avisa que no tenemos instalado “<text:span text:style-name="T20">kubectl</text:span>” e incluso nos da una alternativa a su uso. Pero dado que existe gran documentación de “<text:span text:style-name="T20">Kubernetes</text:span>” usando esta herramienta, la instalaremos mediante los siguientes comandos:</text:p>
      <table:table table:name="Table4" table:style-name="Table4">
        <table:table-column table:style-name="Table4.A"/>
        <table:table-row table:style-name="Table4.1">
          <table:table-cell table:style-name="Table4.A1" office:value-type="string">
            <text:p text:style-name="P43"><text:span text:style-name="T27">curl -LO </text:span><text:span text:style-name="T32">"https://dl.k8s.io/release/</text:span><text:span text:style-name="T33">$(curl -L -s https://dl.k8s.io/release/stable.txt)</text:span><text:span text:style-name="T32">/bin/linux/amd64/kubectl"</text:span></text:p>
          </table:table-cell>
        </table:table-row>
      </table:table>
      <text:p text:style-name="P11">Y tras la descarga, proporcionamos permiso de ejecución y movemos el fichero a “<text:span text:style-name="T20">/usr/local/bin</text:span>”.</text:p>
      <table:table table:name="Table5" table:style-name="Table5">
        <table:table-column table:style-name="Table5.A"/>
        <table:table-row table:style-name="Table5.1">
          <table:table-cell table:style-name="Table5.A1" office:value-type="string">
            <text:p text:style-name="P43"><text:span text:style-name="T28">chmod +x ./kubectl</text:span></text:p>
          </table:table-cell>
        </table:table-row>
      </table:table>
      <text:p text:style-name="P20"/>
      <table:table table:name="Table6" table:style-name="Table6">
        <table:table-column table:style-name="Table6.A"/>
        <table:table-row table:style-name="Table6.1">
          <table:table-cell table:style-name="Table6.A1" office:value-type="string">
            <text:p text:style-name="P43"><text:span text:style-name="T28">sudo mv ./kubectl /usr/</text:span><text:span text:style-name="T34">local</text:span><text:span text:style-name="T28">/bin/kubectl</text:span></text:p>
          </table:table-cell>
        </table:table-row>
      </table:table>
      <text:p text:style-name="P11"/>
      <text:p text:style-name="P11">Obteniendo un resultado similar al de la imagen:</text:p>
      <text:p text:style-name="P11"><draw:frame draw:style-name="fr1" draw:name="image2.png" text:anchor-type="as-char" svg:width="6.6929in" svg:height="1.1665in" draw:z-index="0"><draw:image xlink:href="Pictures/10000201000003EC000000AEA7A45214EFBE0889.png" xlink:type="simple" xlink:show="embed" xlink:actuate="onLoad" loext:mime-type="image/png"/></draw:frame></text:p>
      <text:p text:style-name="Standard">Dado que “<text:span text:style-name="T20">MiniKube</text:span>” realmente es un clúster de Kubernetes virtualizado, existen otras opciones de utilizar “<text:span text:style-name="T20">kubectl</text:span>” sin instalarlo en nuestra máquina local, mediante un alias o un enlace simbólico a “<text:span text:style-name="T20">kubectl</text:span>” dentro del clúster. <text:s/>En el siguiente enlace podéis encontrar más información de como realizarlo <text:a xlink:type="simple" xlink:href="https://minikube.sigs.k8s.io/docs/handbook/kubectl/" text:style-name="ListLabel_20_28" text:visited-style-name="ListLabel_20_28"><text:span text:style-name="T21">https://minikube.sigs.k8s.io/docs/handbook/kubectl/</text:span></text:a></text:p>
      <text:p text:style-name="P11"/>
      <text:p text:style-name="P11">”<text:span text:style-name="T20">MiniKube</text:span>” también incluye un “dashboard” para poder utilizar y visualizar algunos elementos de manera gráfica. Podemos invocarlo usando:</text:p>
      <table:table table:name="Table7" table:style-name="Table7">
        <table:table-column table:style-name="Table7.A"/>
        <table:table-row table:style-name="Table7.1">
          <table:table-cell table:style-name="Table7.A1" office:value-type="string">
            <text:p text:style-name="P43"><text:span text:style-name="T28">minikube dashboard</text:span></text:p>
          </table:table-cell>
        </table:table-row>
      </table:table>
      <text:list xml:id="list75702108455844" text:continue-numbering="true" text:style-name="WWNum4">
        <text:list-item>
          <text:p text:style-name="P46"><text:bookmark text:name="_8wpk6er5avxl"/>Utilizando Kubernetes y <text:s/>MiniKube</text:p>
        </text:list-item>
      </text:list>
      <text:p text:style-name="P11">Por la gran profundidad de “<text:span text:style-name="T20">Kubernetes</text:span>”, esta unidad está bastante simplificada. Una vez entendida la estructura base de cómo funciona esta herramienta (clúster, despliegue, servicio, etc.), dejamos los casos prácticos de la unidad y la “<text:span text:style-name="T20">CheatSheet</text:span>” como herramientas autoguiadas para comprender de forma aplicada los principales comandos de “<text:span text:style-name="T20">Kubernetes</text:span>” y “<text:span text:style-name="T20">MiniKube</text:span>”, <text:s/>así como la configuración de “<text:span text:style-name="T20">Kubernetes</text:span>” mediante ficheros <text:span text:style-name="T11">YAML</text:span>.</text:p>
      <text:p text:style-name="P42"><text:span text:style-name="T10"><text:s/>📖 </text:span><text:span text:style-name="T11">Importante: </text:span>recordad que con cada reinicio de la máquina, deberéis iniciar de nuevo el clúster virtualizado que hemos creado con “<text:span text:style-name="T20">minikube start</text:span>”.</text:p>
      <text:list xml:id="list75701003126812" text:continue-numbering="true" text:style-name="WWNum4">
        <text:list-item>
          <text:p text:style-name="P46"><text:bookmark text:name="_73kjkd7e0i1x"/>Interfaces gráficas para la gestión de Kubernetes</text:p>
        </text:list-item>
      </text:list>
      <text:p text:style-name="P11">En este punto recomendamos dos elementos que mediante interfaz gráfica nos permiten la gestión de “<text:span text:style-name="T20">Kubernetes</text:span>”:</text:p>
      <text:list xml:id="list1603441350" text:style-name="WWNum3">
        <text:list-item>
          <text:p text:style-name="P31"><text:span text:style-name="T11">Helm: <text:s/></text:span>permite la instalación sencilla de aplicaciones en “<text:span text:style-name="T20">Kubernetes</text:span>”.</text:p>
          <text:list>
            <text:list-item>
              <text:p text:style-name="P37"><text:a xlink:type="simple" xlink:href="https://helm.sh/" text:style-name="ListLabel_20_28" text:visited-style-name="ListLabel_20_28"><text:span text:style-name="T21">https://helm.sh/</text:span></text:a></text:p>
            </text:list-item>
          </text:list>
        </text:list-item>
        <text:list-item>
          <text:p text:style-name="P34"><text:span text:style-name="T11">Rancher</text:span>: software para gestión de contenedores y clúster con “<text:span text:style-name="T20">Kubernetes</text:span>”.</text:p>
          <text:list>
            <text:list-item>
              <text:p text:style-name="P37"><text:a xlink:type="simple" xlink:href="https://rancher.com/" text:style-name="ListLabel_20_28" text:visited-style-name="ListLabel_20_28"><text:span text:style-name="T21">https://rancher.com/</text:span></text:a></text:p>
            </text:list-item>
          </text:list>
        </text:list-item>
        <text:list-item>
          <text:p text:style-name="P34"><text:span text:style-name="T11">Plugin Visual Studio Code “Kubernetes”:</text:span> plugin que nos permite visualizar y editar opciones de “<text:span text:style-name="T20">Kubernetes</text:span>” dentro del IDE Visual Studio Code.</text:p>
          <text:list>
            <text:list-item>
              <text:p text:style-name="P37"><text:a xlink:type="simple" xlink:href="https://marketplace.visualstudio.com/items?itemName=ms-kubernetes-tools.vscode-kubernetes-tools" text:style-name="ListLabel_20_28" text:visited-style-name="ListLabel_20_28"><text:span text:style-name="T21">https://marketplace.visualstudio.com/items?itemName=ms-kubernetes-tools.vscode-kubernetes-tools</text:span></text:a> </text:p>
            </text:list-item>
          </text:list>
        </text:list-item>
      </text:list>
      <text:list xml:id="list75701333673040" text:continue-list="list75701003126812" text:style-name="WWNum4">
        <text:list-item>
          <text:p text:style-name="P47"><text:bookmark text:name="_suxappm1ghic"/>Desplegando Kubernetes en principales proveedores</text:p>
        </text:list-item>
      </text:list>
      <text:p text:style-name="P11">En este punto proporcionamos algunos enlaces de como desplegar de forma sencilla aplicaciones usando “<text:span text:style-name="T20">Kubernetes</text:span>” en los principales servicios de computación en la nube:</text:p>
      <text:list xml:id="list2304495791" text:style-name="WWNum2">
        <text:list-item>
          <text:p text:style-name="P32"><text:span text:style-name="T11">Google Cloud: </text:span></text:p>
          <text:list>
            <text:list-item>
              <text:p text:style-name="P38">Enlace al servicio: <text:a xlink:type="simple" xlink:href="https://cloud.google.com/kubernetes-engine?hl=es" text:style-name="ListLabel_20_28" text:visited-style-name="ListLabel_20_28"><text:span text:style-name="T21">https://cloud.google.com/kubernetes-engine?hl=es</text:span></text:a> </text:p>
            </text:list-item>
            <text:list-item>
              <text:p text:style-name="P38">Guía rápida: <text:a xlink:type="simple" xlink:href="https://cloud.google.com/code/docs/intellij/quickstart-k8s" text:style-name="ListLabel_20_28" text:visited-style-name="ListLabel_20_28"><text:span text:style-name="T21">https://cloud.google.com/code/docs/intellij/quickstart-k8s</text:span></text:a></text:p>
            </text:list-item>
          </text:list>
        </text:list-item>
        <text:list-item>
          <text:p text:style-name="P35"><text:span text:style-name="T11">AWS</text:span>:</text:p>
          <text:list>
            <text:list-item>
              <text:p text:style-name="P38">Amazon Elastic Kubernetes Service: <text:a xlink:type="simple" xlink:href="https://aws.amazon.com/es/eks/" text:style-name="ListLabel_20_28" text:visited-style-name="ListLabel_20_28"><text:span text:style-name="T21">https://aws.amazon.com/es/eks/</text:span></text:a> </text:p>
            </text:list-item>
            <text:list-item>
              <text:p text:style-name="P38">Taller de funcionamiento: <text:a xlink:type="simple" xlink:href="https://www.eksworkshop.com/" text:style-name="ListLabel_20_28" text:visited-style-name="ListLabel_20_28"><text:span text:style-name="T21">https://www.eksworkshop.com/</text:span></text:a></text:p>
            </text:list-item>
          </text:list>
        </text:list-item>
        <text:list-item>
          <text:p text:style-name="P35"><text:span text:style-name="T11">Azure</text:span>:</text:p>
          <text:list>
            <text:list-item>
              <text:p text:style-name="P38">Kubernetes: <text:a xlink:type="simple" xlink:href="https://azure.microsoft.com/es-es/services/kubernetes-service/" text:style-name="ListLabel_20_28" text:visited-style-name="ListLabel_20_28"><text:span text:style-name="T21">https://azure.microsoft.com/es-es/services/kubernetes-service/</text:span></text:a></text:p>
            </text:list-item>
            <text:list-item>
              <text:p text:style-name="P38">Guía aprendizaje:</text:p>
              <text:list>
                <text:list-item>
                  <text:p text:style-name="P44"><text:a xlink:type="simple" xlink:href="https://azure.microsoft.com/mediahandler/files/resourcefiles/kubernetes-learning-path/Kubernetes%20Learning%20Path%20version%201.0.pdf" text:style-name="ListLabel_20_28" text:visited-style-name="ListLabel_20_28"><text:span text:style-name="T21">https://azure.microsoft.com/mediahandler/files/resourcefiles/kubernetes-learning-path/Kubernetes%20Learning%20Path%20version%201.0.pdf</text:span></text:a></text:p>
                </text:list-item>
              </text:list>
            </text:list-item>
          </text:list>
        </text:list-item>
        <text:list-item>
          <text:p text:style-name="P35"><text:span text:style-name="T11">OVH</text:span>:</text:p>
          <text:list>
            <text:list-item>
              <text:p text:style-name="P40">Kubernetes: <text:a xlink:type="simple" xlink:href="https://www.ovhcloud.com/es-es/public-cloud/kubernetes/" text:style-name="ListLabel_20_28" text:visited-style-name="ListLabel_20_28"><text:span text:style-name="T21">https://www.ovhcloud.com/es-es/public-cloud/kubernetes/</text:span></text:a></text:p>
            </text:list-item>
          </text:list>
        </text:list-item>
      </text:list>
      <text:list xml:id="list75700585856753" text:continue-list="list75701333673040" text:style-name="WWNum4">
        <text:list-item>
          <text:p text:style-name="P48"><text:bookmark text:name="_kg058fcxu2cb"/>Bibliografía</text:p>
        </text:list-item>
      </text:list>
      <text:p text:style-name="P8">[1] Kubernetes <text:a xlink:type="simple" xlink:href="https://kubernetes.io/" text:style-name="ListLabel_20_28" text:visited-style-name="ListLabel_20_28"><text:span text:style-name="T21">https://kubernetes.io/</text:span></text:a></text:p>
      <text:p text:style-name="P8">[2] Kubernetes docs <text:a xlink:type="simple" xlink:href="https://kubernetes.io/docs/home/" text:style-name="ListLabel_20_28" text:visited-style-name="ListLabel_20_28"><text:span text:style-name="T21">https://kubernetes.io/docs/home/</text:span></text:a></text:p>
      <text:p text:style-name="P8">[3] MiniKube <text:a xlink:type="simple" xlink:href="https://minikube.sigs.k8s.io/docs/" text:style-name="ListLabel_20_28" text:visited-style-name="ListLabel_20_28"><text:span text:style-name="T21">https://minikube.sigs.k8s.io/do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ize="8pt" fo:font-style="italic" style:text-underline-style="solid" style:text-underline-width="auto" style:text-underline-color="font-color" style:font-size-asian="8pt" style:font-style-asian="italic" style:font-size-complex="8pt"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y Kubernetes<text:tab/><text:tab/>UD08. Introducción a Kubernetes</text:span></text:p>
      </style:header>
      <style:footer>
        <text:p text:style-name="MP4"><text:span text:style-name="MT1">Curso Introducción a Docker y Kubernetes<text:tab/><text:tab/>UD08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3" meta:paragraph-count="127" meta:word-count="1534" meta:character-count="11395" meta:non-whitespace-character-count="9969"/>
    <meta:generator>LibreOfficeDev/6.0.5.2$Linux_X86_64 LibreOffice_project/</meta:generator>
  </office:meta>
</office:document-meta>
</file>