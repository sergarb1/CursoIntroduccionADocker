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4000001253D5CDB784E396E42.png" manifest:media-type="image/png"/>
  <manifest:file-entry manifest:full-path="Pictures/100002010000002F00000006DBF21BC2612169B1.png" manifest:media-type="image/png"/>
  <manifest:file-entry manifest:full-path="Pictures/10000000000007800000008BADE10FA77D575FB0.png" manifest:media-type="image/png"/>
  <manifest:file-entry manifest:full-path="Pictures/100002010000007600000029ABF5F7A91F7A9EF9.png" manifest:media-type="image/png"/>
  <manifest:file-entry manifest:full-path="Pictures/10000201000002ED000000B43B5143102AEEBC9C.png" manifest:media-type="image/png"/>
  <manifest:file-entry manifest:full-path="Pictures/10000201000002420000010C335A094C8252F205.png" manifest:media-type="image/png"/>
  <manifest:file-entry manifest:full-path="Pictures/10000201000003E80000011B536D57BE0BFF3754.png" manifest:media-type="image/png"/>
  <manifest:file-entry manifest:full-path="Pictures/100002010000030B000000B5B63795A24A00E984.png" manifest:media-type="image/png"/>
  <manifest:file-entry manifest:full-path="Pictures/10000201000003E700000155B80BA0A4DBFFB73B.png" manifest:media-type="image/png"/>
  <manifest:file-entry manifest:full-path="Pictures/100002010000035A000000C84A435E50681BD84E.png" manifest:media-type="image/png"/>
  <manifest:file-entry manifest:full-path="Pictures/10000201000003C10000009FBBECC89A5BAA7A84.png" manifest:media-type="image/png"/>
  <manifest:file-entry manifest:full-path="Pictures/10000201000003A5000000989662373072482614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44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6944in" fo:margin-left="0in" fo:margin-top="0in" fo:margin-bottom="0in" table:align="left"/>
    </style:style>
    <style:style style:name="Table8.A" style:family="table-column">
      <style:table-column-properties style:column-width="6.694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6944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694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6.6944in" fo:margin-left="0in" fo:margin-top="0in" fo:margin-bottom="0in" fo:break-before="auto" fo:break-after="auto" table:align="left"/>
    </style:style>
    <style:style style:name="Table10.A" style:family="table-column">
      <style:table-column-properties style:column-width="6.694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6.6944in" fo:margin-left="0in" fo:margin-top="0in" fo:margin-bottom="0in" fo:break-before="auto" fo:break-after="auto" table:align="left"/>
    </style:style>
    <style:style style:name="Table11.A" style:family="table-column">
      <style:table-column-properties style:column-width="6.6944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6.6944in" fo:margin-left="0in" fo:margin-top="0in" fo:margin-bottom="0in" fo:break-before="auto" fo:break-after="auto" table:align="left"/>
    </style:style>
    <style:style style:name="Table12.A" style:family="table-column">
      <style:table-column-properties style:column-width="6.6944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6.6944in" fo:margin-left="0in" fo:margin-top="0in" fo:margin-bottom="0in" fo:break-before="auto" fo:break-after="auto" table:align="left"/>
    </style:style>
    <style:style style:name="Table13.A" style:family="table-column">
      <style:table-column-properties style:column-width="6.6944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text-align="center" style:justify-single-word="false" fo:break-before="auto" fo:break-after="auto"/>
    </style:style>
    <style:style style:name="P12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15%" fo:text-align="start" style:justify-single-word="false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4" style:family="paragraph" style:parent-style-name="Heading_20_1" style:list-style-name="WWNum1">
      <style:paragraph-properties fo:break-before="auto" fo:break-after="auto"/>
    </style:style>
    <style:style style:name="P25" style:family="paragraph" style:parent-style-name="Heading_20_1" style:list-style-name="WWNum1">
      <style:paragraph-properties fo:text-align="justify" style:justify-single-word="false" fo:break-before="auto" fo:break-after="auto"/>
    </style:style>
    <style:style style:name="P26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color="#333333" style:font-name="Consolas" fo:background-color="#f8f8f8" loext:char-shading-value="0" style:font-name-asian="Consolas1" style:font-name-complex="Consolas1"/>
    </style:style>
    <style:style style:name="T20" style:family="text">
      <style:text-properties fo:color="#333333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 style:font-style-complex="italic"/>
    </style:style>
    <style:style style:name="T21" style:family="text">
      <style:text-properties fo:color="#33333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2" style:family="text">
      <style:text-properties fo:color="#333333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3" style:family="text">
      <style:text-properties fo:color="#dd1144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 style:font-style-complex="italic"/>
    </style:style>
    <style:style style:name="T24" style:family="text">
      <style:text-properties fo:color="#dd1144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5" style:family="text">
      <style:text-properties fo:color="#dd1144" style:font-name="Consolas" fo:background-color="#f8f8f8" loext:char-shading-value="0" style:font-name-asian="Consolas1" style:font-name-complex="Consolas1"/>
    </style:style>
    <style:style style:name="T26" style:family="text">
      <style:text-properties fo:color="#999988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 style:font-style-complex="italic"/>
    </style:style>
    <style:style style:name="T27" style:family="text">
      <style:text-properties fo:color="#990073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 style:font-style-complex="italic"/>
    </style:style>
    <style:style style:name="T28" style:family="text">
      <style:text-properties fo:color="#99007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9" style:family="text">
      <style:text-properties fo:color="#008080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 style:font-style-complex="italic"/>
    </style:style>
    <style:style style:name="T30" style:family="text">
      <style:text-properties fo:color="#008080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31" style:family="text">
      <style:text-properties fo:color="#999999" style:font-name="Consolas" fo:font-size="8pt" fo:font-style="italic" fo:font-weight="bold" fo:background-color="#f8f8f8" loext:char-shading-value="0" style:font-name-asian="Consolas1" style:font-size-asian="8pt" style:font-style-asian="italic" style:font-weight-asian="bold" style:font-name-complex="Consolas1" style:font-size-complex="8pt" style:font-style-complex="italic" style:font-weight-complex="bold"/>
    </style:style>
    <style:style style:name="T32" style:family="text">
      <style:text-properties fo:color="#999999" style:font-name="Consolas" fo:font-size="8pt" fo:font-weight="bold" fo:background-color="#f8f8f8" loext:char-shading-value="0" style:font-name-asian="Consolas1" style:font-size-asian="8pt" style:font-weight-asian="bold" style:font-name-complex="Consolas1" style:font-size-complex="8pt" style:font-weight-complex="bold"/>
    </style:style>
    <style:style style:name="T33" style:family="text">
      <style:text-properties fo:font-size="8pt" style:font-size-asian="8pt" style:font-size-complex="8pt"/>
    </style:style>
    <style:style style:name="T3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5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bookmark text:name="_aczyuw2yex2w"/><text:span text:style-name="T1">Introducción a Docker y Kubernetes</text:span><text:span text:style-name="T2"><text:line-break/></text:span><text:span text:style-name="T3">UD 08. Caso práctico 02 - Wordpress con Kubernetes</text:span></text:p>
      <text:p text:style-name="P1"><draw:frame draw:style-name="fr1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><draw:frame draw:style-name="fr1" draw:name="image2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4"/>
      <text:p text:style-name="P5"><text:span text:style-name="T5">Autor: Sergi García Barea</text:span></text:p>
      <text:p text:style-name="P5"><text:span text:style-name="T5">Actualizado Enero 2026</text:span></text:p>
      <text:p text:style-name="P5"><text:span text:style-name="T6">Licencia</text:span></text:p>
      <text:p text:style-name="P7"/>
      <text:p text:style-name="P6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1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><text:span text:style-name="T6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9"><text:span text:style-name="T10"><text:s/>📖 </text:span><text:span text:style-name="T11">Importante</text:span></text:p>
      <text:p text:style-name="P10"/>
      <text:p text:style-name="P9"><text:span text:style-name="T12"><text:s/>❕</text:span><text:span text:style-name="T13"> </text:span><text:span text:style-name="T11">Atención</text:span></text:p>
      <text:p text:style-name="P10"/>
      <text:p text:style-name="P9"><text:span text:style-name="T10"><text:s/>💬</text:span> <text:span text:style-name="T11">Interesant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2"><text:span text:style-name="T14">1. </text:span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3"><text:span text:style-name="T14">2. </text:span><text:a xlink:type="simple" xlink:href="#_3b05p2f899fh" text:style-name="Index_20_Link" text:visited-style-name="Index_20_Link"><text:span text:style-name="T9">Paso 0: iniciar MiniKube</text:span></text:a><text:span text:style-name="T9"><text:tab/>3</text:span></text:p>
          <text:p text:style-name="P13"><text:span text:style-name="T14">3. </text:span><text:a xlink:type="simple" xlink:href="#_v5ot8tcfc7uh" text:style-name="Index_20_Link" text:visited-style-name="Index_20_Link"><text:span text:style-name="T9">Paso 1 (Fichero YAML):Desplegando MySQL mediante fichero YAML</text:span></text:a><text:span text:style-name="T9"><text:tab/>3</text:span></text:p>
          <text:p text:style-name="P13"><text:span text:style-name="T14">4. </text:span><text:a xlink:type="simple" xlink:href="#_ollh1s527my7" text:style-name="Index_20_Link" text:visited-style-name="Index_20_Link"><text:span text:style-name="T9">Paso 2 (Fichero YAML):Desplegando Wordpress mediante fichero YAML</text:span></text:a><text:span text:style-name="T9"><text:tab/>5</text:span></text:p>
          <text:p text:style-name="P13"><text:span text:style-name="T14">5. </text:span><text:a xlink:type="simple" xlink:href="#_rgj10zjv46q5" text:style-name="Index_20_Link" text:visited-style-name="Index_20_Link"><text:span text:style-name="T9">Paso 3: Accediendo al servicio</text:span></text:a><text:span text:style-name="T9"><text:tab/>6</text:span></text:p>
          <text:p text:style-name="P13"><text:span text:style-name="T14">6. </text:span><text:a xlink:type="simple" xlink:href="#_m1jtbkgv3d98" text:style-name="Index_20_Link" text:visited-style-name="Index_20_Link"><text:span text:style-name="T9">Paso 4(Fichero YAML): Autoescalado de Wordpress con fichero YAML</text:span></text:a><text:span text:style-name="T9"><text:tab/>8</text:span></text:p>
          <text:p text:style-name="P13"><text:span text:style-name="T14">7. </text:span><text:a xlink:type="simple" xlink:href="#_9p0xnot11ut4" text:style-name="Index_20_Link" text:visited-style-name="Index_20_Link"><text:span text:style-name="T9">Paso 5: eliminando lo creado</text:span></text:a><text:span text:style-name="T9"><text:tab/>8</text:span></text:p>
          <text:p text:style-name="P14"><text:span text:style-name="T14">8. </text:span><text:a xlink:type="simple" xlink:href="#_72yv1gty1dke" text:style-name="Index_20_Link" text:visited-style-name="Index_20_Link"><text:span text:style-name="T9">Bibliografía</text:span></text:a><text:span text:style-name="T9"><text:tab/>9</text:span></text:p>
        </text:index-body>
      </text:table-of-content>
      <text:p text:style-name="P15"/>
      <text:p text:style-name="P15"/>
      <text:p text:style-name="P17"><text:span text:style-name="T15">UD08. Caso práctico 02</text:span></text:p>
      <text:list xml:id="list3736323781" text:style-name="WWNum1">
        <text:list-item>
          <text:p text:style-name="P24"><text:bookmark text:name="_dbh0n1vac4c8"/>Introducción</text:p>
        </text:list-item>
      </text:list>
      <text:p text:style-name="P10">En este caso práctico vamos a poner en marcha un despliegue que implementará un sistema completo <text:span text:style-name="T11">Wordpress</text:span> usando “<text:span text:style-name="T18">Kubernetes</text:span>” y “<text:span text:style-name="T18">MiniKube</text:span>”. Para ellos desplegamos una aplicación <text:span text:style-name="T11">MySQL</text:span> y otra <text:span text:style-name="T11">Wordpress</text:span>. Además, realizaremos un autoescalado con este último despliegue. </text:p>
      <text:list xml:id="list45638724807200" text:continue-numbering="true" text:style-name="WWNum1">
        <text:list-item>
          <text:p text:style-name="P25"><text:bookmark text:name="_3b05p2f899fh"/>Paso 0: iniciar MiniKube</text:p>
        </text:list-item>
      </text:list>
      <text:p text:style-name="P10">Antes de empezar el caso práctico, debemos poner en marcha nuestro clúster con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3"><text:span text:style-name="T19">minikube start</text:span></text:p>
          </table:table-cell>
        </table:table-row>
      </table:table>
      <text:p text:style-name="P10"><draw:frame draw:style-name="fr1" draw:name="image7.png" text:anchor-type="as-char" svg:width="6.6929in" svg:height="1.889in" draw:z-index="0"><draw:image xlink:href="Pictures/10000201000003E80000011B536D57BE0BFF3754.png" xlink:type="simple" xlink:show="embed" xlink:actuate="onLoad" loext:mime-type="image/png"/></draw:frame></text:p>
      <text:p text:style-name="P10">Una vez puesto en marcha, podemos proseguir con el caso práctico.</text:p>
      <text:list xml:id="list45638179727160" text:continue-numbering="true" text:style-name="WWNum1">
        <text:list-item>
          <text:p text:style-name="P25"><text:bookmark text:name="_v5ot8tcfc7uh"/>Paso 1 (Fichero YAML):Desplegando MySQL mediante fichero YAML</text:p>
        </text:list-item>
      </text:list>
      <text:p text:style-name="P10">Vamos a definir la configuración en un único fichero. En él definiremos tanto la configuración del despliegue, servicio y volumen persistente de <text:span text:style-name="T11">MySQL</text:span>. Está disponible en un fichero <text:span text:style-name="T11">YAML</text:span> comentado “<text:span text:style-name="T18">mysql-deployment.yaml</text:span>” con el siguiente contenido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3"><text:span text:style-name="T20">apiVersion: </text:span><text:span text:style-name="T23">v1</text:span><text:span text:style-name="T20"><text:line-break/></text:span><text:span text:style-name="T26">#Definimos el servicio en el que expondremos MySQL</text:span><text:span text:style-name="T20"><text:line-break/>kind: </text:span><text:span text:style-name="T23">Service</text:span><text:span text:style-name="T20"><text:line-break/>metadata:<text:line-break/> <text:s/>name: </text:span><text:span text:style-name="T23">wordpress-mysql</text:span><text:span text:style-name="T20"><text:line-break/> <text:s/>labels:<text:line-break/><text:tab/>app: </text:span><text:span text:style-name="T23">wordpress</text:span><text:span text:style-name="T20"><text:line-break/></text:span><text:span text:style-name="T26">#Características del servicio MySQL</text:span><text:span text:style-name="T20"><text:line-break/>spec:<text:line-break/> <text:s/>ports:<text:line-break/><text:tab/></text:span><text:span text:style-name="T26">#MySQL se expone en el puerto 3306</text:span><text:span text:style-name="T20"><text:line-break/><text:tab/></text:span><text:span text:style-name="T27">-</text:span><text:span text:style-name="T20"> port: </text:span><text:span text:style-name="T29">3306</text:span><text:span text:style-name="T20"><text:line-break/> <text:s/>selector:<text:line-break/><text:tab/>app: </text:span><text:span text:style-name="T23">wordpress</text:span><text:span text:style-name="T20"><text:line-break/><text:tab/>tier: </text:span><text:span text:style-name="T23">mysql</text:span><text:span text:style-name="T20"><text:line-break/> <text:s/>clusterIP: </text:span><text:span text:style-name="T23">None</text:span><text:span text:style-name="T20"><text:line-break/></text:span><text:span text:style-name="T31">---</text:span><text:span text:style-name="T20"><text:line-break/></text:span><text:span text:style-name="T26">#Declaramos un volumen de persistencia para almacenar el contenido de la base de datos</text:span><text:span text:style-name="T20"><text:line-break/>apiVersion: </text:span><text:span text:style-name="T23">v1</text:span><text:span text:style-name="T20"><text:line-break/>kind: </text:span><text:span text:style-name="T23">PersistentVolumeClaim</text:span><text:span text:style-name="T20"><text:line-break/>metadata:<text:line-break/> <text:s/>name: </text:span><text:span text:style-name="T23">mysql-pv-claim</text:span><text:span text:style-name="T20"><text:line-break/> <text:s/>labels:<text:line-break/><text:tab/>app: </text:span><text:span text:style-name="T23">wordpress</text:span><text:span text:style-name="T20"><text:line-break/>spec:<text:line-break/> <text:s/>accessModes:<text:line-break/><text:tab/></text:span><text:span text:style-name="T27">-</text:span><text:span text:style-name="T20"> </text:span><text:span text:style-name="T23">ReadWriteOnce</text:span><text:span text:style-name="T20"><text:line-break/> <text:s/>resources:<text:line-break/><text:tab/>requests:<text:line-break/> <text:s/><text:tab/>storage: </text:span><text:span text:style-name="T29">20</text:span><text:span text:style-name="T23">Gi</text:span><text:span text:style-name="T20"><text:line-break/></text:span><text:span text:style-name="T31">---</text:span><text:span text:style-name="T20"><text:line-break/></text:span><text:span text:style-name="T26">#Definimos como será el despliegue del MySQL</text:span><text:span text:style-name="T20"><text:line-break/>apiVersion: </text:span><text:span text:style-name="T23">apps/v1</text:span><text:span text:style-name="T20"><text:line-break/>kind: </text:span><text:span text:style-name="T23">Deployment</text:span><text:span text:style-name="T20"><text:line-break/>metadata:<text:line-break/> <text:s/>name: </text:span><text:span text:style-name="T23">wordpress-mysql</text:span><text:span text:style-name="T20"><text:line-break/> <text:s/>labels:<text:line-break/><text:tab/>app: </text:span><text:span text:style-name="T23">wordpress</text:span><text:span text:style-name="T20"><text:line-break/>spec:<text:line-break/> <text:s/>selector:<text:line-break/><text:tab/>matchLabels:<text:line-break/> <text:s/><text:tab/>app: </text:span><text:span text:style-name="T23">wordpress</text:span><text:span text:style-name="T20"><text:line-break/> <text:s/><text:tab/>tier: </text:span><text:span text:style-name="T23">mysql</text:span><text:span text:style-name="T20"><text:line-break/> <text:s/>strategy:<text:line-break/><text:tab/>type: </text:span><text:span text:style-name="T23">Recreate</text:span><text:span text:style-name="T20"><text:line-break/> <text:s/>template:<text:line-break/><text:tab/>metadata:<text:line-break/> <text:s/><text:tab/>labels:<text:line-break/> <text:s text:c="3"/><text:tab/>app: </text:span><text:span text:style-name="T23">wordpress</text:span><text:span text:style-name="T20"><text:line-break/> <text:s text:c="3"/><text:tab/>tier: </text:span><text:span text:style-name="T23">mysql</text:span><text:span text:style-name="T20"><text:line-break/><text:tab/>spec:<text:line-break/> <text:s/><text:tab/></text:span><text:span text:style-name="T26">#Imagen para el contenedor</text:span><text:span text:style-name="T20"><text:line-break/> <text:s/><text:tab/>containers:<text:line-break/> <text:s/><text:tab/></text:span><text:span text:style-name="T27">-</text:span><text:span text:style-name="T20"> image: mysql:5.6<text:line-break/> <text:s text:c="3"/><text:tab/>name: </text:span><text:span text:style-name="T23">mysql</text:span><text:span text:style-name="T20"><text:line-break/> <text:s text:c="3"/><text:tab/></text:span><text:span text:style-name="T26">#Variables de entorno definidas</text:span><text:span text:style-name="T20"><text:line-break/> <text:s text:c="3"/><text:tab/>env:<text:line-break/> <text:s text:c="3"/><text:tab/></text:span><text:span text:style-name="T27">-</text:span><text:span text:style-name="T20"> name: </text:span><text:span text:style-name="T23">MYSQL_ROOT_PASSWORD</text:span><text:span text:style-name="T20"><text:line-break/> <text:s text:c="5"/><text:tab/>value: </text:span><text:span text:style-name="T23">CEFIREdocker</text:span><text:span text:style-name="T20"><text:line-break/> <text:s text:c="3"/><text:tab/></text:span><text:span text:style-name="T26">#Puerto a exponer de estos contenedores</text:span><text:span text:style-name="T20"><text:line-break/> <text:s text:c="3"/><text:tab/>ports:<text:line-break/> <text:s text:c="3"/><text:tab/></text:span><text:span text:style-name="T27">-</text:span><text:span text:style-name="T20"> containerPort: </text:span><text:span text:style-name="T29">3306</text:span><text:span text:style-name="T20"><text:line-break/> <text:s text:c="5"/><text:tab/>name: </text:span><text:span text:style-name="T23">mysql</text:span><text:span text:style-name="T20"><text:line-break/> <text:s text:c="3"/><text:tab/></text:span><text:span text:style-name="T26">#Montaje dentro del contenedor del volumen persistente</text:span><text:span text:style-name="T20"><text:line-break/> <text:s text:c="3"/><text:tab/>volumeMounts:<text:line-break/> <text:s text:c="3"/><text:tab/></text:span><text:span text:style-name="T27">-</text:span><text:span text:style-name="T20"> name: </text:span><text:span text:style-name="T23">mysql-persistent-storage</text:span><text:span text:style-name="T20"><text:line-break/> <text:s text:c="5"/><text:tab/>mountPath: </text:span><text:span text:style-name="T23">/var/lib/mysql</text:span><text:span text:style-name="T20"><text:line-break/> <text:s/><text:tab/></text:span><text:span text:style-name="T26">#Indicamos que estos contenedores utilizaran el volumen persistente</text:span><text:span text:style-name="T20"><text:line-break/> <text:s/><text:tab/>volumes:<text:line-break/> <text:s/><text:tab/></text:span><text:span text:style-name="T27">-</text:span><text:span text:style-name="T20"> name: </text:span><text:span text:style-name="T23">mysql-persistent-storage</text:span><text:span text:style-name="T20"><text:line-break/> <text:s text:c="3"/><text:tab/>persistentVolumeClaim:<text:line-break/> <text:s text:c="5"/><text:tab/>claimName: </text:span><text:span text:style-name="T23">mysql-pv-claim</text:span></text:p>
          </table:table-cell>
        </table:table-row>
      </table:table>
      <text:p text:style-name="P10">Una vez listo, podemos lanzar nuestro despliegue usando el comando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2"><text:span text:style-name="T19">kubectl apply -f </text:span><text:span text:style-name="T25">"mysql-deployment.yaml"</text:span></text:p>
          </table:table-cell>
        </table:table-row>
      </table:table>
      <text:p text:style-name="P10">Con esto habremos creado nuestro despliegue. Observaremos algo similar a:</text:p>
      <text:p text:style-name="P11"><draw:frame draw:style-name="fr1" draw:name="image11.png" text:anchor-type="as-char" svg:width="5.3535in" svg:height="1.2382in" draw:z-index="0"><draw:image xlink:href="Pictures/100002010000030B000000B5B63795A24A00E984.png" xlink:type="simple" xlink:show="embed" xlink:actuate="onLoad" loext:mime-type="image/png"/></draw:frame></text:p>
      <text:p text:style-name="P10"/>
      <text:p text:style-name="P10">Con esto ya tenemos listo el despliegue y servicio para <text:span text:style-name="T11">MySQL</text:span> y podemos proceder a desplegar la aplicación <text:span text:style-name="T11">Wordpress</text:span> que utilizará <text:span text:style-name="T11">MySQL</text:span>.</text:p>
      <text:list xml:id="list45638913178007" text:continue-numbering="true" text:style-name="WWNum1">
        <text:list-item>
          <text:p text:style-name="P25"><text:bookmark text:name="_ollh1s527my7"/>Paso 2 (Fichero YAML):Desplegando Wordpress mediante fichero YAML</text:p>
        </text:list-item>
      </text:list>
      <text:p text:style-name="P10">Vamos a definir la configuración en un único fichero, tanto la configuración del despliegue, servicio y volumen persistente de Wordpress. Este Wordpress beberá del servicio MySQL configurado en el paso anterior. Está disponible en un fichero <text:span text:style-name="T11">YAML</text:span> comentado “<text:span text:style-name="T18">wordpress-deployment.yaml</text:span>” con el siguiente contenido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3"><text:span text:style-name="T26">#Definimos la información del servicio</text:span><text:span text:style-name="T21"><text:line-break/>apiVersion: </text:span><text:span text:style-name="T24">v1</text:span><text:span text:style-name="T21"><text:line-break/>kind: </text:span><text:span text:style-name="T24">Service</text:span><text:span text:style-name="T21"><text:line-break/>metadata:<text:line-break/> <text:s/>name: </text:span><text:span text:style-name="T24">wordpress</text:span><text:span text:style-name="T21"><text:line-break/> <text:s/>labels:<text:line-break/><text:tab/>app: </text:span><text:span text:style-name="T24">wordpress</text:span><text:span text:style-name="T21"><text:line-break/>spec:<text:line-break/> <text:s/>ports:<text:line-break/><text:tab/></text:span><text:span text:style-name="T26">#El servicio se expone en el puerto 80</text:span><text:span text:style-name="T21"><text:line-break/><text:tab/></text:span><text:span text:style-name="T28">-</text:span><text:span text:style-name="T21"> port: </text:span><text:span text:style-name="T30">80</text:span><text:span text:style-name="T21"><text:line-break/> <text:s/>selector:<text:line-break/><text:tab/>app: </text:span><text:span text:style-name="T24">wordpress</text:span><text:span text:style-name="T21"><text:line-break/><text:tab/>tier: </text:span><text:span text:style-name="T24">frontend</text:span><text:span text:style-name="T21"><text:line-break/> <text:s/></text:span><text:span text:style-name="T26">#Aplicamos balanceo de carga para facilitar su escalado horizontal</text:span><text:span text:style-name="T21"><text:line-break/> <text:s/>type: </text:span><text:span text:style-name="T24">LoadBalancer</text:span><text:span text:style-name="T21"><text:line-break/></text:span><text:span text:style-name="T32">---</text:span><text:span text:style-name="T21"><text:line-break/></text:span><text:span text:style-name="T26">#Definimos un volumen persistente</text:span><text:span text:style-name="T21"><text:line-break/>apiVersion: </text:span><text:span text:style-name="T24">v1</text:span><text:span text:style-name="T21"><text:line-break/>kind: </text:span><text:span text:style-name="T24">PersistentVolumeClaim</text:span><text:span text:style-name="T21"><text:line-break/>metadata:<text:line-break/> <text:s/>name: </text:span><text:span text:style-name="T24">wp-pv-claim</text:span><text:span text:style-name="T21"><text:line-break/> <text:s/>labels:<text:line-break/><text:tab/>app: </text:span><text:span text:style-name="T24">wordpress</text:span><text:span text:style-name="T21"><text:line-break/>spec:<text:line-break/> <text:s/></text:span><text:span text:style-name="T26">#Indica que solo puede ser montado para lectura/escritura por un nodo. Para el resto lectura.</text:span><text:span text:style-name="T21"><text:line-break/> <text:s/></text:span><text:span text:style-name="T26">#En este caso, se usa para modificar un fichero de configuración.</text:span><text:span text:style-name="T21"><text:line-break/> <text:s/>accessModes:<text:line-break/><text:tab/></text:span><text:span text:style-name="T28">-</text:span><text:span text:style-name="T21"> </text:span><text:span text:style-name="T24">ReadWriteOnce</text:span><text:span text:style-name="T21"><text:line-break/> <text:s/>resources:<text:line-break/><text:tab/>requests:<text:line-break/> <text:s/><text:tab/>storage: </text:span><text:span text:style-name="T30">20</text:span><text:span text:style-name="T24">Gi</text:span><text:span text:style-name="T21"><text:line-break/></text:span><text:span text:style-name="T32">---</text:span><text:span text:style-name="T21"><text:line-break/></text:span><text:span text:style-name="T26">#definimos el despliegue</text:span><text:span text:style-name="T21"><text:line-break/>apiVersion: </text:span><text:span text:style-name="T24">apps/v1</text:span><text:span text:style-name="T21"><text:line-break/>kind: </text:span><text:span text:style-name="T24">Deployment</text:span><text:span text:style-name="T21"><text:line-break/>metadata:<text:line-break/> <text:s/>name: </text:span><text:span text:style-name="T24">wordpress</text:span><text:span text:style-name="T21"><text:line-break/> <text:s/>labels:<text:line-break/><text:tab/>app: </text:span><text:span text:style-name="T24">wordpress</text:span><text:span text:style-name="T21"><text:line-break/>spec:<text:line-break/> <text:s/>selector:<text:line-break/><text:tab/>matchLabels:<text:line-break/> <text:s/><text:tab/>app: </text:span><text:span text:style-name="T24">wordpress</text:span><text:span text:style-name="T21"><text:line-break/> <text:s/><text:tab/>tier: </text:span><text:span text:style-name="T24">frontend</text:span><text:span text:style-name="T21"><text:line-break/> <text:s/>strategy:<text:line-break/><text:tab/>type: </text:span><text:span text:style-name="T24">Recreate</text:span><text:span text:style-name="T21"><text:line-break/> <text:s/>template:<text:line-break/><text:tab/>metadata:<text:line-break/> <text:s/><text:tab/>labels:<text:line-break/> <text:s text:c="3"/><text:tab/>app: </text:span><text:span text:style-name="T24">wordpress</text:span><text:span text:style-name="T21"><text:line-break/> <text:s text:c="3"/><text:tab/>tier: </text:span><text:span text:style-name="T24">frontend</text:span><text:span text:style-name="T21"><text:line-break/><text:tab/>spec:<text:line-break/> <text:s/><text:tab/></text:span><text:span text:style-name="T26">#Imagen</text:span><text:span text:style-name="T21"><text:line-break/> <text:s/><text:tab/>containers:<text:line-break/> <text:s/><text:tab/></text:span><text:span text:style-name="T28">-</text:span><text:span text:style-name="T21"> image: wordpress:4.8-apache<text:line-break/> <text:s text:c="3"/><text:tab/>name: </text:span><text:span text:style-name="T24">wordpress</text:span><text:span text:style-name="T21"><text:line-break/> <text:s text:c="3"/><text:tab/></text:span><text:span text:style-name="T26">#Indicamos variables de entorno</text:span><text:span text:style-name="T21"><text:line-break/> <text:s text:c="3"/><text:tab/>env:<text:line-break/> <text:s text:c="3"/><text:tab/></text:span><text:span text:style-name="T28">-</text:span><text:span text:style-name="T21"> name: </text:span><text:span text:style-name="T24">WORDPRESS_DB_HOST</text:span><text:span text:style-name="T21"><text:line-break/> <text:s text:c="5"/><text:tab/>value: </text:span><text:span text:style-name="T24">wordpress-mysql</text:span><text:span text:style-name="T21"><text:line-break/> <text:s text:c="3"/><text:tab/></text:span><text:span text:style-name="T28">-</text:span><text:span text:style-name="T21"> name: </text:span><text:span text:style-name="T24">WORDPRESS_DB_PASSWORD</text:span><text:span text:style-name="T21"><text:line-break/> <text:s text:c="5"/><text:tab/>value: </text:span><text:span text:style-name="T24">CEFIREdocker</text:span><text:span text:style-name="T21"><text:line-break/> <text:s text:c="3"/><text:tab/>ports:<text:line-break/> <text:s text:c="3"/><text:tab/></text:span><text:span text:style-name="T28">-</text:span><text:span text:style-name="T21"> containerPort: </text:span><text:span text:style-name="T30">80</text:span><text:span text:style-name="T21"><text:line-break/> <text:s text:c="5"/><text:tab/>name: </text:span><text:span text:style-name="T24">wordpress</text:span><text:span text:style-name="T21"><text:line-break/> <text:s text:c="3"/><text:tab/>volumeMounts:<text:line-break/> <text:s text:c="3"/><text:tab/></text:span><text:span text:style-name="T28">-</text:span><text:span text:style-name="T21"> name: </text:span><text:span text:style-name="T24">wordpress-persistent-storage</text:span><text:span text:style-name="T21"><text:line-break/> <text:s text:c="5"/><text:tab/>mountPath: </text:span><text:span text:style-name="T24">/var/www/html</text:span><text:span text:style-name="T21"><text:line-break/> <text:s/><text:tab/>volumes:<text:line-break/> <text:s/><text:tab/></text:span><text:span text:style-name="T28">-</text:span><text:span text:style-name="T21"> name: </text:span><text:span text:style-name="T24">wordpress-persistent-storage</text:span><text:span text:style-name="T21"><text:line-break/> <text:s text:c="3"/><text:tab/>persistentVolumeClaim:<text:line-break/> <text:s text:c="5"/><text:tab/>claimName: </text:span><text:span text:style-name="T24">wp-pv-claim</text:span></text:p>
          </table:table-cell>
        </table:table-row>
      </table:table>
      <text:p text:style-name="P10">Una vez listo, podemos lanzar nuestro despliegue usando el comando: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2"><text:span text:style-name="T19">kubectl apply -f </text:span><text:span text:style-name="T25">"wordpress-deployment.yaml"</text:span></text:p>
          </table:table-cell>
        </table:table-row>
      </table:table>
      <text:p text:style-name="P10"><text:soft-page-break/>Con esto habremos creado nuestro despliegue. Observaremos algo similar a:</text:p>
      <text:p text:style-name="P10"><draw:frame draw:style-name="fr1" draw:name="image5.png" text:anchor-type="as-char" svg:width="6.6929in" svg:height="1.5555in" draw:z-index="0"><draw:image xlink:href="Pictures/100002010000035A000000C84A435E50681BD84E.png" xlink:type="simple" xlink:show="embed" xlink:actuate="onLoad" loext:mime-type="image/png"/></draw:frame></text:p>
      <text:list xml:id="list45638055679743" text:continue-numbering="true" text:style-name="WWNum1">
        <text:list-item>
          <text:p text:style-name="P25"><text:bookmark text:name="_rgj10zjv46q5"/>Paso 3: Accediendo al servicio</text:p>
        </text:list-item>
      </text:list>
      <text:p text:style-name="P10">Una vez hecho esto, si examinamos los servicios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2"><text:span text:style-name="T19">kubectl get services</text:span></text:p>
          </table:table-cell>
        </table:table-row>
      </table:table>
      <text:p text:style-name="P10">Obteniendo algo similar a:</text:p>
      <text:p text:style-name="P10"><draw:frame draw:style-name="fr1" draw:name="image10.png" text:anchor-type="as-char" svg:width="6.6929in" svg:height="1.0972in" draw:z-index="0"><draw:image xlink:href="Pictures/10000201000003A5000000989662373072482614.png" xlink:type="simple" xlink:show="embed" xlink:actuate="onLoad" loext:mime-type="image/png"/></draw:frame></text:p>
      <text:p text:style-name="P10">Si observamos detenidamente, la IP Externa de nuestro servicio está “<text:span text:style-name="T18">Pending</text:span>” y no lo tenemos expuesto directamente. Esto es debido a que todo el clúster “<text:span text:style-name="T18">Kubernetes</text:span>” está dentro de “<text:span text:style-name="T18">MiniKube</text:span>”. Para acceder al contenido, tenemos dos formas:</text:p>
      <text:p text:style-name="P10"><text:span text:style-name="T34">Forma 1:</text:span> accederemos a la IP de “<text:span text:style-name="T18">MiniKube</text:span>” y nos expondrá el servicio en un puerto aleatorio.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2"><text:span text:style-name="T19">minikube service wordpress</text:span></text:p>
          </table:table-cell>
        </table:table-row>
      </table:table>
      <text:p text:style-name="Standard"/>
      <text:p text:style-name="Standard">A veces, el comando anterior da problemas. Si es así, podemos usar alternativamente, para exponer todos los servicios usandoen lugar de “wordpress” el parámetro <text:s/>“--all”.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2"><text:span text:style-name="T19">minikube service --all</text:span></text:p>
          </table:table-cell>
        </table:table-row>
      </table:table>
      <text:p text:style-name="P10">Tras lanzar este comando, se nos abrirá un navegador accediendo al servicio en uno de los puertos que expone “<text:span text:style-name="T18">MiniKube</text:span>” y aparecerá un texto similar a:</text:p>
      <text:p text:style-name="P10"><draw:frame draw:style-name="fr1" draw:name="image8.png" text:anchor-type="as-char" svg:width="6.6929in" svg:height="1.611in" draw:z-index="0"><draw:image xlink:href="Pictures/10000201000002ED000000B43B5143102AEEBC9C.png" xlink:type="simple" xlink:show="embed" xlink:actuate="onLoad" loext:mime-type="image/png"/></draw:frame></text:p>
      <text:p text:style-name="P10">Tras ello podemos observar que nuestra aplicación está siendo servida:</text:p>
      <text:p text:style-name="P10"><draw:frame draw:style-name="fr1" draw:name="image9.png" text:anchor-type="as-char" svg:width="6.6929in" svg:height="2.278in" draw:z-index="0"><draw:image xlink:href="Pictures/10000201000003E700000155B80BA0A4DBFFB73B.png" xlink:type="simple" xlink:show="embed" xlink:actuate="onLoad" loext:mime-type="image/png"/></draw:frame></text:p>
      <text:p text:style-name="P10"><text:span text:style-name="T34">Forma 2:</text:span> expondremos el servicio con la IP de “<text:span text:style-name="T18">MiniKube</text:span>” y accederemos a él.</text:p>
      <text:p text:style-name="P10">Para hacer esto, en una terminal aparte lanzaremos el siguiente comando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2"><text:span text:style-name="T19">minikube tunnel</text:span></text:p>
          </table:table-cell>
        </table:table-row>
      </table:table>
      <text:p text:style-name="P10">Este comando se ejecutará en la terminal “de forma indefinida” y mientras esté en funcionamiento, establecerá un túnel para acceder al servicio. Veremos algo similar a:</text:p>
      <text:p text:style-name="P11"><draw:frame draw:style-name="fr1" draw:name="image6.png" text:anchor-type="as-char" svg:width="6.0209in" svg:height="2.7917in" draw:z-index="0"><draw:image xlink:href="Pictures/10000201000002420000010C335A094C8252F205.png" xlink:type="simple" xlink:show="embed" xlink:actuate="onLoad" loext:mime-type="image/png"/></draw:frame></text:p>
      <text:p text:style-name="P10"/>
      <text:p text:style-name="P10">Si mientras este comando está en ejecución hacemos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2"><text:span text:style-name="T19">kubectl get services</text:span></text:p>
          </table:table-cell>
        </table:table-row>
      </table:table>
      <text:p text:style-name="P10"/>
      <text:p text:style-name="P10"><draw:frame draw:style-name="fr1" draw:name="image1.png" text:anchor-type="as-char" svg:width="6.6929in" svg:height="1.111in" draw:z-index="0"><draw:image xlink:href="Pictures/10000201000003C10000009FBBECC89A5BAA7A84.png" xlink:type="simple" xlink:show="embed" xlink:actuate="onLoad" loext:mime-type="image/png"/></draw:frame></text:p>
      <text:p text:style-name="P10"/>
      <text:p text:style-name="P10">Ya observaremos una IP. En este ejemplo, accediendo a <text:a xlink:type="simple" xlink:href="http://10.104.67.169" text:style-name="ListLabel_20_1" text:visited-style-name="ListLabel_20_1"><text:span text:style-name="T35">http://10.104.67.169</text:span></text:a> accederemos a la aplicación.</text:p>
      <text:list xml:id="list45639883603530" text:continue-numbering="true" text:style-name="WWNum1">
        <text:list-item>
          <text:p text:style-name="P25"><text:bookmark text:name="_m1jtbkgv3d98"/>Paso 4(Fichero YAML): Autoescalado de Wordpress con fichero YAML</text:p>
        </text:list-item>
      </text:list>
      <text:p text:style-name="P10">Vamos a definir el autoescalado del servicio Wordpress. Este está disponible en un fichero <text:span text:style-name="T11">YAML</text:span> comentado “<text:span text:style-name="T18">autoscale.yaml</text:span>” con el siguiente contenido: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23"><text:span text:style-name="T21">apiVersion: </text:span><text:span text:style-name="T24">autoscaling/v1</text:span><text:span text:style-name="T21"><text:line-break/></text:span><text:span text:style-name="T26">#Tipo autoescalado horizontal</text:span><text:span text:style-name="T21"><text:line-break/>kind: </text:span><text:span text:style-name="T24">HorizontalPodAutoscaler</text:span><text:span text:style-name="T21"><text:line-break/>metadata:<text:line-break/> name: </text:span><text:span text:style-name="T24">autoescaladowordpress</text:span><text:span text:style-name="T21"><text:line-break/>spec:<text:line-break/> </text:span><text:span text:style-name="T26">#Indicamos a quien se aplica el auto-escalado</text:span><text:span text:style-name="T21"><text:line-break/> scaleTargetRef:<text:line-break/> <text:s text:c="2"/>apiVersion: </text:span><text:span text:style-name="T24">apps/v1</text:span><text:span text:style-name="T21"><text:line-break/> <text:s text:c="2"/>kind: </text:span><text:span text:style-name="T24">Deployment</text:span><text:span text:style-name="T21"><text:line-break/> <text:s text:c="2"/>name: </text:span><text:span text:style-name="T24">wordpress</text:span><text:span text:style-name="T21"><text:line-break/> </text:span><text:span text:style-name="T26">#Mínimo y máximo de réplicas</text:span><text:span text:style-name="T21"><text:line-break/> minReplicas: </text:span><text:span text:style-name="T30">5</text:span><text:span text:style-name="T21"><text:line-break/> maxReplicas: </text:span><text:span text:style-name="T30">10</text:span><text:span text:style-name="T21"><text:line-break/> </text:span><text:span text:style-name="T26">#Máximo de CPU a usar durante el auto-escalado</text:span><text:span text:style-name="T21"><text:line-break/> targetCPUUtilizationPercentage: </text:span><text:span text:style-name="T30">50</text:span></text:p>
          </table:table-cell>
        </table:table-row>
      </table:table>
      <text:p text:style-name="P10">Una vez listo, podemos lanzar nuestro despliegue usando el comando: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22"><text:span text:style-name="T19">kubectl apply -f </text:span><text:span text:style-name="T25">"autoscale.yaml"</text:span></text:p>
          </table:table-cell>
        </table:table-row>
      </table:table>
      <text:p text:style-name="P10">Con esto habremos creado nuestro autoescalado para estos dos despliegues. Una vez hecho el escalado, realizaremos una petición al servicio para que se haga efectivo. Observaremos algo similar a:</text:p>
      <text:p text:style-name="P10"><draw:frame draw:style-name="fr1" draw:name="image3.png" text:anchor-type="as-char" svg:width="6.6929in" svg:height="2.4862in" draw:z-index="0"><draw:image xlink:href="Pictures/1000020100000314000001253D5CDB784E396E42.png" xlink:type="simple" xlink:show="embed" xlink:actuate="onLoad" loext:mime-type="image/png"/></draw:frame></text:p>
      <text:list xml:id="list45638165280555" text:continue-numbering="true" text:style-name="WWNum1">
        <text:list-item>
          <text:p text:style-name="P25"><text:bookmark text:name="_9p0xnot11ut4"/>Paso 5: eliminando lo creado</text:p>
        </text:list-item>
      </text:list>
      <text:p text:style-name="P10">Si queremos eliminar todos los elementos creados, podemos hacerlo con los siguientes comandos: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23"><text:span text:style-name="T22">kubectl delete deployment wordpress<text:line-break/>kubectl delete deployment wordpress-mysql<text:line-break/>kubectl delete service wordpress-mysql<text:line-break/>kubectl delete service wordpress<text:line-break/>kubectl delete service wordpress<text:line-break/>kubectl delete persistentvolumeclaim mysql-pv-claim<text:line-break/>kubectl delete persistentvolumeclaim wp-pv-claim<text:line-break/>kubectl delete HorizontalPodAutoscaler autoescaladowordpress</text:span></text:p>
          </table:table-cell>
        </table:table-row>
      </table:table>
      <text:list xml:id="list45639747826188" text:continue-numbering="true" text:style-name="WWNum1">
        <text:list-item>
          <text:p text:style-name="P25"><text:bookmark text:name="_72yv1gty1dke"/>Bibliografía</text:p>
        </text:list-item>
      </text:list>
      <text:p text:style-name="P8">[1] Kubernetes <text:a xlink:type="simple" xlink:href="https://kubernetes.io/" text:style-name="ListLabel_20_1" text:visited-style-name="ListLabel_20_1"><text:span text:style-name="T35">https://kubernetes.io/</text:span></text:a></text:p>
      <text:p text:style-name="P8">[2] Kubernetes docs <text:a xlink:type="simple" xlink:href="https://kubernetes.io/docs/home/" text:style-name="ListLabel_20_1" text:visited-style-name="ListLabel_20_1"><text:span text:style-name="T35">https://kubernetes.io/docs/home/</text:span></text:a></text:p>
      <text:p text:style-name="P8">[3] MiniKube <text:a xlink:type="simple" xlink:href="https://minikube.sigs.k8s.io/docs/" text:style-name="ListLabel_20_1" text:visited-style-name="ListLabel_20_1"><text:span text:style-name="T35">https://minikube.sigs.k8s.io/docs/</text:span></text:a></text:p>
      <text:p text:style-name="P8"><text:s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y Kubernetes<text:tab/><text:tab/>UD08. Caso práctico 02</text:span></text:p>
      </style:header>
      <style:footer>
        <text:p text:style-name="MP4"><text:span text:style-name="MT1">Curso Introducción a Docker<text:tab/><text:tab/>UD08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3" meta:image-count="12" meta:object-count="0" meta:page-count="2" meta:paragraph-count="83" meta:word-count="1144" meta:character-count="8652" meta:non-whitespace-character-count="7230"/>
    <meta:generator>LibreOfficeDev/6.0.5.2$Linux_X86_64 LibreOffice_project/</meta:generator>
  </office:meta>
</office:document-meta>
</file>