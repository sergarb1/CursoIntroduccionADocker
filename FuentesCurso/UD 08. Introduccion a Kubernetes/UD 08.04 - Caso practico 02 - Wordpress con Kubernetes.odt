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1253D5CDB784E396E42.png" manifest:media-type="image/png"/>
  <manifest:file-entry manifest:full-path="Pictures/100002010000002F00000006DBF21BC2612169B1.png" manifest:media-type="image/png"/>
  <manifest:file-entry manifest:full-path="Pictures/10000000000007800000008BADE10FA77D575FB0.png" manifest:media-type="image/png"/>
  <manifest:file-entry manifest:full-path="Pictures/100002010000007600000029ABF5F7A91F7A9EF9.png" manifest:media-type="image/png"/>
  <manifest:file-entry manifest:full-path="Pictures/10000201000002ED000000B43B5143102AEEBC9C.png" manifest:media-type="image/png"/>
  <manifest:file-entry manifest:full-path="Pictures/10000201000002420000010C335A094C8252F205.png" manifest:media-type="image/png"/>
  <manifest:file-entry manifest:full-path="Pictures/10000201000003E80000011B536D57BE0BFF3754.png" manifest:media-type="image/png"/>
  <manifest:file-entry manifest:full-path="Pictures/100002010000030B000000B5B63795A24A00E984.png" manifest:media-type="image/png"/>
  <manifest:file-entry manifest:full-path="Pictures/10000201000003E700000155B80BA0A4DBFFB73B.png" manifest:media-type="image/png"/>
  <manifest:file-entry manifest:full-path="Pictures/100002010000035A000000C84A435E50681BD84E.png" manifest:media-type="image/png"/>
  <manifest:file-entry manifest:full-path="Pictures/10000201000003C10000009FBBECC89A5BAA7A84.png" manifest:media-type="image/png"/>
  <manifest:file-entry manifest:full-path="Pictures/10000201000003A5000000989662373072482614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 style:font-style-complex="italic" style:font-weight-complex="bold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 y Kubernetes</text:span><text:span text:style-name="T2"><text:line-break/></text:span><text:span text:style-name="T3">UD 08. Caso práctico 02 - Wordpress con Kubernet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9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3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3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3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3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3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4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5"/>
      <text:p text:style-name="P15"/>
      <text:p text:style-name="P17"><text:span text:style-name="T15">UD08. Caso práctico 02</text:span></text:p>
      <text:list xml:id="list847550831" text:style-name="WWNum1">
        <text:list-item>
          <text:p text:style-name="P24"><text:bookmark text:name="_dbh0n1vac4c8"/>Introducción</text:p>
        </text:list-item>
      </text:list>
      <text:p text:style-name="P10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75820631516529" text:continue-numbering="true" text:style-name="WWNum1">
        <text:list-item>
          <text:p text:style-name="P25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minikube start</text:span></text:p>
          </table:table-cell>
        </table:table-row>
      </table:table>
      <text:p text:style-name="P10"><draw:frame draw:style-name="fr1" draw:name="image5.png" text:anchor-type="as-char" svg:width="6.6929in" svg:height="1.889in" draw:z-index="0"><draw:image xlink:href="Pictures/10000201000003E80000011B536D57BE0BFF3754.png" xlink:type="simple" xlink:show="embed" xlink:actuate="onLoad" loext:mime-type="image/png"/></draw:frame></text:p>
      <text:p text:style-name="P10">Una vez puesto en marcha, podemos proseguir con el caso práctico.</text:p>
      <text:list xml:id="list75821243776210" text:continue-numbering="true" text:style-name="WWNum1">
        <text:list-item>
          <text:p text:style-name="P25"><text:bookmark text:name="_v5ot8tcfc7uh"/>Paso 1 (Fichero YAML):Desplegando MySQL mediante fichero YAML</text:p>
        </text:list-item>
      </text:list>
      <text:p text:style-name="P10">Vamos a definir la configuración en un único fichero. En él definiremos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10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9">kubectl apply -f </text:span><text:span text:style-name="T25">"mysql-deployment.yaml"</text:span></text:p>
          </table:table-cell>
        </table:table-row>
      </table:table>
      <text:p text:style-name="P10">Con esto habremos creado nuestro despliegue. Observaremos algo similar a:</text:p>
      <text:p text:style-name="P11"><draw:frame draw:style-name="fr1" draw:name="image7.png" text:anchor-type="as-char" svg:width="5.3535in" svg:height="1.2382in" draw:z-index="0"><draw:image xlink:href="Pictures/100002010000030B000000B5B63795A24A00E984.png" xlink:type="simple" xlink:show="embed" xlink:actuate="onLoad" loext:mime-type="image/png"/></draw:frame></text:p>
      <text:p text:style-name="P10"/>
      <text:p text:style-name="P10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75820987435714" text:continue-numbering="true" text:style-name="WWNum1">
        <text:list-item>
          <text:p text:style-name="P25"><text:bookmark text:name="_ollh1s527my7"/>Paso 2 (Fichero YAML):Desplegando Wordpress mediante fichero YAML</text:p>
        </text:list-item>
      </text:list>
      <text:p text:style-name="P10">Vamos a definir la configuración en un único fichero,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10">Una vez listo, podemos lanzar nuestro despliegue usando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19">kubectl apply -f </text:span><text:span text:style-name="T25">"wordpress-deployment.yaml"</text:span></text:p>
          </table:table-cell>
        </table:table-row>
      </table:table>
      <text:p text:style-name="P10"><text:soft-page-break/>Con esto habremos creado nuestro despliegue. Observaremos algo similar a:</text:p>
      <text:p text:style-name="P10"><draw:frame draw:style-name="fr1" draw:name="image10.png" text:anchor-type="as-char" svg:width="6.6929in" svg:height="1.5555in" draw:z-index="0"><draw:image xlink:href="Pictures/100002010000035A000000C84A435E50681BD84E.png" xlink:type="simple" xlink:show="embed" xlink:actuate="onLoad" loext:mime-type="image/png"/></draw:frame></text:p>
      <text:list xml:id="list75821628211757" text:continue-numbering="true" text:style-name="WWNum1">
        <text:list-item>
          <text:p text:style-name="P25"><text:bookmark text:name="_rgj10zjv46q5"/>Paso 3: Accediendo al servicio</text:p>
        </text:list-item>
      </text:list>
      <text:p text:style-name="P10">Una vez hecho esto,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9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8.png" text:anchor-type="as-char" svg:width="6.6929in" svg:height="1.0972in" draw:z-index="0"><draw:image xlink:href="Pictures/10000201000003A5000000989662373072482614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10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19">minikube service wordpress</text:span></text:p>
          </table:table-cell>
        </table:table-row>
      </table:table>
      <text:p text:style-name="Standard"/>
      <text:p text:style-name="Standard">A veces, el comando anterior da problemas. Si es así, podemos usar alternativamente, para exponer todos los servicios usandoen lugar de “wordpress” el parámetro <text:s/>“--all”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19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2.png" text:anchor-type="as-char" svg:width="6.6929in" svg:height="1.611in" draw:z-index="0"><draw:image xlink:href="Pictures/10000201000002ED000000B43B5143102AEEBC9C.png" xlink:type="simple" xlink:show="embed" xlink:actuate="onLoad" loext:mime-type="image/png"/></draw:frame></text:p>
      <text:p text:style-name="P10">Tras ello podemos observar que nuestra aplicación está siendo servida:</text:p>
      <text:p text:style-name="P10"><draw:frame draw:style-name="fr1" draw:name="image11.png" text:anchor-type="as-char" svg:width="6.6929in" svg:height="2.278in" draw:z-index="0"><draw:image xlink:href="Pictures/10000201000003E700000155B80BA0A4DBFFB73B.png" xlink:type="simple" xlink:show="embed" xlink:actuate="onLoad" loext:mime-type="image/png"/></draw:frame></text:p>
      <text:p text:style-name="P10"><text:span text:style-name="T34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19">minikube tunnel</text:span></text:p>
          </table:table-cell>
        </table:table-row>
      </table:table>
      <text:p text:style-name="P10">Este comando se ejecutará en la terminal “de forma indefinida” y mientras esté en funcionamiento, establecerá un túnel para acceder al servicio. Veremos algo similar a:</text:p>
      <text:p text:style-name="P11"><draw:frame draw:style-name="fr1" draw:name="image6.png" text:anchor-type="as-char" svg:width="6.0209in" svg:height="2.7917in" draw:z-index="0"><draw:image xlink:href="Pictures/10000201000002420000010C335A094C8252F205.png" xlink:type="simple" xlink:show="embed" xlink:actuate="onLoad" loext:mime-type="image/png"/></draw:frame></text:p>
      <text:p text:style-name="P10"/>
      <text:p text:style-name="P10">Si mientras este comando está en ejecución hacemo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19">kubectl get services</text:span></text:p>
          </table:table-cell>
        </table:table-row>
      </table:table>
      <text:p text:style-name="P10"/>
      <text:p text:style-name="P10"><draw:frame draw:style-name="fr1" draw:name="image1.png" text:anchor-type="as-char" svg:width="6.6929in" svg:height="1.111in" draw:z-index="0"><draw:image xlink:href="Pictures/10000201000003C10000009FBBECC89A5BAA7A84.png" xlink:type="simple" xlink:show="embed" xlink:actuate="onLoad" loext:mime-type="image/png"/></draw:frame></text:p>
      <text:p text:style-name="P10"/>
      <text:p text:style-name="P10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list xml:id="list75821293684365" text:continue-numbering="true" text:style-name="WWNum1">
        <text:list-item>
          <text:p text:style-name="P25"><text:bookmark text:name="_m1jtbkgv3d98"/>Paso 4(Fichero YAML): Autoescalado de Wordpress con fichero YAML</text:p>
        </text:list-item>
      </text:list>
      <text:p text:style-name="P10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10">Una vez listo, podemos lanzar nuestro despliegue usando el comand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19">kubectl apply -f </text:span><text:span text:style-name="T25">"autoscale.yaml"</text:span></text:p>
          </table:table-cell>
        </table:table-row>
      </table:table>
      <text:p text:style-name="P10">Con esto habremos creado nuestro autoescalado para estos dos despliegues. Una vez hecho el escalado, realizaremos una petición al servicio para que se haga efectivo. Observaremos algo similar a:</text:p>
      <text:p text:style-name="P10"><draw:frame draw:style-name="fr1" draw:name="image12.png" text:anchor-type="as-char" svg:width="6.6929in" svg:height="2.4862in" draw:z-index="0"><draw:image xlink:href="Pictures/1000020100000314000001253D5CDB784E396E42.png" xlink:type="simple" xlink:show="embed" xlink:actuate="onLoad" loext:mime-type="image/png"/></draw:frame></text:p>
      <text:list xml:id="list75821138687614" text:continue-numbering="true" text:style-name="WWNum1">
        <text:list-item>
          <text:p text:style-name="P25"><text:bookmark text:name="_9p0xnot11ut4"/>Paso 5: eliminando lo creado</text:p>
        </text:list-item>
      </text:list>
      <text:p text:style-name="P10">Si queremos eliminar todos los elementos creados, podemos hacerlo con los siguientes comand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75821260722837" text:continue-numbering="true" text:style-name="WWNum1">
        <text:list-item>
          <text:p text:style-name="P25"><text:bookmark text:name="_72yv1gty1dke"/>Bibliografía</text:p>
        </text:list-item>
      </text:list>
      <text:p text:style-name="P8">[1] Kubernetes <text:a xlink:type="simple" xlink:href="https://kubernetes.io/" text:style-name="ListLabel_20_1" text:visited-style-name="ListLabel_20_1"><text:span text:style-name="T35">https://kubernetes.io/</text:span></text:a></text:p>
      <text:p text:style-name="P8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8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8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8. Caso práctico 02</text:span></text:p>
      </style:header>
      <style:footer>
        <text:p text:style-name="MP4"><text:span text:style-name="MT1">Curso Introducción a Docker y Kubernetes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2" meta:object-count="0" meta:page-count="2" meta:paragraph-count="83" meta:word-count="1146" meta:character-count="8665" meta:non-whitespace-character-count="7241"/>
    <meta:generator>LibreOfficeDev/6.0.5.2$Linux_X86_64 LibreOffice_project/</meta:generator>
  </office:meta>
</office:document-meta>
</file>