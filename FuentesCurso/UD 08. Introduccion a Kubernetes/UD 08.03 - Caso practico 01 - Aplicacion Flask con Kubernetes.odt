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1A5E2F22DA60869DB11.png" manifest:media-type="image/png"/>
  <manifest:file-entry manifest:full-path="Pictures/10000201000003D5000000E00630F297FC4E2CCB.png" manifest:media-type="image/png"/>
  <manifest:file-entry manifest:full-path="Pictures/10000201000002FB0000004100809D9DFF2A3982.png" manifest:media-type="image/png"/>
  <manifest:file-entry manifest:full-path="Pictures/10000201000003E800000116020945CB7C83F599.png" manifest:media-type="image/png"/>
  <manifest:file-entry manifest:full-path="Pictures/10000201000003B7000000CDB5ED89598DD595F3.png" manifest:media-type="image/png"/>
  <manifest:file-entry manifest:full-path="Pictures/10000201000003E0000000DD785C9873F803CFD8.png" manifest:media-type="image/png"/>
  <manifest:file-entry manifest:full-path="Pictures/100002010000002F00000006DBF21BC2612169B1.png" manifest:media-type="image/png"/>
  <manifest:file-entry manifest:full-path="Pictures/1000020100000353000000793E93F036047EE70B.png" manifest:media-type="image/png"/>
  <manifest:file-entry manifest:full-path="Pictures/10000000000007800000008BADE10FA77D575FB0.png" manifest:media-type="image/png"/>
  <manifest:file-entry manifest:full-path="Pictures/10000201000003EA000000B019B376E28BC83F62.png" manifest:media-type="image/png"/>
  <manifest:file-entry manifest:full-path="Pictures/10000201000003E800000040CD5F6D4D1AB164D4.png" manifest:media-type="image/png"/>
  <manifest:file-entry manifest:full-path="Pictures/1000020100000218000000E16794323D36592EA6.png" manifest:media-type="image/png"/>
  <manifest:file-entry manifest:full-path="Pictures/10000201000003E70000004F4A0C1275BB883131.png" manifest:media-type="image/png"/>
  <manifest:file-entry manifest:full-path="Pictures/100002010000007600000029ABF5F7A91F7A9EF9.png" manifest:media-type="image/png"/>
  <manifest:file-entry manifest:full-path="Pictures/10000201000003EA00000125650F5B965A792B81.png" manifest:media-type="image/png"/>
  <manifest:file-entry manifest:full-path="Pictures/1000020100000317000000790AAC9E0B0278AFD4.png" manifest:media-type="image/png"/>
  <manifest:file-entry manifest:full-path="Pictures/100002010000037D00000066B80C881250F3B853.png" manifest:media-type="image/png"/>
  <manifest:file-entry manifest:full-path="Pictures/10000201000002FF000000B4FEC9D163A70149C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5417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bold" style:font-name-asian="Verdana1" style:font-size-asian="10.5pt" style:font-style-asian="normal" style:font-weight-asian="bold" style:font-name-complex="Verdana1" style:font-size-complex="10.5pt" style:font-style-complex="normal" style:font-weight-complex="bold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style:text-underline-style="solid" style:text-underline-width="auto" style:text-underline-color="font-color" fo:font-weight="bold" fo:background-color="#f8f8f8" loext:char-shading-value="0" style:font-name-asian="Consolas1" style:font-weight-asian="bold" style:font-name-complex="Consolas1" style:font-weight-complex="bold"/>
    </style:style>
    <style:style style:name="T25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6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7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8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0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1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2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3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4" style:family="text">
      <style:text-properties fo:color="#dd1144" style:font-name="Consolas" fo:background-color="#f8f8f8" loext:char-shading-value="0" style:font-name-asian="Consolas1" style:font-name-complex="Consolas1"/>
    </style:style>
    <style:style style:name="T35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7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8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3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style:text-underline-style="none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45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6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8. Caso práctico 01 - Aplicación Flask con Kubernetes</text:span></text:p>
      <text:p text:style-name="P1"><draw:frame draw:style-name="fr1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0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3b05p2f899fh" text:style-name="Index_20_Link" text:visited-style-name="Index_20_Link"><text:span text:style-name="T13">2. Paso 0: iniciar MiniKube<text:tab/>2</text:span></text:a></text:p>
          <text:p text:style-name="P12"><text:a xlink:type="simple" xlink:href="#_vyhbfp4t666x" text:style-name="Index_20_Link" text:visited-style-name="Index_20_Link"><text:span text:style-name="T13">3. Paso 1: Aplicación “app.py” y “Dockerfile” del caso práctico<text:tab/>3</text:span></text:a></text:p>
          <text:p text:style-name="P12"><text:a xlink:type="simple" xlink:href="#_m1jtbkgv3d98" text:style-name="Index_20_Link" text:visited-style-name="Index_20_Link"><text:span text:style-name="T13">4. Paso 2 (Comandos): Desplegando una aplicación mediante comandos<text:tab/>4</text:span></text:a></text:p>
          <text:p text:style-name="P12"><text:a xlink:type="simple" xlink:href="#_9p0xnot11ut4" text:style-name="Index_20_Link" text:visited-style-name="Index_20_Link"><text:span text:style-name="T13">5. Paso 4: escalando nuestro despliegue<text:tab/>6</text:span></text:a></text:p>
          <text:p text:style-name="P12"><text:a xlink:type="simple" xlink:href="#_v5ot8tcfc7uh" text:style-name="Index_20_Link" text:visited-style-name="Index_20_Link"><text:span text:style-name="T13">6. Paso 5 (Fichero YAML):Desplegando la aplicación mediante ficheros YAML<text:tab/>7</text:span></text:a></text:p>
          <text:p text:style-name="P12"><text:a xlink:type="simple" xlink:href="#_okij6l7ljwiv" text:style-name="Index_20_Link" text:visited-style-name="Index_20_Link"><text:span text:style-name="T13">7. Paso 6: eliminando lo creado<text:tab/>9</text:span></text:a></text:p>
          <text:p text:style-name="P12"><text:a xlink:type="simple" xlink:href="#_odopdfh4u6on" text:style-name="Index_20_Link" text:visited-style-name="Index_20_Link"><text:span text:style-name="T13">8. Bibliografía<text:tab/>9</text:span></text:a></text:p>
        </text:index-body>
      </text:table-of-content>
      <text:p text:style-name="P14"/>
      <text:p text:style-name="P15"><text:span text:style-name="T15">UD08. Caso práctico 01</text:span></text:p>
      <text:list xml:id="list2829427361" text:style-name="WWNum1">
        <text:list-item>
          <text:p text:style-name="P27"><text:bookmark text:name="_dbh0n1vac4c8"/>Introducción</text:p>
        </text:list-item>
      </text:list>
      <text:p text:style-name="P10">En este caso práctico vamos a poner en marcha una aplicación servidor con “<text:span text:style-name="T18">Python</text:span><text:span text:style-name="T10">”</text:span> usando “<text:span text:style-name="T18">Flask</text:span><text:span text:style-name="T10">”</text:span> <text:a xlink:type="simple" xlink:href="https://flask.palletsprojects.com/en/2.0.x/" text:style-name="ListLabel_20_10" text:visited-style-name="ListLabel_20_10"><text:span text:style-name="T19">https://flask.palletsprojects.com/en/2.0.x/</text:span></text:a>. En el caso práctico desplegamos esta aplicación utilizando “<text:span text:style-name="T18">Kubernetes</text:span>” y “<text:span text:style-name="T18">MiniKube</text:span>”.</text:p>
      <text:list xml:id="list45436276307513" text:continue-numbering="true" text:style-name="WWNum1">
        <text:list-item>
          <text:p text:style-name="P28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1">minikube start</text:span></text:p>
          </table:table-cell>
        </table:table-row>
      </table:table>
      <text:p text:style-name="P11"><draw:frame draw:style-name="fr1" draw:name="image1.png" text:anchor-type="as-char" svg:width="6.0402in" svg:height="1.7661in" draw:z-index="0"><draw:image xlink:href="Pictures/10000201000003EA00000125650F5B965A792B81.png" xlink:type="simple" xlink:show="embed" xlink:actuate="onLoad" loext:mime-type="image/png"/></draw:frame></text:p>
      <text:p text:style-name="P10">Una vez puesto en marcha, podemos proseguir con el caso práctico.</text:p>
      <text:list xml:id="list45436558529129" text:continue-numbering="true" text:style-name="WWNum1">
        <text:list-item>
          <text:p text:style-name="P28"><text:bookmark text:name="_vyhbfp4t666x"/>Paso 1: Aplicación “app.py” y “Dockerfile” del caso práctico</text:p>
        </text:list-item>
      </text:list>
      <text:p text:style-name="P10">Para el caso práctico, utilizaremos una sencilla aplicación web con “<text:span text:style-name="T18">Python</text:span>” y “<text:span text:style-name="T18">Flask</text:span>” que simplemente imprimirá é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from flask import Flask, escape, request<text:line-break/>import socket<text:line-break/>app = Flask(__name__)<text:line-break/><text:line-break/></text:span><text:span text:style-name="T29">@app.route('/')</text:span><text:span text:style-name="T22"><text:line-break/>def </text:span><text:span text:style-name="T30">get_hostname</text:span><text:span text:style-name="T22">():<text:line-break/><text:tab/>return </text:span><text:span text:style-name="T31">"Aplicación servida desde hostname: "</text:span><text:span text:style-name="T22">+socket.gethostname()</text:span></text:p>
          </table:table-cell>
        </table:table-row>
      </table:table>
      <text:p text:style-name="P10"/>
      <text:p text:style-name="P10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35">#Utilizamos la imagen con Python 3.7</text:span><text:span text:style-name="T23"><text:line-break/></text:span><text:span text:style-name="T22">FROM</text:span><text:span text:style-name="T23"> python:</text:span><text:span text:style-name="T37">3.7</text:span><text:span text:style-name="T23"><text:line-break/></text:span><text:span text:style-name="T35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5">#Instalamos la biblioteca Flash</text:span><text:span text:style-name="T23"><text:line-break/></text:span><text:span text:style-name="T22">RUN</text:span><text:span text:style-name="T23"> pip install flask<text:line-break/></text:span><text:span text:style-name="T35">#Exponemos el puerto 5000</text:span><text:span text:style-name="T23"><text:line-break/></text:span><text:span text:style-name="T22">EXPOSE</text:span><text:span text:style-name="T23"> </text:span><text:span text:style-name="T37">5000</text:span><text:span text:style-name="T23"><text:line-break/></text:span><text:span text:style-name="T35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P10"/>
      <text:p text:style-name="P10"/>
      <text:p text:style-name="P10">Con esos dos ficheros, crearemos la ima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build -t cursodockerdocentes/flaskparakubernetes .</text:span></text:p>
          </table:table-cell>
        </table:table-row>
      </table:table>
      <text:p text:style-name="P10">Tras lanzar esta orden, obtendremos algo similar a:</text:p>
      <text:p text:style-name="P10"><draw:frame draw:style-name="fr1" draw:name="image3.png" text:anchor-type="as-char" svg:width="6.6929in" svg:height="1.1807in" draw:z-index="0"><draw:image xlink:href="Pictures/10000201000003EA000000B019B376E28BC83F62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4">#NO HACER, SOLO EJEMPLO</text:span></text:p>
            <text:p text:style-name="P20"><text:span text:style-name="T23">docker run -d --name miapp -p 5000:5000cursodockerdocentes/flaskparak ubernetes</text:span></text:p>
          </table:table-cell>
        </table:table-row>
      </table:table>
      <text:p text:style-name="Standard">pero en este caso, omitiremos este paso, ya que realizaremos el despliegue usando “<text:span text:style-name="T18">Kubernetes</text:span>”. </text:p>
      <text:p text:style-name="Standard"><text:soft-page-break/>Una vez creada, deberemos subirla a un registro como “<text:span text:style-name="T18">Docker Hub</text:span>”. Podéis subirla a vuestra cuenta o<text:span text:style-name="T40"> por comodidad simplemente usar una imagen subida a mi cuenta de</text:span> “<text:span text:style-name="T18">Docker Hub</text:span>”.</text:p>
      <text:p text:style-name="Standard"><text:span text:style-name="T40">Enlace a la imagen: </text:span><text:a xlink:type="simple" xlink:href="https://hub.docker.com/r/cursodockerdocentes/flaskparakubernetes" text:style-name="ListLabel_20_11" text:visited-style-name="ListLabel_20_11"><text:span text:style-name="T20">https://hub.docker.com/r/cursodockerdocentes/flaskparakubernetes</text:span></text:a></text:p>
      <text:p text:style-name="P9"><text:span text:style-name="T9"><text:s/>📖 </text:span><text:span text:style-name="T10">Importante: </text:span>se puede configurar para que la busque localmente, pero va “en contra” del propósito de “<text:span text:style-name="T18">Kubernetes</text:span>” (la idea es que podamos desplegar en un clúster distribuido, donde cada nodo pueda estar en una máquina).</text:p>
      <text:list xml:id="list45435114018824" text:continue-numbering="true" text:style-name="WWNum1">
        <text:list-item>
          <text:p text:style-name="P28"><text:bookmark text:name="_m1jtbkgv3d98"/>Paso 2 (Comandos): Desplegando una aplicación mediante comandos</text:p>
        </text:list-item>
      </text:list>
      <text:p text:style-name="P10">Para desplegar esta aplicación en “<text:span text:style-name="T18">Kubernetes</text:span>” mediante comandos, <text:s/>en primer lugar crearemos un “<text:span text:style-name="T18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5">kubectl create deployment midespliegue --image=cursodockerdocentes/flaskparakubernetes --port=5000</text:span><text:span text:style-name="T26"> </text:span></text:p>
          </table:table-cell>
        </table:table-row>
      </table:table>
      <text:p text:style-name="P10">Obteniendo algo similar a:</text:p>
      <text:p text:style-name="P10"><draw:frame draw:style-name="fr1" draw:name="image7.png" text:anchor-type="as-char" svg:width="6.6929in" svg:height="0.4307in" draw:z-index="0"><draw:image xlink:href="Pictures/10000201000003E800000040CD5F6D4D1AB164D4.png" xlink:type="simple" xlink:show="embed" xlink:actuate="onLoad" loext:mime-type="image/png"/></draw:frame></text:p>
      <text:p text:style-name="P10">Con esta orden estamos:</text:p>
      <text:list xml:id="list4212458633" text:style-name="WWNum2">
        <text:list-item>
          <text:p text:style-name="P24">Creando un “<text:span text:style-name="T18">Pod</text:span>” con nombre “<text:span text:style-name="T18">miapp</text:span>”.</text:p>
        </text:list-item>
        <text:list-item>
          <text:p text:style-name="P25">Indicando que el “<text:span text:style-name="T18">Pod</text:span>” utiliza la imagen “<text:span text:style-name="T18">cursodockerdocentes/flaskparakubernetes</text:span>”.</text:p>
        </text:list-item>
        <text:list-item>
          <text:p text:style-name="P26">Se expone el puerto 5000 de la aplicación.</text:p>
        </text:list-item>
      </text:list>
      <text:p text:style-name="P10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1">kubectl get pods</text:span></text:p>
          </table:table-cell>
        </table:table-row>
      </table:table>
      <text:p text:style-name="P10">Obteniendo algo similar a (tardara igual unos minutos en estar en Running por la descarga):</text:p>
      <text:p text:style-name="P10"><draw:frame draw:style-name="fr1" draw:name="image15.png" text:anchor-type="as-char" svg:width="6.6929in" svg:height="1.028in" draw:z-index="0"><draw:image xlink:href="Pictures/1000020100000317000000790AAC9E0B0278AFD4.png" xlink:type="simple" xlink:show="embed" xlink:actuate="onLoad" loext:mime-type="image/png"/></draw:frame></text:p>
      <text:p text:style-name="P10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5">kubectl expose deployment midespliegue --type=LoadBalancer --name=midespliegue-http</text:span></text:p>
          </table:table-cell>
        </table:table-row>
      </table:table>
      <text:p text:style-name="P10">Obteniendo como respuesta:</text:p>
      <text:p text:style-name="P10"><draw:frame draw:style-name="fr1" draw:name="image17.png" text:anchor-type="as-char" svg:width="6.6929in" svg:height="0.528in" draw:z-index="0"><draw:image xlink:href="Pictures/10000201000003E70000004F4A0C1275BB883131.png" xlink:type="simple" xlink:show="embed" xlink:actuate="onLoad" loext:mime-type="image/png"/></draw:frame></text:p>
      <text:p text:style-name="P10">Una vez hecho esto,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21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18.png" text:anchor-type="as-char" svg:width="6.6929in" svg:height="0.7638in" draw:z-index="0"><draw:image xlink:href="Pictures/100002010000037D00000066B80C881250F3B853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la máquina virtual de “<text:span text:style-name="T18">MiniKube</text:span>”. Para acceder al contenido, tenemos dos formas:</text:p>
      <text:p text:style-name="P10"><text:span text:style-name="T40">Forma 1:</text:span> accederemos a la IP de “<text:span text:style-name="T18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minikube service midespliegue-http</text:span></text:p>
          </table:table-cell>
        </table:table-row>
      </table:table>
      <text:p text:style-name="P10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<text:span text:style-name="T21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14.png" text:anchor-type="as-char" svg:width="6.6929in" svg:height="1.5693in" draw:z-index="0"><draw:image xlink:href="Pictures/10000201000002FF000000B4FEC9D163A70149C1.png" xlink:type="simple" xlink:show="embed" xlink:actuate="onLoad" loext:mime-type="image/png"/></draw:frame></text:p>
      <text:p text:style-name="P10">Tras ello podemos observar que nuestra aplicación está siendo servida:</text:p>
      <text:p text:style-name="P10"/>
      <text:p text:style-name="P10"><draw:frame draw:style-name="fr1" draw:name="image2.png" text:anchor-type="as-char" svg:width="6.6929in" svg:height="0.9583in" draw:z-index="0"><draw:image xlink:href="Pictures/1000020100000353000000793E93F036047EE70B.png" xlink:type="simple" xlink:show="embed" xlink:actuate="onLoad" loext:mime-type="image/png"/></draw:frame></text:p>
      <text:p text:style-name="P10"><text:span text:style-name="T40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minikube tunnel</text:span></text:p>
          </table:table-cell>
        </table:table-row>
      </table:table>
      <text:p text:style-name="P10"/>
      <text:p text:style-name="P10">Este comando se ejecutará en la terminal “de forma indefinida” y <text:span text:style-name="T40">mientras esté en funcionamiento</text:span>, establecerá un túnel para acceder al servicio. Veremos algo similar a:</text:p>
      <text:p text:style-name="P11"><draw:frame draw:style-name="fr1" draw:name="image16.png" text:anchor-type="as-char" svg:width="5.5835in" svg:height="2.3437in" draw:z-index="0"><draw:image xlink:href="Pictures/1000020100000218000000E16794323D36592EA6.png" xlink:type="simple" xlink:show="embed" xlink:actuate="onLoad" loext:mime-type="image/png"/></draw:frame></text:p>
      <text:p text:style-name="P10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span text:style-name="T21">kubectl get services</text:span></text:p>
          </table:table-cell>
        </table:table-row>
      </table:table>
      <text:p text:style-name="P10"><draw:frame draw:style-name="fr1" draw:name="image8.png" text:anchor-type="as-char" svg:width="6.6929in" svg:height="1.4862in" draw:z-index="0"><draw:image xlink:href="Pictures/10000201000003E0000000DD785C9873F803CFD8.png" xlink:type="simple" xlink:show="embed" xlink:actuate="onLoad" loext:mime-type="image/png"/></draw:frame></text:p>
      <text:p text:style-name="P10">Ya observaremos una IP. En este ejemplo, accediendo al puerto 5000 de la IP del balanceador (en este ejemplo <text:a xlink:type="simple" xlink:href="http://10.108.174.125:5000" text:style-name="ListLabel_20_10" text:visited-style-name="ListLabel_20_10"><text:span text:style-name="T19">http://10.108.174.125:5000</text:span></text:a>) accederemos a la aplicación Flask desplegada.</text:p>
      <text:list xml:id="list45436039661322" text:continue-list="list45435114018824" text:style-name="WWNum1">
        <text:list-item>
          <text:p text:style-name="P28"><text:bookmark text:name="_9p0xnot11ut4"/>Paso 4: escalando nuestro despliegue</text:p>
        </text:list-item>
      </text:list>
      <text:p text:style-name="P10">Si queremos escalar el número de “<text:span text:style-name="T18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kubectl scale deployment midespliegue --replicas=3</text:span></text:p>
          </table:table-cell>
        </table:table-row>
      </table:table>
      <text:p text:style-name="P10"/>
      <text:p text:style-name="P10">Establecerá 3 réplicas. Si tras lanzarlo vemos los “<text:span text:style-name="T18">Pods</text:span>”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1">kubectl get pods</text:span></text:p>
          </table:table-cell>
        </table:table-row>
      </table:table>
      <text:p text:style-name="P10">Observamos algo similar a:</text:p>
      <text:p text:style-name="P10"><draw:frame draw:style-name="fr1" draw:name="image12.png" text:anchor-type="as-char" svg:width="6.6929in" svg:height="1.4445in" draw:z-index="0"><draw:image xlink:href="Pictures/10000201000003B7000000CDB5ED89598DD595F3.png" xlink:type="simple" xlink:show="embed" xlink:actuate="onLoad" loext:mime-type="image/png"/></draw:frame></text:p>
      <text:p text:style-name="P10">Donde se han creado 3 réplicas. Si accedemos a la máquina como se describió en el paso anterior, veremos que cada vez nos atenderá uno de los “<text:span text:style-name="T18">Pods</text:span>” gracias al balanceo de carga.</text:p>
      <text:p text:style-name="P10"/>
      <text:p text:style-name="P10"><text:soft-page-break/>Si queremos que “<text:span text:style-name="T18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2"><text:span text:style-name="T21">kubectl autoscale deployment midespliegue --min=5 --max=10</text:span></text:p>
          </table:table-cell>
        </table:table-row>
      </table:table>
      <text:p text:style-name="P10">Observamos la siguiente imagen:</text:p>
      <text:p text:style-name="P10"><draw:frame draw:style-name="fr1" draw:name="image11.png" text:anchor-type="as-char" svg:width="6.6929in" svg:height="1.861in" draw:z-index="0"><draw:image xlink:href="Pictures/10000201000003E800000116020945CB7C83F599.png" xlink:type="simple" xlink:show="embed" xlink:actuate="onLoad" loext:mime-type="image/png"/></draw:frame></text:p>
      <text:p text:style-name="P10">Se observa que previo al autoescalado, había 3 “<text:span text:style-name="T18">Pods</text:span>”. A los pocos segundos (si no ocurre, podemos forzar recargando varias veces la petición al navegador), veremos que se ha aplicado el auto-escalado (con un mínimo de 5, pero la posibilidad de auto-escalarse a 10).</text:p>
      <text:p text:style-name="P10">Si comprobamos el acceso como se explica en él “<text:span text:style-name="T18">Punto 3</text:span>”, veremos que nos sirve la aplicación hasta 5 contenedores distintos.</text:p>
      <text:list xml:id="list45435939397904" text:continue-numbering="true" text:style-name="WWNum1">
        <text:list-item>
          <text:p text:style-name="P28"><text:bookmark text:name="_v5ot8tcfc7uh"/>Paso 5 (Fichero YAML):Desplegando la aplicación mediante ficheros YAML</text:p>
        </text:list-item>
      </text:list>
      <text:p text:style-name="P10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2"><text:span text:style-name="T21">kubectl delete deployment midespliegue</text:span></text:p>
          </table:table-cell>
        </table:table-row>
      </table:table>
      <text:p text:style-name="P2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2"><text:span text:style-name="T21">kubectl delete service midespliegue-http</text:span></text:p>
          </table:table-cell>
        </table:table-row>
      </table:table>
      <text:p text:style-name="P10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<text:span text:style-name="T21">kubectl delete horizontalpodautoscaler midespliegue</text:span></text:p>
          </table:table-cell>
        </table:table-row>
      </table:table>
      <text:p text:style-name="P10"/>
      <text:p text:style-name="P10">Vamos a definir la configuración presentada al final del “<text:span text:style-name="T10">Paso 4</text:span>” utilizando un fichero <text:span text:style-name="T10">YAML</text:span> <text:s/>comentado “<text:span text:style-name="T18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2"><text:span text:style-name="T36">#Indicamos la versión de la API</text:span><text:span text:style-name="T27"><text:line-break/>apiVersion: </text:span><text:span text:style-name="T32">apps/v1</text:span><text:span text:style-name="T27"><text:line-break/></text:span><text:span text:style-name="T36">#Indicamos que este fichero es de un despliegue</text:span><text:span text:style-name="T27"><text:line-break/>kind: </text:span><text:span text:style-name="T32">Deployment</text:span><text:span text:style-name="T27"><text:line-break/></text:span><text:span text:style-name="T36">#Metadatos del despliegue</text:span><text:span text:style-name="T27"><text:line-break/>metadata:<text:line-break/> <text:s/>name: </text:span><text:span text:style-name="T32">midespliegue</text:span><text:span text:style-name="T27"><text:line-break/></text:span><text:span text:style-name="T36">#Características del despliegue</text:span><text:span text:style-name="T27"><text:line-break/>spec:<text:line-break/> <text:s/></text:span><text:span text:style-name="T36"># Al inicio 3 réplicas (luego si queremos activamos autoescalado)</text:span><text:span text:style-name="T27"><text:line-break/> <text:s/>replicas: </text:span><text:span text:style-name="T38">3</text:span><text:span text:style-name="T27"><text:line-break/> <text:s/></text:span><text:span text:style-name="T36">#Selector de los pods</text:span><text:span text:style-name="T27"><text:line-break/> <text:s/>selector:<text:line-break/><text:tab/>matchLabels:<text:line-break/> <text:s/><text:tab/>app: </text:span><text:span text:style-name="T32">midespliegue</text:span><text:span text:style-name="T27"><text:line-break/> <text:s/></text:span><text:span text:style-name="T36">#Plantilla de los pods</text:span><text:span text:style-name="T27"><text:line-break/> <text:s/>template:<text:line-break/><text:tab/></text:span><text:span text:style-name="T36">#Metadatos de los pods</text:span><text:span text:style-name="T27"><text:line-break/><text:tab/>metadata:<text:line-break/> <text:s/><text:tab/>labels:<text:line-break/> <text:s text:c="3"/><text:tab/>app: </text:span><text:span text:style-name="T32">midespliegue</text:span><text:span text:style-name="T27"><text:line-break/><text:tab/></text:span><text:span text:style-name="T36">#Caracteristicas de los pods</text:span><text:span text:style-name="T27"><text:line-break/><text:tab/>spec:<text:line-break/> <text:s/><text:tab/></text:span><text:span text:style-name="T36">#Contenedor del pod</text:span><text:span text:style-name="T27"><text:line-break/> <text:s/><text:tab/>containers:<text:line-break/> <text:s/><text:tab/></text:span><text:span text:style-name="T36">#Nombre, imagen y puerto expuesto</text:span><text:span text:style-name="T27"><text:line-break/> <text:s/><text:tab/></text:span><text:span text:style-name="T44">-</text:span><text:span text:style-name="T27"> name: </text:span><text:span text:style-name="T32">miapp</text:span><text:span text:style-name="T27"><text:line-break/> <text:s text:c="3"/><text:tab/>image: </text:span><text:span text:style-name="T32">cursodockerdocentes/flaskparakubernetes</text:span><text:span text:style-name="T27"><text:line-break/> <text:s text:c="3"/><text:tab/>ports:<text:line-break/> <text:s text:c="3"/><text:tab/></text:span><text:span text:style-name="T44">-</text:span><text:span text:style-name="T27"> containerPort: </text:span><text:span text:style-name="T38">500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2"><text:span text:style-name="T21">kubectl apply -f </text:span><text:span text:style-name="T34">"deployment.yaml"</text:span></text:p>
          </table:table-cell>
        </table:table-row>
      </table:table>
      <text:p text:style-name="P10">Con esto habremos creado nuestro despliegue. Observaremos algo similar a:</text:p>
      <text:p text:style-name="P10"><draw:frame draw:style-name="fr1" draw:name="image9.png" text:anchor-type="as-char" svg:width="6.6929in" svg:height="0.5693in" draw:z-index="0"><draw:image xlink:href="Pictures/10000201000002FB0000004100809D9DFF2A3982.png" xlink:type="simple" xlink:show="embed" xlink:actuate="onLoad" loext:mime-type="image/png"/></draw:frame></text:p>
      <text:p text:style-name="P10">Tras ello, deberemos crear nuestro servicio con un fichero “<text:span text:style-name="T18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2"><text:span text:style-name="T36">#Versión de la API</text:span><text:span text:style-name="T28"><text:line-break/>apiVersion: </text:span><text:span text:style-name="T33">v1</text:span><text:span text:style-name="T28"><text:line-break/></text:span><text:span text:style-name="T36">#Definimos un servicio</text:span><text:span text:style-name="T28"><text:line-break/>kind: </text:span><text:span text:style-name="T33">Service</text:span><text:span text:style-name="T28"><text:line-break/></text:span><text:span text:style-name="T36">#Metadatos del servicio</text:span><text:span text:style-name="T28"><text:line-break/>metadata:<text:line-break/> <text:s/>name: </text:span><text:span text:style-name="T33">midespliegue-http</text:span><text:span text:style-name="T28"><text:line-break/></text:span><text:span text:style-name="T36">#Características del servicio</text:span><text:span text:style-name="T28"><text:line-break/>spec:<text:line-break/> <text:s/></text:span><text:span text:style-name="T36">#Tipo de servicio</text:span><text:span text:style-name="T28"><text:line-break/> <text:s/>type: </text:span><text:span text:style-name="T33">LoadBalancer</text:span><text:span text:style-name="T28"><text:line-break/> <text:s/></text:span><text:span text:style-name="T36">#Puerto a exponer</text:span><text:span text:style-name="T28"><text:line-break/> <text:s/>ports:<text:line-break/><text:tab/></text:span><text:span text:style-name="T45">-</text:span><text:span text:style-name="T28"> port: </text:span><text:span text:style-name="T39">5000</text:span><text:span text:style-name="T28"><text:line-break/> <text:s/><text:tab/>targetPort: </text:span><text:span text:style-name="T39">5000</text:span><text:span text:style-name="T28"><text:line-break/> <text:s/></text:span><text:span text:style-name="T36">#A que aplica el servicio, busca los que coincidan con app: midespliegue para servir</text:span><text:span text:style-name="T28"><text:line-break/> <text:s/>selector:<text:line-break/><text:tab/>app: </text:span><text:span text:style-name="T33">midespliegue</text:span></text:p>
          </table:table-cell>
        </table:table-row>
      </table:table>
      <text:p text:style-name="P10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0"><text:span text:style-name="T21">kubectl apply -f </text:span><text:span text:style-name="T34">"service.yaml"</text:span></text:p>
          </table:table-cell>
        </table:table-row>
      </table:table>
      <text:p text:style-name="P10"/>
      <text:p text:style-name="P10">Si todo ha ido bien, tendremos algo similar a:</text:p>
      <text:p text:style-name="P10"><draw:frame draw:style-name="fr1" draw:name="image6.png" text:anchor-type="as-char" svg:width="6.6929in" svg:height="1.528in" draw:z-index="0"><draw:image xlink:href="Pictures/10000201000003D5000000E00630F297FC4E2CCB.png" xlink:type="simple" xlink:show="embed" xlink:actuate="onLoad" loext:mime-type="image/png"/></draw:frame></text:p>
      <text:p text:style-name="P10">Si comprobamos el acceso como se explica en el “<text:span text:style-name="T18">Punto 3</text:span>”, veremos que nos sirve la aplicación correctamente.</text:p>
      <text:p text:style-name="P10"/>
      <text:p text:style-name="P10">Por último, definiremos mediante un fichero “<text:span text:style-name="T18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2"><text:span text:style-name="T28">apiVersion: </text:span><text:span text:style-name="T33">autoscaling/v1</text:span><text:span text:style-name="T28"><text:line-break/></text:span><text:span text:style-name="T36">#Tipo autoescalado horizontal</text:span><text:span text:style-name="T28"><text:line-break/>kind: </text:span><text:span text:style-name="T33">HorizontalPodAutoscaler</text:span><text:span text:style-name="T28"><text:line-break/>metadata:<text:line-break/> <text:s/>name: </text:span><text:span text:style-name="T33">autoescalado</text:span><text:span text:style-name="T28"><text:line-break/>spec:<text:line-break/> <text:s/></text:span><text:span text:style-name="T36">#Indicamos a quien se aplica el auto-escalado</text:span><text:span text:style-name="T28"><text:line-break/> <text:s/>scaleTargetRef:<text:line-break/><text:tab/>apiVersion: </text:span><text:span text:style-name="T33">apps/v1</text:span><text:span text:style-name="T28"><text:line-break/><text:tab/>kind: </text:span><text:span text:style-name="T33">Deployment</text:span><text:span text:style-name="T28"><text:line-break/><text:tab/>name: </text:span><text:span text:style-name="T33">midespliegue</text:span><text:span text:style-name="T28"><text:line-break/> <text:s/></text:span><text:span text:style-name="T36">#Minimo y maximo de réplicas</text:span><text:span text:style-name="T28"><text:line-break/> <text:s/>minReplicas: </text:span><text:span text:style-name="T39">5</text:span><text:span text:style-name="T28"><text:line-break/> <text:s/>maxReplicas: </text:span><text:span text:style-name="T39">10</text:span><text:span text:style-name="T28"><text:line-break/> <text:s/></text:span><text:span text:style-name="T36">#Máximo de CPU a usar durante el auto-escalado</text:span><text:span text:style-name="T28"><text:line-break/> <text:s/>targetCPUUtilizationPercentage: </text:span><text:span text:style-name="T39">5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0"><text:span text:style-name="T21">kubectl apply -f </text:span><text:span text:style-name="T34">"autoscale.yaml"</text:span></text:p>
          </table:table-cell>
        </table:table-row>
      </table:table>
      <text:p text:style-name="P10"/>
      <text:p text:style-name="P10">Para comprobar que el autoescalado se ha realizado correctamente, deberemos realizar una petición al servicio del despliegue, de forma similar a lo comentado en él “<text:span text:style-name="T18">Paso 3</text:span>”. Tras esto, escalará y veremos que el sistema ha autoescalado a 5 “<text:span text:style-name="T18">Pods</text:span>”.</text:p>
      <text:p text:style-name="P10"><draw:frame draw:style-name="fr1" draw:name="image5.png" text:anchor-type="as-char" svg:width="6.6929in" svg:height="3.2362in" draw:z-index="0"><draw:image xlink:href="Pictures/1000020100000366000001A5E2F22DA60869DB11.png" xlink:type="simple" xlink:show="embed" xlink:actuate="onLoad" loext:mime-type="image/png"/></draw:frame></text:p>
      <text:list xml:id="list45436070915574" text:continue-numbering="true" text:style-name="WWNum1">
        <text:list-item>
          <text:p text:style-name="P28"><text:bookmark text:name="_okij6l7ljwiv"/>Paso 6: eliminando lo creado</text:p>
        </text:list-item>
      </text:list>
      <text:p text:style-name="P10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0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45435074709322" text:continue-numbering="true" text:style-name="WWNum1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31" meta:word-count="1476" meta:character-count="10257" meta:non-whitespace-character-count="8806"/>
    <meta:generator>LibreOfficeDev/6.0.5.2$Linux_X86_64 LibreOffice_project/</meta:generator>
  </office:meta>
</office:document-meta>
</file>