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29FB6A4F7EFEF7F9A41.png" manifest:media-type="image/png"/>
  <manifest:file-entry manifest:full-path="Pictures/10000201000004DD0000022C7C274CF165FDFADF.png" manifest:media-type="image/png"/>
  <manifest:file-entry manifest:full-path="Pictures/10000201000001B0000001D11255144265E36A80.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text-indent="0in" style:auto-text-indent="false" fo:break-before="auto" fo:break-after="auto"/>
    </style:style>
    <style:style style:name="P34"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5"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36" style:family="paragraph" style:parent-style-name="Heading_20_1" style:list-style-name="WWNum1">
      <style:paragraph-properties fo:break-before="auto" fo:break-after="auto"/>
    </style:style>
    <style:style style:name="P37" style:family="paragraph" style:parent-style-name="Heading_20_1" style:list-style-name="WWNum1">
      <style:paragraph-properties fo:text-align="justify" style:justify-single-word="false" fo:break-before="auto" fo:break-after="auto"/>
    </style:style>
    <style:style style:name="P38" style:family="paragraph" style:parent-style-name="Heading_20_1" style:list-style-name="WWNum1">
      <style:paragraph-properties fo:margin-left="0.4in" fo:margin-right="0in" fo:text-align="justify" style:justify-single-word="false" fo:text-indent="-0.3in" style:auto-text-indent="false" fo:break-before="auto" fo:break-after="auto"/>
    </style:style>
    <style:style style:name="P39" style:family="paragraph" style:parent-style-name="Heading_20_3" style:list-style-name="WWNum1">
      <style:paragraph-properties fo:break-before="auto" fo:break-after="auto"/>
    </style:style>
    <style:style style:name="P40" style:family="paragraph" style:parent-style-name="Heading_20_2" style:list-style-name="WWNum1">
      <style:paragraph-properties fo:break-before="auto" fo:break-after="auto"/>
    </style:style>
    <style:style style:name="P4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font-weight-complex="bold"/>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color="#1155cc" style:text-underline-style="solid" style:text-underline-width="auto" style:text-underline-color="font-color"/>
    </style:style>
    <style:style style:name="T24" style:family="text">
      <style:text-properties fo:color="#1155cc" style:text-underline-style="solid" style:text-underline-width="auto" style:text-underline-color="font-color" fo:font-weight="bold" style:font-weight-asian="bold" style:font-weight-complex="bold"/>
    </style:style>
    <style:style style:name="T25" style:family="text">
      <style:text-properties style:text-underline-style="none"/>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color="#333333" style:font-name="Consolas" fo:font-weight="bold" fo:background-color="#f8f8f8" loext:char-shading-value="0" style:font-name-asian="Consolas1" style:font-weight-asian="bold" style:font-name-complex="Consolas1" style:font-weight-complex="bold"/>
    </style:style>
    <style:style style:name="T28" style:family="text">
      <style:text-properties fo:color="#333333" style:font-name="Consolas" fo:font-size="10pt" fo:background-color="#f8f8f8" loext:char-shading-value="0" style:font-name-asian="Consolas1" style:font-size-asian="10pt" style:font-name-complex="Consolas1" style:font-size-complex="10pt"/>
    </style:style>
    <style:style style:name="T29" style:family="text">
      <style:text-properties fo:color="#008080" style:font-name="Consolas" fo:background-color="#f8f8f8" loext:char-shading-value="0" style:font-name-asian="Consolas1" style:font-name-complex="Consolas1"/>
    </style:style>
    <style:style style:name="T30" style:family="text">
      <style:text-properties fo:color="#008080" style:font-name="Consolas" fo:font-size="10pt" fo:background-color="#f8f8f8" loext:char-shading-value="0" style:font-name-asian="Consolas1" style:font-size-asian="10pt" style:font-name-complex="Consolas1" style:font-size-complex="10pt"/>
    </style:style>
    <style:style style:name="T31" style:family="text">
      <style:text-properties fo:font-style="italic" style:font-style-asian="italic" style:font-style-complex="italic"/>
    </style:style>
    <style:style style:name="T32" style:family="text">
      <style:text-properties fo:color="#0086b3" style:font-name="Consolas" fo:font-size="10pt" fo:background-color="#f8f8f8" loext:char-shading-value="0" style:font-name-asian="Consolas1" style:font-size-asian="10pt" style:font-name-complex="Consolas1" style:font-size-complex="10pt"/>
    </style:style>
    <style:style style:name="T33" style:family="text">
      <style:text-properties fo:color="#0086b3" style:font-name="Consolas" fo:background-color="#f8f8f8" loext:char-shading-value="0" style:font-name-asian="Consolas1" style:font-name-complex="Consolas1"/>
    </style:style>
    <style:style style:name="T34" style:family="text">
      <style:text-properties fo:color="#dd1144" style:font-name="Consolas" fo:font-size="10pt" fo:background-color="#f8f8f8" loext:char-shading-value="0" style:font-name-asian="Consolas1" style:font-size-asian="10pt" style:font-name-complex="Consolas1" style:font-size-complex="10pt"/>
    </style:style>
    <style:style style:name="T35" style:family="text">
      <style:text-properties fo:color="#dd1144" style:font-name="Consolas" fo:background-color="#f8f8f8" loext:char-shading-value="0" style:font-name-asian="Consolas1" style:font-name-complex="Consolas1"/>
    </style:style>
    <style:style style:name="T3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aczyuw2yex2w"/><text:span text:style-name="T1">Introducción a Docker y Kubernetes</text:span><text:span text:style-name="T4"><text:line-break/></text:span><text:span text:style-name="T5">UD 02. Instalación de Docker</text:span></text:p>
      <text:p text:style-name="P1"><draw:frame draw:style-name="fr1" draw:name="image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5"><draw:frame draw:style-name="fr1" draw:name="image6.png" text:anchor-type="as-char" svg:width="6.6929in" svg:height="0.4862in" draw:z-index="0"><draw:image xlink:href="Pictures/10000000000007800000008BADE10FA77D575FB0.png" xlink:type="simple" xlink:show="embed" xlink:actuate="onLoad" loext:mime-type="image/png"/></draw:frame></text:p>
      <text:p text:style-name="P4"><text:span text:style-name="T7">Autor: Sergi García Barea</text:span></text:p>
      <text:p text:style-name="P4"><text:span text:style-name="T7">Actualizado Enero 2026</text:span></text:p>
      <text:p text:style-name="P4"><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
      <text:p text:style-name="P10"><text:span text:style-name="T11"><text:s/>💬</text:span> <text:span text:style-name="T12">Interesante</text:span></text:p>
      <text:p text:style-name="P13"><text:span text:style-name="T15">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9">1. Introducción<text:tab/>3</text:span></text:a></text:p>
          <text:p text:style-name="P15"><text:a xlink:type="simple" xlink:href="#_vyhbfp4t666x" text:style-name="Index_20_Link" text:visited-style-name="Index_20_Link"><text:span text:style-name="T19">2. Instalación de Docker en sistemas Linux (Ubuntu)<text:tab/>3</text:span></text:a></text:p>
          <text:p text:style-name="P17"><text:a xlink:type="simple" xlink:href="#_1q64sijg6szd" text:style-name="Index_20_Link" text:visited-style-name="Index_20_Link"><text:span text:style-name="T19">2.1 <text:s/>Instalación desde el repositorio oficial de Ubuntu (No recomendado)<text:tab/>3</text:span></text:a></text:p>
          <text:p text:style-name="P17"><text:a xlink:type="simple" xlink:href="#_60fzqjy2xkhv" text:style-name="Index_20_Link" text:visited-style-name="Index_20_Link"><text:span text:style-name="T19">2.2 <text:s/>Instalación desde el repositorio de Docker-CE (Recomendado)<text:tab/>3</text:span></text:a></text:p>
          <text:p text:style-name="P18"><text:a xlink:type="simple" xlink:href="#_5rzg6kfamu0e" text:style-name="Index_20_Link" text:visited-style-name="Index_20_Link"><text:span text:style-name="T19">2.2.1 <text:s/>Paso 1: Eliminando versiones antiguas de Docker Engine<text:tab/>3</text:span></text:a></text:p>
          <text:p text:style-name="P18"><text:a xlink:type="simple" xlink:href="#_xqdtr2f8r7sb" text:style-name="Index_20_Link" text:visited-style-name="Index_20_Link"><text:span text:style-name="T19">2.2.2 <text:s/>Paso 2: Incluyendo el repositorio de Docker CE<text:tab/>3</text:span></text:a></text:p>
          <text:p text:style-name="P18"><text:a xlink:type="simple" xlink:href="#_c2sd49sbb8iq" text:style-name="Index_20_Link" text:visited-style-name="Index_20_Link"><text:span text:style-name="T19">2.2.3 <text:s/>Paso 3: Instalando Docker Engine CE<text:tab/>4</text:span></text:a></text:p>
          <text:p text:style-name="P17"><text:a xlink:type="simple" xlink:href="#_fx3k31y5cq1e" text:style-name="Index_20_Link" text:visited-style-name="Index_20_Link"><text:span text:style-name="T19">2.3 <text:s/>Post instalación<text:tab/>5</text:span></text:a></text:p>
          <text:p text:style-name="P18"><text:a xlink:type="simple" xlink:href="#_6oto2eyroja0" text:style-name="Index_20_Link" text:visited-style-name="Index_20_Link"><text:span text:style-name="T19">2.3.1 <text:s/>Permitir administrar Docker con usuarios sin privilegios<text:tab/>5</text:span></text:a></text:p>
          <text:p text:style-name="P18"><text:a xlink:type="simple" xlink:href="#_ahp0tx9a9oz3" text:style-name="Index_20_Link" text:visited-style-name="Index_20_Link"><text:span text:style-name="T19">2.3.2 <text:s/>Activar/desactivar arranque al inicio<text:tab/>6</text:span></text:a></text:p>
          <text:p text:style-name="P17"><text:a xlink:type="simple" xlink:href="#_zidb06hdru0n" text:style-name="Index_20_Link" text:visited-style-name="Index_20_Link"><text:span text:style-name="T19">2.4 <text:s/>Desinstalando Docker en Ubuntu<text:tab/>7</text:span></text:a></text:p>
          <text:p text:style-name="P15"><text:a xlink:type="simple" xlink:href="#_wapa5zpjg8gh" text:style-name="Index_20_Link" text:visited-style-name="Index_20_Link"><text:span text:style-name="T19">3. Instalación de Docker en sistemas Windows<text:tab/>7</text:span></text:a></text:p>
          <text:p text:style-name="P15"><text:a xlink:type="simple" xlink:href="#_rod7juqje8wr" text:style-name="Index_20_Link" text:visited-style-name="Index_20_Link"><text:span text:style-name="T19">4. Instalación de Docker en sistemas MacOS<text:tab/>8</text:span></text:a></text:p>
          <text:p text:style-name="P15"><text:a xlink:type="simple" xlink:href="#_w7fyvrsld5rt" text:style-name="Index_20_Link" text:visited-style-name="Index_20_Link"><text:span text:style-name="T19">5. Playgrounds de Docker<text:tab/>9</text:span></text:a></text:p>
          <text:p text:style-name="P15"><text:a xlink:type="simple" xlink:href="#_gh56wl6jl7p1" text:style-name="Index_20_Link" text:visited-style-name="Index_20_Link"><text:span text:style-name="T19">6. Conclusión<text:tab/>9</text:span></text:a></text:p>
          <text:p text:style-name="P15"><text:a xlink:type="simple" xlink:href="#_g1qlmy5ta6mu" text:style-name="Index_20_Link" text:visited-style-name="Index_20_Link"><text:span text:style-name="T19">7. Bibliografía<text:tab/>9</text:span></text:a></text:p>
        </text:index-body>
      </text:table-of-content>
      <text:p text:style-name="P14"/>
      <text:p text:style-name="P19"/>
      <text:p text:style-name="P19"/>
      <text:p text:style-name="P19"/>
      <text:p text:style-name="P19"/>
      <text:p text:style-name="P19"/>
      <text:p text:style-name="P19"/>
      <text:p text:style-name="P19"/>
      <text:p text:style-name="P20"><text:span text:style-name="T16">UD02. Instalación de Docker</text:span></text:p>
      <text:list xml:id="list959827564" text:style-name="WWNum1">
        <text:list-item>
          <text:p text:style-name="P36"><text:bookmark text:name="_dbh0n1vac4c8"/>Introducción</text:p>
        </text:list-item>
      </text:list>
      <text:p text:style-name="P11">En esta unidad explicaremos diversos itinerarios para la instalación de Docker, realizando nuestras recomendaciones. Tras ello, describiremos opciones de post instalación y comprobaremos que todo funciona correctamente. Aunque el curso debería poder realizarse en sistemas Windows y MacOS, <text:span text:style-name="T22">recomendamos siempre que sea posible realizar el curso (y en general, usar Docker) en sistemas Linux</text:span>, ya que su implementación a día de hoy es más robusta y puede evitarnos muchos quebraderos de cabeza.</text:p>
      <text:list xml:id="list34636186606848" text:continue-numbering="true" text:style-name="WWNum1">
        <text:list-item>
          <text:p text:style-name="P37"><text:bookmark text:name="_vyhbfp4t666x"/>Instalación de Docker en sistemas Linux (Ubuntu)</text:p>
        </text:list-item>
      </text:list>
      <text:p text:style-name="P11"><text:soft-page-break/>En este apartado vamos a hablar de la instalación de Docker Engine CE (Community Edition) en sistemas Linux en distribuciones basadas en <text:span text:style-name="T12">Ubuntu</text:span> (Ubuntu, KUbuntu, Linux Mint, etc.).</text:p>
      <text:p text:style-name="P11"/>
      <text:p text:style-name="P11">El procedimiento para instalar Docker Engine CE en otras distribuciones es similar y aquí dejo algunos enlaces con instrucciones para instalarlo en algunas de las más populares:</text:p>
      <text:list xml:id="list4279975399" text:style-name="WWNum2">
        <text:list-item>
          <text:p text:style-name="P26"><text:span text:style-name="T12">CentOS</text:span>: <text:a xlink:type="simple" xlink:href="https://docs.docker.com/engine/install/centos/" text:style-name="ListLabel_20_19" text:visited-style-name="ListLabel_20_19"><text:span text:style-name="T23">https://docs.docker.com/engine/install/centos/</text:span></text:a></text:p>
        </text:list-item>
        <text:list-item>
          <text:p text:style-name="P28"><text:span text:style-name="T12">Debian</text:span>: <text:a xlink:type="simple" xlink:href="https://docs.docker.com/engine/install/debian/" text:style-name="ListLabel_20_19" text:visited-style-name="ListLabel_20_19"><text:span text:style-name="T23">https://docs.docker.com/engine/install/debian/</text:span></text:a></text:p>
        </text:list-item>
        <text:list-item>
          <text:p text:style-name="P30"><text:span text:style-name="T12">Fedora</text:span>: <text:a xlink:type="simple" xlink:href="https://docs.docker.com/engine/install/fedora/" text:style-name="ListLabel_20_19" text:visited-style-name="ListLabel_20_19"><text:span text:style-name="T23">https://docs.docker.com/engine/install/fedora/</text:span></text:a></text:p>
        </text:list-item>
      </text:list>
      <text:p text:style-name="P11">Asimismo, también es posible la realización de una instalación desde los binarios, siguiendo las instrucciones de <text:a xlink:type="simple" xlink:href="https://docs.docker.com/engine/install/binaries/" text:style-name="ListLabel_20_19" text:visited-style-name="ListLabel_20_19"><text:span text:style-name="T23">https://docs.docker.com/engine/install/binaries/</text:span></text:a></text:p>
      <text:list xml:id="list34635870756408" text:continue-list="list34636186606848" text:style-name="WWNum1">
        <text:list-item>
          <text:list>
            <text:list-item>
              <text:p text:style-name="P40"><text:bookmark text:name="_1q64sijg6szd"/>Instalación desde el repositorio oficial de Ubuntu (No recomendado)</text:p>
            </text:list-item>
          </text:list>
        </text:list-item>
      </text:list>
      <text:p text:style-name="P11">Es posible instalar Docker Engine desde el repositorio oficial de Ubuntu, pero no está recomendado, ya que instala versiones antiguas. <text:span text:style-name="T22">En este curso, daremos por supuesto que no se utilizaran estas versiones e instalaremos Docker CE desde la fuente oficial.</text:span></text:p>
      <text:list xml:id="list34634798148996" text:continue-numbering="true" text:style-name="WWNum1">
        <text:list-item>
          <text:list>
            <text:list-item>
              <text:p text:style-name="P40"><text:bookmark text:name="_60fzqjy2xkhv"/>Instalación desde el repositorio de Docker-CE (Recomendado)</text:p>
            </text:list-item>
          </text:list>
        </text:list-item>
      </text:list>
      <text:p text:style-name="P11">A continuación detallaremos los pasos para instalar Docker Engine CE en Ubuntu desde el repositorio oficial de Docker CE. Seguiremos los pasos detallados en <text:a xlink:type="simple" xlink:href="https://docs.docker.com/engine/install/ubuntu/" text:style-name="ListLabel_20_19" text:visited-style-name="ListLabel_20_19"><text:span text:style-name="T23">https://docs.docker.com/engine/install/ubuntu/</text:span></text:a></text:p>
      <text:list xml:id="list34635506882116" text:continue-numbering="true" text:style-name="WWNum1">
        <text:list-item>
          <text:list>
            <text:list-item>
              <text:list>
                <text:list-item>
                  <text:p text:style-name="P39"><text:bookmark text:name="_5rzg6kfamu0e"/>Paso 1: Eliminando versiones antiguas de Docker Engine</text:p>
                </text:list-item>
              </text:list>
            </text:list-item>
          </text:list>
        </text:list-item>
      </text:list>
      <text:p text:style-name="P11">En primer lugar, deberemos eliminar otras versiones de Docker, por si estuvieran instaladas (por ejemplo, una versión del repositorio oficial de Ubuntu) y pudieran provocar conflictos.</text:p>
      <text:p text:style-name="P11">Para eliminar las versiones antiguas puede bastarnos con la orden:</text:p>
      <table:table table:name="Table1" table:style-name="Table1">
        <table:table-column table:style-name="Table1.A"/>
        <table:table-row table:style-name="Table1.1">
          <table:table-cell table:style-name="Table1.A1" office:value-type="string">
            <text:p text:style-name="P32"><text:span text:style-name="T26"><text:s/></text:span><text:span text:style-name="T27">for</text:span><text:span text:style-name="T26"> pkg </text:span><text:span text:style-name="T27">in</text:span><text:span text:style-name="T26"> docker.io docker-doc docker-compose docker-compose-v2 podman-docker containerd runc; </text:span><text:span text:style-name="T27">do</text:span><text:span text:style-name="T26"> sudo apt-get remove </text:span><text:span text:style-name="T29">$pkg</text:span><text:span text:style-name="T26">; </text:span><text:span text:style-name="T27">done</text:span></text:p>
          </table:table-cell>
        </table:table-row>
      </table:table>
      <text:p text:style-name="P11"/>
      <text:list xml:id="list34634964540254" text:continue-numbering="true" text:style-name="WWNum1">
        <text:list-item>
          <text:list>
            <text:list-item>
              <text:list>
                <text:list-item>
                  <text:p text:style-name="P39"><text:bookmark text:name="_xqdtr2f8r7sb"/>Paso 2: Incluyendo el repositorio de Docker CE</text:p>
                </text:list-item>
              </text:list>
            </text:list-item>
          </text:list>
        </text:list-item>
      </text:list>
      <text:p text:style-name="P11">Para poner en marcha el repositorio, lo primero que haremos será actualizar nuestro índice de paquetes y tras ello, instalar los paquetes necesarios (si no lo estaban ya) para que se puedan utilizar repositorios con HTTPS.</text:p>
      <text:p text:style-name="P11"/>
      <table:table table:name="Table2" table:style-name="Table2">
        <table:table-column table:style-name="Table2.A"/>
        <table:table-row table:style-name="Table2.1">
          <table:table-cell table:style-name="Table2.A1" office:value-type="string">
            <text:p text:style-name="P32"><text:span text:style-name="T26">sudo apt-get update</text:span></text:p>
          </table:table-cell>
        </table:table-row>
      </table:table>
      <text:p text:style-name="P11"/>
      <table:table table:name="Table3" table:style-name="Table3">
        <table:table-column table:style-name="Table3.A"/>
        <table:table-row table:style-name="Table3.1">
          <table:table-cell table:style-name="Table3.A1" office:value-type="string">
            <text:p text:style-name="P32"><text:span text:style-name="T26">sudo apt-get install ca-certificates curl</text:span></text:p>
          </table:table-cell>
        </table:table-row>
      </table:table>
      <text:p text:style-name="P11"/>
      <text:p text:style-name="P33">Una vez realizado este paso, descargamos la clave GPG del repositorio de Docker CE y la incluiremos. Podemos hacer todo con las siguientes línea:</text:p>
      <table:table table:name="Table4" table:style-name="Table4">
        <table:table-column table:style-name="Table4.A"/>
        <table:table-row table:style-name="Table4.1">
          <table:table-cell table:style-name="Table4.A1" office:value-type="string">
            <text:p text:style-name="P25"><text:span text:style-name="T28">sudo install -m 0755 -d /etc/apt/keyrings</text:span></text:p>
            <text:p text:style-name="P25"><text:span text:style-name="T28">sudo curl -fsSL https://download.docker.com/linux/ubuntu/gpg -o /etc/apt/keyrings/docker.asc</text:span></text:p>
            <text:p text:style-name="P25"><text:span text:style-name="T28">sudo chmod a+r /etc/apt/keyrings/docker.asc</text:span></text:p>
          </table:table-cell>
        </table:table-row>
      </table:table>
      <text:p text:style-name="P33">Ahora, solo nos queda añadir el repositorio de Docker CE como fuente para instalación de paquetes. <text:span text:style-name="T22">MUCHO OJO en este paso en distribuciones derivadas, como Linux Mint</text:span>. El motivo <text:s/>es el siguiente. Al configurar la fuente de paquetes indicamos la versión de Ubuntu. El comando que utilizamos para obtener la versión de Ubuntu es el siguiente:</text:p>
      <table:table table:name="Table5" table:style-name="Table5">
        <table:table-column table:style-name="Table5.A"/>
        <table:table-row table:style-name="Table5.1">
          <table:table-cell table:style-name="Table5.A1" office:value-type="string">
            <text:p text:style-name="P32"><text:span text:style-name="T26">lsb_release -cs</text:span></text:p>
          </table:table-cell>
        </table:table-row>
      </table:table>
      <text:p text:style-name="P33">Este comando nos dirá qué distribución tenemos. Por ejemplo, si tenemos “Ubuntu Noble 24.04 (LTS)”, este comando imprimirá por pantalla “Noble”.</text:p>
      <text:p text:style-name="P33"/>
      <text:p text:style-name="P33">En algunas versiones derivadas de Ubuntu, como Linux Mint 22, aunque la distribución esté basada en Ubuntu 24.04 (Noble), no devolverá el texto “Noble”, sino otro diferente. Si estáis en este caso, deberéis introducir a mano la versión de Ubuntu en que se basa vuestra distribución (sustituyendo el comando de “<text:span text:style-name="T31">lsb_release -cs</text:span>” de la siguiente línea)</text:p>
      <text:p text:style-name="P33">Aclarado esto, con el siguiente comando podéis añadir el repositorio:</text:p>
      <table:table table:name="Table6" table:style-name="Table6">
        <table:table-column table:style-name="Table6.A"/>
        <table:table-row table:style-name="Table6.1">
          <table:table-cell table:style-name="Table6.A1" office:value-type="string">
            <text:p text:style-name="P32"><text:span text:style-name="T32">echo</text:span><text:span text:style-name="T28"> \<text:line-break/> <text:s/></text:span><text:span text:style-name="T34">"deb [arch=</text:span><text:span text:style-name="T30">$(dpkg --print-architecture)</text:span><text:span text:style-name="T34"> signed-by=/etc/apt/keyrings/docker.asc] https://download.docker.com/linux/ubuntu \<text:line-break/> <text:s/></text:span><text:span text:style-name="T30">$(. /etc/os-release &amp;&amp; echo "$VERSION_CODENAME")</text:span><text:span text:style-name="T34"> stable"</text:span><text:span text:style-name="T28"> | \<text:line-break/> <text:s/>sudo tee /etc/apt/sources.list.d/docker.list &gt; /dev/null<text:line-break/>sudo apt-get update</text:span></text:p>
          </table:table-cell>
        </table:table-row>
      </table:table>
      <text:p text:style-name="P33">O en el caso de que tengáis una distribución basada en Ubuntu con el problema comentado anteriormente, poner el nombre de la versión de Ubuntu a mano. En este ejemplo, si la base es Ubuntu 24.04 (Noble) quedaría de una forma similar a:</text:p>
      <table:table table:name="Table7" table:style-name="Table7">
        <table:table-column table:style-name="Table7.A"/>
        <table:table-row table:style-name="Table7.1">
          <table:table-cell table:style-name="Table7.A1" office:value-type="string">
            <text:p text:style-name="P32"><text:span text:style-name="T28">sudo tee /etc/apt/sources.list.d/docker.sources &lt;&lt;EOF<text:line-break/>Types: deb<text:line-break/>URIs: https://download.docker.com/linux/ubuntu<text:line-break/>Suites: $(. /etc/os-release &amp;&amp; </text:span><text:span text:style-name="T32">echo</text:span><text:span text:style-name="T28"> </text:span><text:span text:style-name="T34">"</text:span><text:span text:style-name="T30">${UBUNTU_CODENAME:-$VERSION_CODENAME}</text:span><text:span text:style-name="T34">"</text:span><text:span text:style-name="T28">)<text:line-break/>Components: stable<text:line-break/>Signed-By: /etc/apt/keyrings/docker.asc<text:line-break/>EOF</text:span></text:p>
          </table:table-cell>
        </table:table-row>
      </table:table>
      <text:list xml:id="list34635378226334" text:continue-numbering="true" text:style-name="WWNum1">
        <text:list-item>
          <text:list>
            <text:list-item>
              <text:list>
                <text:list-item>
                  <text:p text:style-name="P39"><text:bookmark text:name="_c2sd49sbb8iq"/>Paso 3: Instalando Docker Engine CE</text:p>
                </text:list-item>
              </text:list>
            </text:list-item>
          </text:list>
        </text:list-item>
      </text:list>
      <text:p text:style-name="P33">Por último, ya con el repositorio oficial de Docker en nuestro sistema, solo nos queda actualizar el índice de paquetes e instalar la última versión de Docker Engine CE de la siguiente forma:</text:p>
      <table:table table:name="Table8" table:style-name="Table8">
        <table:table-column table:style-name="Table8.A"/>
        <table:table-row table:style-name="Table8.1">
          <table:table-cell table:style-name="Table8.A1" office:value-type="string">
            <text:p text:style-name="P32"><text:span text:style-name="T26">sudo apt-get update</text:span></text:p>
          </table:table-cell>
        </table:table-row>
      </table:table>
      <text:p text:style-name="P31"/>
      <table:table table:name="Table9" table:style-name="Table9">
        <table:table-column table:style-name="Table9.A"/>
        <table:table-row table:style-name="Table9.1">
          <table:table-cell table:style-name="Table9.A1" office:value-type="string">
            <text:p text:style-name="P32"><text:span text:style-name="T28">sudo apt-get install docker-ce docker-ce-cli containerd.io docker-buildx-plugin docker-compose-plugin</text:span></text:p>
          </table:table-cell>
        </table:table-row>
      </table:table>
      <text:p text:style-name="P33">Finalmente, comprobaremos que Docker Engine CE se ha instalado correctamente ejecutando:</text:p>
      <table:table table:name="Table10" table:style-name="Table10">
        <table:table-column table:style-name="Table10.A"/>
        <table:table-row table:style-name="Table10.1">
          <table:table-cell table:style-name="Table10.A1" office:value-type="string">
            <text:p text:style-name="P32"><text:span text:style-name="T26">sudo docker version</text:span></text:p>
          </table:table-cell>
        </table:table-row>
      </table:table>
      <text:p text:style-name="P33">y obteniendo un resultado similar al siguiente:</text:p>
      <text:p text:style-name="P11"><draw:frame draw:style-name="fr1" draw:name="image3.png" text:anchor-type="as-char" svg:width="4.5in" svg:height="4.8437in" draw:z-index="0"><draw:image xlink:href="Pictures/10000201000001B0000001D11255144265E36A80.png" xlink:type="simple" xlink:show="embed" xlink:actuate="onLoad" loext:mime-type="image/png"/></draw:frame></text:p>
      <text:p text:style-name="P33">Para más información sobre este comando podéis visitar</text:p>
      <text:p text:style-name="P33"><text:a xlink:type="simple" xlink:href="https://docs.docker.com/engine/reference/commandline/version/" text:style-name="ListLabel_20_19" text:visited-style-name="ListLabel_20_19"><text:span text:style-name="T23">https://docs.docker.com/engine/reference/commandline/version/</text:span></text:a></text:p>
      <text:list xml:id="list34636626496893" text:continue-numbering="true" text:style-name="WWNum1">
        <text:list-item>
          <text:list>
            <text:list-item>
              <text:p text:style-name="P40"><text:bookmark text:name="_fx3k31y5cq1e"/>Post instalación</text:p>
            </text:list-item>
          </text:list>
        </text:list-item>
      </text:list>
      <text:p text:style-name="P11">En la documentación de Docker, nos proponen algunos pasos de post instalación. Los podéis consultar en <text:a xlink:type="simple" xlink:href="https://docs.docker.com/engine/install/linux-postinstall/" text:style-name="ListLabel_20_19" text:visited-style-name="ListLabel_20_19"><text:span text:style-name="T23">https://docs.docker.com/engine/install/linux-postinstall/</text:span></text:a></text:p>
      <text:p text:style-name="P11">En esta sección vamos a comentar dos de ellos: administrar Docker con usuarios sin privilegios (no root ni sudoers) y arrancar Docker desde al inicio.</text:p>
      <text:list xml:id="list34636509448169" text:continue-numbering="true" text:style-name="WWNum1">
        <text:list-item>
          <text:list>
            <text:list-item>
              <text:list>
                <text:list-item>
                  <text:p text:style-name="P39"><text:bookmark text:name="_6oto2eyroja0"/><text:s/>Permitir administrar Docker con usuarios sin privilegios</text:p>
                </text:list-item>
              </text:list>
            </text:list-item>
          </text:list>
        </text:list-item>
      </text:list>
      <text:p text:style-name="P11">Docker utiliza sockets Unix. Para la creación y reserva de un socket Unix, es necesario tener permisos de root, por lo cual Docker Engine necesita permisos de root para ejecutarse.</text:p>
      <text:p text:style-name="P11">A veces, en algunos contextos, puede sernos útil que Docker se ejecute por usuarios sin permisos de root. Pongamos un contexto de un aula de ordenadores, que será utilizada por alumnos con los que queremos realizar actividades que utilizan Docker.</text:p>
      <text:p text:style-name="P11">Podemos configurar el aula para que dichos alumnos puedan utilizar Docker sin necesidad de proporcionarles una cuenta con permisos de root.</text:p>
      <text:p text:style-name="P11">Para ello, en primer lugar crearemos un grupo llamado “docker”.</text:p>
      <table:table table:name="Table11" table:style-name="Table11">
        <table:table-column table:style-name="Table11.A"/>
        <table:table-row table:style-name="Table11.1">
          <table:table-cell table:style-name="Table11.A1" office:value-type="string">
            <text:p text:style-name="P32"><text:span text:style-name="T26">sudo groupadd docker</text:span></text:p>
          </table:table-cell>
        </table:table-row>
      </table:table>
      <text:p text:style-name="P11"><text:soft-page-break/></text:p>
      <text:p text:style-name="P11">Tras ello añadiremos a los usuarios que queremos que usen Docker sin permisos de root al grupo con un comando similar al siguiente, donde $USER es el nombre de usuario:</text:p>
      <table:table table:name="Table12" table:style-name="Table12">
        <table:table-column table:style-name="Table12.A"/>
        <table:table-row table:style-name="Table12.1">
          <table:table-cell table:style-name="Table12.A1" office:value-type="string">
            <text:p text:style-name="P32"><text:span text:style-name="T26">sudo usermod -aG docker </text:span><text:span text:style-name="T29">$USER</text:span></text:p>
          </table:table-cell>
        </table:table-row>
      </table:table>
      <text:p text:style-name="P11">Para probar que esto funcione, será necesario que el/los usuarios afectados cierren sesión completamente (si la tenían abierta) y la vuelvan a abrir, para que se reevalúe su pertenencia al grupo “docker”. Con esto podrán utilizar comandos Docker sin necesidad de permisos de root.</text:p>
      <text:p text:style-name="P11"/>
      <text:p text:style-name="P11"><text:span text:style-name="T12">MUCHO OJO</text:span>: si lanzaste comandos de Docker usando sudo con uno de estos usuarios antes de esta operación, es posible que al lanzar Docker te aparezca un mensaje similar a este:</text:p>
      <table:table table:name="Table13" table:style-name="Table13">
        <table:table-column table:style-name="Table13.A"/>
        <table:table-row table:style-name="Table13.1">
          <table:table-cell table:style-name="Table13.A1" office:value-type="string">
            <text:p text:style-name="P32"><text:span text:style-name="T26">WARNING: Error loading config file: /home/user/.docker/config.json -<text:line-break/></text:span><text:span text:style-name="T33">stat</text:span><text:span text:style-name="T26"> /home/user/.docker/config.json: permission denied</text:span></text:p>
          </table:table-cell>
        </table:table-row>
      </table:table>
      <text:p text:style-name="P11">Para arreglar este error, las opciones son eliminar el directorio “.docker” con </text:p>
      <table:table table:name="Table14" table:style-name="Table14">
        <table:table-column table:style-name="Table14.A"/>
        <table:table-row table:style-name="Table14.1">
          <table:table-cell table:style-name="Table14.A1" office:value-type="string">
            <text:p text:style-name="P32"><text:span text:style-name="T26">sudo rm -rf ~/.docker/</text:span></text:p>
          </table:table-cell>
        </table:table-row>
      </table:table>
      <text:p text:style-name="P11">o cambiar el propietario y permisos del directorio, usando</text:p>
      <table:table table:name="Table15" table:style-name="Table15">
        <table:table-column table:style-name="Table15.A"/>
        <table:table-row table:style-name="Table15.1">
          <table:table-cell table:style-name="Table15.A1" office:value-type="string">
            <text:p text:style-name="P32"><text:span text:style-name="T26">sudo chown </text:span><text:span text:style-name="T35">"</text:span><text:span text:style-name="T29">$USER</text:span><text:span text:style-name="T35">"</text:span><text:span text:style-name="T26">:</text:span><text:span text:style-name="T35">"</text:span><text:span text:style-name="T29">$USER</text:span><text:span text:style-name="T35">"</text:span><text:span text:style-name="T26"> /home/</text:span><text:span text:style-name="T35">"</text:span><text:span text:style-name="T29">$USER</text:span><text:span text:style-name="T35">"</text:span><text:span text:style-name="T26">/.docker -R</text:span></text:p>
          </table:table-cell>
        </table:table-row>
      </table:table>
      <text:p text:style-name="P31"/>
      <table:table table:name="Table16" table:style-name="Table16">
        <table:table-column table:style-name="Table16.A"/>
        <table:table-row table:style-name="Table16.1">
          <table:table-cell table:style-name="Table16.A1" office:value-type="string">
            <text:p text:style-name="P32"><text:span text:style-name="T26">sudo chmod g+rwx </text:span><text:span text:style-name="T35">"</text:span><text:span text:style-name="T29">$HOME</text:span><text:span text:style-name="T35">/.docker"</text:span><text:span text:style-name="T26"> -R</text:span></text:p>
          </table:table-cell>
        </table:table-row>
      </table:table>
      <text:list xml:id="list34636886941285" text:continue-numbering="true" text:style-name="WWNum1">
        <text:list-item>
          <text:list>
            <text:list-item>
              <text:list>
                <text:list-item>
                  <text:p text:style-name="P39"><text:bookmark text:name="_ahp0tx9a9oz3"/><text:s/>Activar/desactivar arranque al inicio</text:p>
                </text:list-item>
              </text:list>
            </text:list-item>
          </text:list>
        </text:list-item>
      </text:list>
      <text:p text:style-name="P11">Para indicar que el servicio de Docker se inicie al arrancar la máquina, podemos indicarlo mediante los siguientes comandos:</text:p>
      <table:table table:name="Table17" table:style-name="Table17">
        <table:table-column table:style-name="Table17.A"/>
        <table:table-row table:style-name="Table17.1">
          <table:table-cell table:style-name="Table17.A1" office:value-type="string">
            <text:p text:style-name="P32"><text:span text:style-name="T26">sudo systemctl </text:span><text:span text:style-name="T33">enable</text:span><text:span text:style-name="T26"> docker.service</text:span></text:p>
          </table:table-cell>
        </table:table-row>
      </table:table>
      <text:p text:style-name="P31"/>
      <table:table table:name="Table18" table:style-name="Table18">
        <table:table-column table:style-name="Table18.A"/>
        <table:table-row table:style-name="Table18.1">
          <table:table-cell table:style-name="Table18.A1" office:value-type="string">
            <text:p text:style-name="P32"><text:span text:style-name="T26">sudo systemctl </text:span><text:span text:style-name="T33">enable</text:span><text:span text:style-name="T26"> containerd.service</text:span></text:p>
          </table:table-cell>
        </table:table-row>
      </table:table>
      <text:p text:style-name="P11">Si lo que queremos es deshabilitar este arranque automático, podemos usar:</text:p>
      <table:table table:name="Table19" table:style-name="Table19">
        <table:table-column table:style-name="Table19.A"/>
        <table:table-row table:style-name="Table19.1">
          <table:table-cell table:style-name="Table19.A1" office:value-type="string">
            <text:p text:style-name="P32"><text:span text:style-name="T26">sudo systemctl </text:span><text:span text:style-name="T33">disable</text:span><text:span text:style-name="T26"> docker.service</text:span></text:p>
          </table:table-cell>
        </table:table-row>
      </table:table>
      <text:p text:style-name="P31"/>
      <table:table table:name="Table20" table:style-name="Table20">
        <table:table-column table:style-name="Table20.A"/>
        <table:table-row table:style-name="Table20.1">
          <table:table-cell table:style-name="Table20.A1" office:value-type="string">
            <text:p text:style-name="P32"><text:span text:style-name="T26">sudo systemctl </text:span><text:span text:style-name="T33">disable</text:span><text:span text:style-name="T26"> containerd.service</text:span></text:p>
          </table:table-cell>
        </table:table-row>
      </table:table>
      <text:p text:style-name="P11">Para iniciar/parar/reiniciar los servicios manualmente, podemos usar:</text:p>
      <table:table table:name="Table21" table:style-name="Table21">
        <table:table-column table:style-name="Table21.A"/>
        <table:table-row table:style-name="Table21.1">
          <table:table-cell table:style-name="Table21.A1" office:value-type="string">
            <text:p text:style-name="P32"><text:span text:style-name="T26">sudo systemctl start/stop/restart docker.service</text:span></text:p>
          </table:table-cell>
        </table:table-row>
      </table:table>
      <text:p text:style-name="P31"/>
      <table:table table:name="Table22" table:style-name="Table22">
        <table:table-column table:style-name="Table22.A"/>
        <table:table-row table:style-name="Table22.1">
          <table:table-cell table:style-name="Table22.A1" office:value-type="string">
            <text:p text:style-name="P32"><text:span text:style-name="T26">sudo systemctl start/stop/restart containerd.service</text:span></text:p>
          </table:table-cell>
        </table:table-row>
      </table:table>
      <text:p text:style-name="P11"/>
      <text:list xml:id="list34636163430688" text:continue-numbering="true" text:style-name="WWNum1">
        <text:list-item>
          <text:list>
            <text:list-item>
              <text:p text:style-name="P40"><text:bookmark text:name="_zidb06hdru0n"/>Desinstalando Docker en Ubuntu</text:p>
            </text:list-item>
          </text:list>
        </text:list-item>
      </text:list>
      <text:p text:style-name="P11">Si en algún momento queremos desinstalar completamente Docker en Ubuntu, podemos usar el siguiente conjunto de comandos. El primer comando eliminará Docker Engine, pero no eliminará contenedores e imágenes presentes en el sistema. </text:p>
      <text:p text:style-name="P25"><text:span text:style-name="T28">sudo apt-get purge docker-ce docker-ce-cli containerd.io docker-buildx-plugin docker-compose-plugin docker-ce-rootless-extras</text:span></text:p>
      <text:p text:style-name="P11">Si queremos eliminar estos datos, deberemos realizar el borrado manual de las mismas. Aquí el conjunto de comandos para el borrado manual:</text:p>
      <table:table table:name="Table23" table:style-name="Table23">
        <table:table-column table:style-name="Table23.A"/>
        <table:table-row table:style-name="Table23.1">
          <table:table-cell table:style-name="Table23.A1" office:value-type="string">
            <text:p text:style-name="P32"><text:span text:style-name="T28">sudo rm -rf /var/lib/docker</text:span></text:p>
            <text:p text:style-name="P32"><text:span text:style-name="T28">sudo rm -rf /var/lib/containerd</text:span></text:p>
            <text:p text:style-name="P25"><text:span text:style-name="T28">sudo rm /etc/apt/sources.list.d/docker.list</text:span></text:p>
            <text:p text:style-name="P25"><text:span text:style-name="T28">sudo rm /etc/apt/keyrings/docker.asc</text:span></text:p>
          </table:table-cell>
        </table:table-row>
      </table:table>
      <text:list xml:id="list34636289995655" text:continue-numbering="true" text:style-name="WWNum1">
        <text:list-item>
          <text:p text:style-name="P37"><text:bookmark text:name="_wapa5zpjg8gh"/>Instalación de Docker en sistemas Windows</text:p>
        </text:list-item>
      </text:list>
      <text:p text:style-name="P11">En este apartado veremos cómo instalar Docker Desktop en sistemas Windows. Básicamente, para la instalación en sistemas Windows 10, 11 o Windows Server, seguiremos los pasos de esta guía</text:p>
      <text:list xml:id="list3226439716" text:style-name="WWNum3">
        <text:list-item>
          <text:p text:style-name="P27">Guía para instalar Docker en sistemas Windows:</text:p>
          <text:list>
            <text:list-item>
              <text:p text:style-name="P34"><text:a xlink:type="simple" xlink:href="https://docs.docker.com/docker-for-windows/install/" text:style-name="ListLabel_20_19" text:visited-style-name="ListLabel_20_19"><text:span text:style-name="T23">https://docs.docker.com/docker-for-windows/install/</text:span></text:a></text:p>
            </text:list-item>
          </text:list>
        </text:list-item>
        <text:list-item>
          <text:p text:style-name="P29">Guía para instalar WSL2 en sistemas Windows:</text:p>
          <text:list>
            <text:list-item>
              <text:p text:style-name="P35"><text:a xlink:type="simple" xlink:href="https://learn.microsoft.com/es-es/windows/wsl/install" text:style-name="ListLabel_20_19" text:visited-style-name="ListLabel_20_19"><text:span text:style-name="T23">https://learn.microsoft.com/es-es/windows/wsl/install</text:span></text:a></text:p>
            </text:list-item>
          </text:list>
        </text:list-item>
      </text:list>
      <text:p text:style-name="P11"><text:span text:style-name="T22">Antes de nada, indicar que he preparado un video de creación propia donde podéis ver como realizo una instalación completa de Docker Desktop y WSL 2 en un sistema Windows 11.</text:span></text:p>
      <text:p text:style-name="P11"><text:span text:style-name="T22">El video dura unos 13 minutos (es largo porque no tiene cortes) y lo tenéis disponible en </text:span><text:a xlink:type="simple" xlink:href="https://youtu.be/Od8LX5Gs1RE" text:style-name="ListLabel_20_20" text:visited-style-name="ListLabel_20_20"><text:span text:style-name="T24">https://youtu.be/Od8LX5Gs1RE</text:span></text:a></text:p>
      <text:p text:style-name="Standard">En la instalación, se distingue entre la posibilidad de simular Linux internamente vía Hyper-V o vía WSL2. Cabe destacar que en cualquiera de las dos opciones, se está virtualizando un sistema Linux, por lo cual el rendimiento es menor que sí lanzaremos Docker desde un sistema Linux.</text:p>
      <text:p text:style-name="Standard">A la hora de seguir las instrucciones veremos un recuadro donde reflexiona si usar Hyper-V (no disponible en Windows 10 Home) o WSL2, seguido de 3 pestañas cada una con las instrucciones de instalación de su caso, tal como se ve en la siguiente imagen:</text:p>
      <text:p text:style-name="P12"><draw:frame draw:style-name="fr1" draw:name="image5.png" text:anchor-type="as-char" svg:width="5.1453in" svg:height="2.2965in" draw:z-index="0"><draw:image xlink:href="Pictures/10000201000004DD0000022C7C274CF165FDFADF.png" xlink:type="simple" xlink:show="embed" xlink:actuate="onLoad" loext:mime-type="image/png"/></draw:frame></text:p>
      <text:p text:style-name="P11"/>
      <text:p text:style-name="P11"/>
      <text:p text:style-name="P11"/>
      <text:p text:style-name="P11"><text:span text:style-name="T22">Para usuarios no experimentados, puede ser una opción más sencilla usar WSL2.</text:span></text:p>
      <text:p text:style-name="P11">Aun así, por los problemas de rendimiento comentados anteriormente y por una mejor estabilidad en general, recomendamos encarecidamente durante el curso, <text:span text:style-name="T22">si es posible, usar Docker en sistemas Linux, donde Docker funciona de manera más robusta</text:span>.</text:p>
      <text:p text:style-name="P11"/>
      <text:p text:style-name="P11">Elijamos la opción que elijamos, se instalará el software “Docker Desktop” que nos permitirá utilizar Docker en sistemas Windows.</text:p>
      <text:p text:style-name="Standard"><text:span text:style-name="T22">Aprovecho para recordar que he realizado un video de creación propia donde podéis ver como realizo una instalación completa de Docker Desktop y WSL 2 en un sistema Windows 11.</text:span></text:p>
      <text:p text:style-name="Standard"><text:span text:style-name="T22">El video dura unos 13 minutos (es largo porque no tiene cortes) y lo tenéis disponible en </text:span><text:a xlink:type="simple" xlink:href="https://youtu.be/Od8LX5Gs1RE" text:style-name="ListLabel_20_20" text:visited-style-name="ListLabel_20_20"><text:span text:style-name="T24">https://youtu.be/Od8LX5Gs1RE</text:span></text:a></text:p>
      <text:p text:style-name="Standard"/>
      <text:p text:style-name="P11">Finalmente, con <text:span text:style-name="T22">Docker Desktop instalado y lanzado</text:span>, comprobaremos que Docker Engine CE se ha instalado correctamente ejecutando:</text:p>
      <table:table table:name="Table24" table:style-name="Table24">
        <table:table-column table:style-name="Table24.A"/>
        <text:soft-page-break/>
        <table:table-row table:style-name="Table24.1">
          <table:table-cell table:style-name="Table24.A1" office:value-type="string">
            <text:p text:style-name="P25"><text:span text:style-name="T26">docker version</text:span></text:p>
          </table:table-cell>
        </table:table-row>
      </table:table>
      <text:p text:style-name="P11">obteniendo un resultado similar al siguiente:</text:p>
      <text:p text:style-name="P11"><draw:frame draw:style-name="fr1" draw:name="image4.png" text:anchor-type="as-char" svg:width="5.402in" svg:height="4.2598in" draw:z-index="0"><draw:image xlink:href="Pictures/10000201000003540000029FB6A4F7EFEF7F9A41.png" xlink:type="simple" xlink:show="embed" xlink:actuate="onLoad" loext:mime-type="image/png"/></draw:frame></text:p>
      <text:p text:style-name="P11">Para más información sobre este comando podéis visitar</text:p>
      <text:p text:style-name="P11"><text:a xlink:type="simple" xlink:href="https://docs.docker.com/engine/reference/commandline/version/" text:style-name="ListLabel_20_19" text:visited-style-name="ListLabel_20_19"><text:span text:style-name="T23">https://docs.docker.com/engine/reference/commandline/version/</text:span></text:a></text:p>
      <text:list xml:id="list34636657672467" text:continue-list="list34636289995655" text:style-name="WWNum1">
        <text:list-item>
          <text:p text:style-name="P37"><text:bookmark text:name="_rod7juqje8wr"/>Instalación de Docker en sistemas MacOS</text:p>
        </text:list-item>
      </text:list>
      <text:p text:style-name="P33">Las instrucciones para la instalación de Docker Desktop en MacOS están descritas en <text:a xlink:type="simple" xlink:href="https://docs.docker.com/docker-for-mac/install/" text:style-name="ListLabel_20_19" text:visited-style-name="ListLabel_20_19"><text:span text:style-name="T23">https://docs.docker.com/docker-for-mac/install/</text:span></text:a>.</text:p>
      <text:p text:style-name="P33">Para realizar esta instalación, básicamente debe descargarse el paquete “.dmg” de <text:a xlink:type="simple" xlink:href="https://hub.docker.com/editions/community/docker-ce-desktop-mac/" text:style-name="ListLabel_20_19" text:visited-style-name="ListLabel_20_19"><text:span text:style-name="T23">https://hub.docker.com/editions/community/docker-ce-desktop-mac/</text:span></text:a> y seguir las instrucciones de instalación en pantalla.</text:p>
      <text:list xml:id="list34635673525285" text:continue-numbering="true" text:style-name="WWNum1">
        <text:list-item>
          <text:p text:style-name="P37"><text:bookmark text:name="_w7fyvrsld5rt"/>Playgrounds de Docker</text:p>
        </text:list-item>
      </text:list>
      <text:p text:style-name="P11">En Internet existen varios sitios que nos permiten utilizar un “playground” de distintas herramientas, para que juguemos con ellas online, sin necesidad de instalar ni configurar nada (y sin el riesgo de romper cosas).</text:p>
      <text:p text:style-name="P11">El sitio web “Play with Docker” <text:a xlink:type="simple" xlink:href="https://labs.play-with-docker.com/" text:style-name="ListLabel_20_19" text:visited-style-name="ListLabel_20_19"><text:span text:style-name="T23">https://labs.play-with-docker.com/</text:span></text:a> <text:s/>posee un “playground” de Docker donde se pueden realizar pruebas, pequeños despliegues, etc.</text:p>
      <text:p text:style-name="P11">Os animo a utilizarlo si queréis hacer alguna prueba, trastear en un lugar donde no tenéis Docker instalado o para enseñar Docker en contextos donde no se pueda instalar de forma nativa.</text:p>
      <text:list xml:id="list34635614298568" text:continue-numbering="true" text:style-name="WWNum1">
        <text:list-item>
          <text:p text:style-name="P37"><text:bookmark text:name="_gh56wl6jl7p1"/>Conclusión</text:p>
        </text:list-item>
      </text:list>
      <text:p text:style-name="P11">En esta unidad hemos visto los pasos básicos para instalar Docker en distintos sistemas operativos. <text:span text:style-name="T22">No obstante, continuamos con nuestra recomendación de que si es posible, para minimizar problemas, utilicemos Docker en sistemas Linux.</text:span></text:p>
      <text:list xml:id="list34635105844943" text:continue-numbering="true" text:style-name="WWNum1">
        <text:list-item>
          <text:p text:style-name="P38"><text:bookmark text:name="_g1qlmy5ta6mu"/>Bibliografía</text:p>
        </text:list-item>
      </text:list>
      <text:p text:style-name="P8">[1] Docker Docs <text:a xlink:type="simple" xlink:href="https://docs.docker.com/" text:style-name="ListLabel_20_19" text:visited-style-name="ListLabel_20_19"><text:span text:style-name="T23">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ListLabel_20_20" style:display-name="ListLabel 20" style:family="text">
      <style:text-properties fo:color="#1155cc" style:text-underline-style="solid" style:text-underline-width="auto" style:text-underline-color="font-color"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2. Instalación de Docker</text:span></text:p>
      </style:header>
      <style:footer>
        <text:p text:style-name="MP4"><text:span text:style-name="MT1">Curso Introducción a Docker<text:tab/><text:tab/>UD02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6" meta:object-count="0" meta:page-count="4" meta:paragraph-count="145" meta:word-count="1914" meta:character-count="13478" meta:non-whitespace-character-count="11681"/>
    <meta:generator>LibreOfficeDev/6.0.5.2$Linux_X86_64 LibreOffice_project/</meta:generator>
  </office:meta>
</office:document-meta>
</file>