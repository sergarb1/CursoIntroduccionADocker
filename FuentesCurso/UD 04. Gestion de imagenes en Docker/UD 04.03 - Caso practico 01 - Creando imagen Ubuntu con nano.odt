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D00000110AA6E2EFC298199A2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20" style:family="text">
      <style:text-properties fo:color="#333333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21" style:family="text">
      <style:text-properties fo:color="#333333" style:font-name="Consolas" fo:font-size="10pt" fo:font-style="italic" fo:font-weight="bold" fo:background-color="#f8f8f8" loext:char-shading-value="0" style:font-name-asian="Consolas1" style:font-size-asian="10pt" style:font-style-asian="italic" style:font-weight-asian="bold" style:font-name-complex="Consolas1" style:font-size-complex="10pt" style:font-style-complex="italic" style:font-weight-complex="bold"/>
    </style:style>
    <style:style style:name="T22" style:family="text">
      <style:text-properties fo:color="#333333" style:font-name="Consolas" fo:background-color="#f8f8f8" loext:char-shading-value="0" style:font-name-asian="Consolas1" style:font-name-complex="Consolas1"/>
    </style:style>
    <style:style style:name="T2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 y Kubernetes</text:span><text:span text:style-name="T2"><text:line-break/></text:span><text:span text:style-name="T3">UD 04. Caso práctico 01 - Creando imagen Ubuntu con nano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/>
      <text:p text:style-name="P4"/>
      <text:p text:style-name="P5"><text:span text:style-name="T5">Autor: Sergi García Barea</text:span></text:p>
      <text:p text:style-name="P5"><text:span text:style-name="T5">Actualizado Enero 2026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4">2. </text:span><text:a xlink:type="simple" xlink:href="#_vyhbfp4t666x" text:style-name="Index_20_Link" text:visited-style-name="Index_20_Link"><text:span text:style-name="T9">Preparando el Dockerfile y creando la imagen</text:span></text:a><text:span text:style-name="T9"><text:tab/>3</text:span></text:p>
          <text:p text:style-name="P12"><text:span text:style-name="T14">3. </text:span><text:a xlink:type="simple" xlink:href="#_14wpn6n5xh6b" text:style-name="Index_20_Link" text:visited-style-name="Index_20_Link"><text:span text:style-name="T9">Probando la </text:span></text:a><text:span text:style-name="T9">imagen<text:tab/>3</text:span></text:p>
          <text:p text:style-name="P13"><text:span text:style-name="T14">4. </text:span><text:a xlink:type="simple" xlink:href="#_g1qlmy5ta6mu" text:style-name="Index_20_Link" text:visited-style-name="Index_20_Link"><text:span text:style-name="T9">Bibliografía</text:span></text:a><text:span text:style-name="T9"><text:tab/>3</text:span></text:p>
        </text:index-body>
      </text:table-of-content>
      <text:p text:style-name="P14"/>
      <text:p text:style-name="P14"/>
      <text:p text:style-name="P16"><text:span text:style-name="T15">UD04. Caso práctico 01</text:span></text:p>
      <text:list xml:id="list1353460725" text:style-name="WWNum1">
        <text:list-item>
          <text:p text:style-name="P22"><text:bookmark text:name="_dbh0n1vac4c8"/>Introducción</text:p>
        </text:list-item>
      </text:list>
      <text:p text:style-name="P10">En este caso práctico vamos a crear y probar una imagen basada en “ubuntu” que simplemente incluirá el editor de texto de consola “nano”. </text:p>
      <text:list xml:id="list33034271052036" text:continue-numbering="true" text:style-name="WWNum1">
        <text:list-item>
          <text:p text:style-name="P23"><text:bookmark text:name="_vyhbfp4t666x"/>Preparando el Dockerfile y creando la imagen</text:p>
        </text:list-item>
      </text:list>
      <text:p text:style-name="P10">Crearemos el siguiente “<text:span text:style-name="T18">Dockerfile</text:span>”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19">#Imagen base ubuntu</text:span><text:span text:style-name="T20"><text:line-break/></text:span><text:span text:style-name="T21">FROM</text:span><text:span text:style-name="T20"> ubuntu<text:line-break/></text:span><text:span text:style-name="T19"># Actualizamos lista de paquetes e instalamos nano (-y para no preguntar)</text:span><text:span text:style-name="T20"><text:line-break/></text:span><text:span text:style-name="T19"># Las últimas líneas son para hacer la imagen más ligera</text:span><text:span text:style-name="T20"><text:line-break/></text:span><text:span text:style-name="T21">RUN</text:span><text:span text:style-name="T20"> apt update &amp;&amp; apt install -y nano &amp;&amp; apt purge --auto-remove &amp;&amp; apt clean &amp;&amp; rm -rf /var/lib/apt/lists/*<text:line-break/></text:span><text:span text:style-name="T19"># Establecemos como comando por defecto de la imagen /bin/bash</text:span><text:span text:style-name="T20"><text:line-break/></text:span><text:span text:style-name="T21">CMD</text:span><text:span text:style-name="T20"> /bin/bash</text:span></text:p>
          </table:table-cell>
        </table:table-row>
      </table:table>
      <text:p text:style-name="P10"/>
      <text:p text:style-name="P10">El funcionamiento del propio “Dockerfile” está definido por sus propios comentarios. Una vez preparado, crearemos la imagen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2">docker build -t ubuntunano ./</text:span></text:p>
          </table:table-cell>
        </table:table-row>
      </table:table>
      <text:p text:style-name="P10">Con esa línea indicamos que creamos la imagen “<text:span text:style-name="T18">ubuntunano</text:span>” basándose en el fichero “<text:span text:style-name="T18">Dockerfile</text:span>” del directorio actual.</text:p>
      <text:p text:style-name="Standard"><draw:frame draw:style-name="fr1" draw:name="image4.png" text:anchor-type="as-char" svg:width="6.2492in" svg:height="2.0118in" draw:z-index="0"><draw:image xlink:href="Pictures/100002010000034D00000110AA6E2EFC298199A2.png" xlink:type="simple" xlink:show="embed" xlink:actuate="onLoad" loext:mime-type="image/png"/></draw:frame></text:p>
      <text:list xml:id="list33032909090098" text:continue-numbering="true" text:style-name="WWNum1">
        <text:list-item>
          <text:p text:style-name="P22"><text:bookmark text:name="_14wpn6n5xh6b"/>Probando la imagen</text:p>
        </text:list-item>
      </text:list>
      <text:p text:style-name="P10">Con el siguiente comando, podremos crear un contenedor con esta imagen, acceder a una shell dentro del contenedor y comprobar que el programa “nano” está instalado, ejecutando el editor con “<text:span text:style-name="T18">nano prueba.txt</text:span>” o similar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22">docker run -it ubuntunano</text:span></text:p>
          </table:table-cell>
        </table:table-row>
      </table:table>
      <text:list xml:id="list33033537192281" text:continue-numbering="true" text:style-name="WWNum1">
        <text:list-item>
          <text:p text:style-name="P23"><text:bookmark text:name="_g1qlmy5ta6mu"/>Bibliografía</text:p>
        </text:list-item>
      </text:list>
      <text:p text:style-name="P8">[1] Docker Docs <text:a xlink:type="simple" xlink:href="https://docs.docker.com/" text:style-name="ListLabel_20_1" text:visited-style-name="ListLabel_20_1"><text:span text:style-name="T23">https://docs.docker.com/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Caso práctico 01</text:span></text:p>
      </style:header>
      <style:footer>
        <text:p text:style-name="MP4"><text:span text:style-name="MT1">Curso Introducción a Docker<text:tab/><text:tab/>UD04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4" meta:object-count="0" meta:page-count="1" meta:paragraph-count="33" meta:word-count="317" meta:character-count="1975" meta:non-whitespace-character-count="1685"/>
    <meta:generator>LibreOfficeDev/6.0.5.2$Linux_X86_64 LibreOffice_project/</meta:generator>
  </office:meta>
</office:document-meta>
</file>