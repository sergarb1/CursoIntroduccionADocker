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F5000000C9B3C73FA6E770C24E.png" manifest:media-type="image/png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2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Heading_20_1" style:list-style-name="WWNum1">
      <style:paragraph-properties fo:text-align="justify" style:justify-single-word="false"/>
    </style:style>
    <style:style style:name="P21" style:family="paragraph" style:parent-style-name="Heading_20_1" style:list-style-name="WWNum1">
      <style:paragraph-properties fo:break-before="auto" fo:break-after="auto"/>
    </style:style>
    <style:style style:name="P22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3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bold" style:font-name-asian="Calibri1" style:font-size-asian="9pt" style:font-style-asian="normal" style:font-weight-asian="bold" style:font-name-complex="Calibri1" style:font-size-complex="9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 style:font-style-complex="italic"/>
    </style:style>
    <style:style style:name="T21" style:family="text">
      <style:text-properties fo:color="#333333" style:font-name="Consolas" fo:background-color="#f8f8f8" loext:char-shading-value="0" style:font-name-asian="Consolas1" style:font-name-complex="Consolas1"/>
    </style:style>
    <style:style style:name="T22" style:family="text">
      <style:text-properties fo:color="#333333" style:font-name="Consolas" fo:font-style="italic" fo:font-weight="bold" fo:background-color="#f8f8f8" loext:char-shading-value="0" style:font-name-asian="Consolas1" style:font-style-asian="italic" style:font-weight-asian="bold" style:font-name-complex="Consolas1" style:font-style-complex="italic" style:font-weight-complex="bold"/>
    </style:style>
    <style:style style:name="T23" style:family="text">
      <style:text-properties fo:color="#333333" style:font-name="Consolas" fo:font-style="italic" fo:background-color="#f8f8f8" loext:char-shading-value="0" style:font-name-asian="Consolas1" style:font-style-asian="italic" style:font-name-complex="Consolas1" style:font-style-complex="italic"/>
    </style:style>
    <style:style style:name="T24" style:family="text">
      <style:text-properties fo:color="#008080" style:font-name="Consolas" fo:font-style="italic" fo:background-color="#f8f8f8" loext:char-shading-value="0" style:font-name-asian="Consolas1" style:font-style-asian="italic" style:font-name-complex="Consolas1" style:font-style-complex="italic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_aczyuw2yex2w"/><text:span text:style-name="T1">Introducción a Docker y Kubernetes</text:span><text:span text:style-name="T2"><text:line-break/></text:span><text:span text:style-name="T3">UD 04. Caso práctico 02 - Apache 2 con PHP desde Alpine</text:span></text:p>
      <text:p text:style-name="P1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5"><draw:frame draw:style-name="fr1" draw:name="image2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2"/>
      <text:p text:style-name="P2"/>
      <text:p text:style-name="P2"/>
      <text:p text:style-name="P3"/>
      <text:p text:style-name="P4"><text:span text:style-name="T5">Autor: Sergi García Barea</text:span></text:p>
      <text:p text:style-name="P4"><text:span text:style-name="T5">Actualizado Enero 2026</text:span></text:p>
      <text:p text:style-name="P4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1"><text:a xlink:type="simple" xlink:href="#_dbh0n1vac4c8" text:style-name="Index_20_Link" text:visited-style-name="Index_20_Link"><text:span text:style-name="T13">1. Introducción<text:tab/>3</text:span></text:a></text:p>
          <text:p text:style-name="P11"><text:a xlink:type="simple" xlink:href="#_qbo60tdb3ooa" text:style-name="Index_20_Link" text:visited-style-name="Index_20_Link"><text:span text:style-name="T13">2. Descargando la aplicación<text:tab/>3</text:span></text:a></text:p>
          <text:p text:style-name="P11"><text:a xlink:type="simple" xlink:href="#_vyhbfp4t666x" text:style-name="Index_20_Link" text:visited-style-name="Index_20_Link"><text:span text:style-name="T13">3. Preparando el Dockerfile y creando la imagen<text:tab/>3</text:span></text:a></text:p>
          <text:p text:style-name="P11"><text:a xlink:type="simple" xlink:href="#_14wpn6n5xh6b" text:style-name="Index_20_Link" text:visited-style-name="Index_20_Link"><text:span text:style-name="T13">4. Probando la imagen<text:tab/>4</text:span></text:a></text:p>
          <text:p text:style-name="P11"><text:a xlink:type="simple" xlink:href="#_72yv1gty1dke" text:style-name="Index_20_Link" text:visited-style-name="Index_20_Link"><text:span text:style-name="T13">5. Bibliografía<text:tab/>4</text:span></text:a></text:p>
        </text:index-body>
      </text:table-of-content>
      <text:p text:style-name="P13"/>
      <text:p text:style-name="P14"><text:span text:style-name="T15">UD04. Caso práctico 02</text:span></text:p>
      <text:list xml:id="list1158283867" text:style-name="WWNum1">
        <text:list-item>
          <text:p text:style-name="P21"><text:bookmark text:name="_dbh0n1vac4c8"/>Introducción</text:p>
        </text:list-item>
      </text:list>
      <text:p text:style-name="P10">En este caso práctico vamos a crear una imagen que partiendo de la imagen base “alpine”, una de las imágenes más reconocidas como “imagen ligera”, le instalaremos Apache 2, PHP y pondremos un simple <text:span text:style-name="T18">&lt;?php <text:s/>phpinfo(); ?&gt;</text:span> obtenido desde un fichero de Internet.</text:p>
      <text:list xml:id="list32916919956643" text:continue-numbering="true" text:style-name="WWNum1">
        <text:list-item>
          <text:p text:style-name="P20"><text:bookmark text:name="_qbo60tdb3ooa"/>Descargando la aplicación</text:p>
        </text:list-item>
      </text:list>
      <text:p text:style-name="Standard">Antes de empezar, debemos crear un directorio <text:s/>(por ejemplo, “Caso4-3”) y en el descargar la sencilla aplicación con la aplicación que ejecuta el comando <text:span text:style-name="T18">&lt;?php <text:s/>phpinfo(); ?&gt;</text:span> que encontraremos tanto en un fichero comprimido “zip” de este curso como en <text:a xlink:type="simple" xlink:href="https://gist.github.com/SyntaxC4/5648247" text:style-name="ListLabel_20_1" text:visited-style-name="ListLabel_20_1"><text:span text:style-name="T19">https://gist.github.com/SyntaxC4/5648247</text:span></text:a></text:p>
      <text:p text:style-name="Standard">Asimismo, de los ficheros proporcionados en el caso práctico obtendremos el script “<text:span text:style-name="T18">start.sh</text:span>” que deberá estar situado en el directorio que hemos creado. El contenido de dicho script es el siguiente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9"><text:span text:style-name="T20">#!/bin/sh</text:span><text:span text:style-name="T21"><text:line-break/></text:span><text:span text:style-name="T20">#Lanzamos servicio Apache2 en segundo plano</text:span><text:span text:style-name="T21"><text:line-break/>/usr/sbin/httpd -D FOREGROUND</text:span></text:p>
          </table:table-cell>
        </table:table-row>
      </table:table>
      <text:list xml:id="list32918447786031" text:continue-numbering="true" text:style-name="WWNum1">
        <text:list-item>
          <text:p text:style-name="P22"><text:bookmark text:name="_vyhbfp4t666x"/>Preparando el Dockerfile y creando la imagen</text:p>
        </text:list-item>
      </text:list>
      <text:p text:style-name="Standard">En el directorio creando anteriormente, o crearemos (o en el caso del “zip” del curso, ya tendremos listo) el siguiente fichero “<text:span text:style-name="T18">Dockerfile</text:span>”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9"><text:span text:style-name="T22">FROM</text:span><text:span text:style-name="T23"> alpine<text:line-break/></text:span><text:span text:style-name="T22">MAINTAINER</text:span><text:span text:style-name="T23"> Sergi &lt;sergi.profesor@gmail.com&gt;<text:line-break/></text:span><text:span text:style-name="T20">#Actualizamos e instalamos paquetes con APK para Alpine</text:span><text:span text:style-name="T23"><text:line-break/></text:span><text:span text:style-name="T22">RUN</text:span><text:span text:style-name="T23"> apk update &amp;&amp; apk add apache2 php php-apache2 openrc tar<text:line-break/></text:span><text:span text:style-name="T20">#Copiamos script para lanzar Apache 2</text:span><text:span text:style-name="T23"><text:line-break/></text:span><text:span text:style-name="T22">ADD</text:span><text:span text:style-name="T23"> ./start.sh /start.sh<text:line-break/></text:span><text:span text:style-name="T20">#Descargamos un ejemplo de &lt;?php phpinfo(); ?&gt; por enseñar como bajar algo de Internet</text:span><text:span text:style-name="T23"><text:line-break/></text:span><text:span text:style-name="T20">#Podría haber sido simplemente</text:span><text:span text:style-name="T23"><text:line-break/></text:span><text:span text:style-name="T20">#RUN echo "&lt;?php phpinfo(); ?&gt;" &gt; <text:s/>/var/www/localhost/htdocs/index.php</text:span><text:span text:style-name="T23"><text:line-break/></text:span><text:span text:style-name="T22">ADD</text:span><text:span text:style-name="T23"> https://gist.githubusercontent.com/SyntaxC4/5648247/raw/94277156638f9c309f2e36e19bff378ba7364907/info.php /var/www/localhost/htdocs/index.php<text:line-break/><text:line-break/><text:line-break/></text:span><text:span text:style-name="T20"># Si quisiéramos algo como Wordpress haríamos</text:span><text:span text:style-name="T23"><text:line-break/></text:span><text:span text:style-name="T20">#ADD http://wordpress.org/latest.tar.gz /var/www/localhost/htdocs/wordpress.tar.gz</text:span><text:span text:style-name="T23"><text:line-break/></text:span><text:span text:style-name="T20">#RUN tar xvzf /var/www/localhost/htdocs/wordpress.tar.gz &amp;&amp; rm -rf /var/www/localhost/htdocs/wordpress.tar.gz</text:span><text:span text:style-name="T23"><text:line-break/><text:line-break/></text:span><text:span text:style-name="T20"># Usamos usuario y grupo www-data. El grupo lo crea Apache, pero si quisiéramos crear grupo</text:span><text:span text:style-name="T23"><text:line-break/></text:span><text:span text:style-name="T20"># Grupo www-data RUN set -x &amp;&amp; addgroup -g 82 -S www-data</text:span><text:span text:style-name="T23"><text:line-break/></text:span><text:span text:style-name="T20"># Creamos usuario www-data y lo añadimos a ese grupo</text:span><text:span text:style-name="T23"><text:line-break/></text:span><text:span text:style-name="T22">RUN</text:span><text:span text:style-name="T23"> adduser -u 82 -D -S -G www-data www-data<text:line-break/></text:span><text:span text:style-name="T20"># Hacemos todos los ficheros de /var/www propiedad de www-data</text:span><text:span text:style-name="T23"><text:line-break/></text:span><text:span text:style-name="T20"># Y damos permisos s esos ficheros y a start.sh</text:span><text:span text:style-name="T23"><text:line-break/></text:span><text:span text:style-name="T22">RUN</text:span><text:span text:style-name="T23"> chown -R www-data:www-data /var/www/ &amp;&amp; chmod -R 775 /var/www/ &amp;&amp; chmod 755 /start.sh<text:line-break/></text:span><text:span text:style-name="T20">#Indicamos puerto a exponer (para otros contenedores) 80</text:span><text:span text:style-name="T23"><text:line-break/></text:span><text:span text:style-name="T22">EXPOSE</text:span><text:span text:style-name="T23"> </text:span><text:span text:style-name="T24">80</text:span><text:span text:style-name="T23"><text:line-break/></text:span><text:span text:style-name="T20">#Comando lanzado por defecto al instalar el contendor</text:span><text:span text:style-name="T23"><text:line-break/></text:span><text:span text:style-name="T22">CMD</text:span><text:span text:style-name="T23"> /start.sh</text:span></text:p>
          </table:table-cell>
        </table:table-row>
      </table:table>
      <text:p text:style-name="P10"/>
      <text:p text:style-name="P10">El funcionamiento del propio “Dockerfile” está definido por sus propios comentarios. Una vez preparado, crearemos la imagen con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9"><text:span text:style-name="T21">docker build -t alpineapache ./</text:span></text:p>
          </table:table-cell>
        </table:table-row>
      </table:table>
      <text:p text:style-name="P10">Con esa línea indicamos que creamos la imagen “<text:span text:style-name="T18">alpineapache</text:span>” basándose en el fichero “<text:span text:style-name="T18">Dockerfile</text:span>” del directorio actual.</text:p>
      <text:p text:style-name="P10"><draw:frame draw:style-name="fr1" draw:name="image3.png" text:anchor-type="as-char" svg:width="6.6929in" svg:height="1.0555in" draw:z-index="0"><draw:image xlink:href="Pictures/10000201000004F5000000C9B3C73FA6E770C24E.png" xlink:type="simple" xlink:show="embed" xlink:actuate="onLoad" loext:mime-type="image/png"/></draw:frame></text:p>
      <text:list xml:id="list32917025941858" text:continue-numbering="true" text:style-name="WWNum1">
        <text:list-item>
          <text:p text:style-name="P21"><text:bookmark text:name="_14wpn6n5xh6b"/>Probando la imagen</text:p>
        </text:list-item>
      </text:list>
      <text:p text:style-name="P10">Con el siguiente comando, podremos lanzar la aplicación en el puerto 80 de nuestra máquina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9"><text:span text:style-name="T21">docker run -dp 80:80 alpineapache</text:span></text:p>
          </table:table-cell>
        </table:table-row>
      </table:table>
      <text:p text:style-name="P10">Una vez hecho esto, podremos probar la aplicación accediendo a <text:a xlink:type="simple" xlink:href="http://localhost/index.html" text:style-name="ListLabel_20_1" text:visited-style-name="ListLabel_20_1"><text:span text:style-name="T19">http://localhost/index.html</text:span></text:a> (donde veremos un mensaje similar a “It works!” y <text:a xlink:type="simple" xlink:href="http://localhost/index.php" text:style-name="ListLabel_20_1" text:visited-style-name="ListLabel_20_1"><text:span text:style-name="T19">http://localhost/index.php</text:span></text:a> donde veremos el contenido de la llamada a la función “<text:span text:style-name="T18">php_info()</text:span>”.</text:p>
      <text:list xml:id="list32916978211741" text:continue-numbering="true" text:style-name="WWNum1">
        <text:list-item>
          <text:p text:style-name="P22"><text:bookmark text:name="_72yv1gty1dke"/>Bibliografía</text:p>
        </text:list-item>
      </text:list>
      <text:p text:style-name="P8">[1] Docker Docs <text:a xlink:type="simple" xlink:href="https://docs.docker.com/" text:style-name="ListLabel_20_1" text:visited-style-name="ListLabel_20_1"><text:span text:style-name="T19">https://docs.docker.com/</text:span>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4. Caso práctico 02</text:span></text:p>
      </style:header>
      <style:footer>
        <text:p text:style-name="MP4"><text:span text:style-name="MT1">Curso Introducción a Docker<text:tab/><text:tab/>UD04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4" meta:object-count="0" meta:page-count="1" meta:paragraph-count="39" meta:word-count="580" meta:character-count="3998" meta:non-whitespace-character-count="3445"/>
    <meta:generator>LibreOfficeDev/6.0.5.2$Linux_X86_64 LibreOffice_project/</meta:generator>
  </office:meta>
</office:document-meta>
</file>