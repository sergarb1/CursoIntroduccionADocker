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2765D682288D219876F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>
      <style:paragraph-properties fo:margin-top="0in" fo:margin-bottom="0.1665in" loext:contextual-spacing="false" fo:line-height="100%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Heading_20_1" style:list-style-name="WWNum3">
      <style:paragraph-properties fo:text-align="justify" style:justify-single-word="false"/>
    </style:style>
    <style:style style:name="P35" style:family="paragraph" style:parent-style-name="Heading_20_1" style:list-style-name="WWNum3">
      <style:paragraph-properties fo:break-before="auto" fo:break-after="auto"/>
    </style:style>
    <style:style style:name="P36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bold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T14" style:family="text">
      <style:text-properties fo:color="#000000" fo:font-size="9pt" style:text-underline-style="none" fo:font-weight="bold" style:font-size-asian="9pt" style:font-weight-asian="bold" style:font-size-complex="9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008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Introducción a Docker y Kubernetes</text:span><text:span text:style-name="T2"><text:line-break/></text:span><text:span text:style-name="T3">UD 05. Caso práctico 01 - Grafana</text:span></text:p>
      <text:p text:style-name="P2"><draw:frame draw:style-name="fr1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6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/>
      <text:p text:style-name="P5"><text:span text:style-name="T5">Autor: Sergi García Barea</text:span></text:p>
      <text:p text:style-name="P6"><text:span text:style-name="T5">Actualizado Enero 2026</text:span></text:p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3</text:span></text:a></text:p>
          <text:p text:style-name="P12"><text:a xlink:type="simple" xlink:href="#_vyhbfp4t666x" text:style-name="Index_20_Link" text:visited-style-name="Index_20_Link"><text:span text:style-name="T13">2. Desplegando Grafana con volúmenes<text:tab/>3</text:span></text:a></text:p>
          <text:p text:style-name="P12"><text:a xlink:type="simple" xlink:href="#_7jdwpxdkp49j" text:style-name="Index_20_Link" text:visited-style-name="Index_20_Link"><text:span text:style-name="T14">3. Desplegando Grafana con Binding Mounts (forma alternativa)<text:tab/>4</text:span></text:a></text:p>
          <text:p text:style-name="P12"><text:a xlink:type="simple" xlink:href="#_vdnle5l1gurq" text:style-name="Index_20_Link" text:visited-style-name="Index_20_Link"><text:span text:style-name="T14">4. Acceso a Grafana<text:tab/>4</text:span></text:a></text:p>
          <text:p text:style-name="P12"><text:a xlink:type="simple" xlink:href="#_72yv1gty1dke" text:style-name="Index_20_Link" text:visited-style-name="Index_20_Link"><text:span text:style-name="T13">5. Bibliografía<text:tab/>5</text:span></text:a></text:p>
        </text:index-body>
      </text:table-of-content>
      <text:p text:style-name="P14"/>
      <text:p text:style-name="P15"><text:span text:style-name="T15">UD05. Caso práctico 01</text:span></text:p>
      <text:list xml:id="list996740260" text:style-name="WWNum3">
        <text:list-item>
          <text:p text:style-name="P35"><text:bookmark text:name="_dbh0n1vac4c8"/>Introducción</text:p>
        </text:list-item>
      </text:list>
      <text:p text:style-name="P20">Grafana es una herramienta de visualización y monitoreo de código abierto que permite analizar datos a partir de diversas fuentes <text:a xlink:type="simple" xlink:href="https://grafana.com/" text:style-name="ListLabel_20_37" text:visited-style-name="ListLabel_20_37"><text:span text:style-name="T18">https://grafana.com/</text:span></text:a>.</text:p>
      <text:p text:style-name="Standard"/>
      <text:p text:style-name="Standard">En este caso práctico, vamos a ver como desplegar Grafana utilizando Docker, asegurando la persistencia de datos mediante volúmenes o bind mounts según la necesidad. Desde este punto, podemos configurar datasources y dashboards según los requerimientos del entorno de monitoreo.</text:p>
      <text:p text:style-name="P20">Se proporcionarán dos métodos de instalación distintos:</text:p>
      <text:list xml:id="list2290757173" text:style-name="WWNum5">
        <text:list-item>
          <text:p text:style-name="P21">Uso de volúmenes de Docker (recomendado) para un almacenamiento gestionado por Docker.</text:p>
        </text:list-item>
        <text:list-item>
          <text:p text:style-name="P22">Uso de bind mounts para almacenar datos en un directorio del anfitrión.</text:p>
        </text:list-item>
      </text:list>
      <text:p text:style-name="P20">Al finalizar la instalación, se podrá acceder a Grafana desde el navegador en <text:a xlink:type="simple" xlink:href="http://localhost:3000" text:style-name="ListLabel_20_37" text:visited-style-name="ListLabel_20_37"><text:span text:style-name="T18">http://localhost:3000</text:span></text:a>, utilizando las credenciales por defecto: Usuario: admin y Contraseña: admin.</text:p>
      <text:list xml:id="list64429792566929" text:continue-list="list996740260" text:style-name="WWNum3">
        <text:list-item>
          <text:p text:style-name="P36"><text:bookmark text:name="_vyhbfp4t666x"/>Desplegando Grafana con volúmenes</text:p>
        </text:list-item>
      </text:list>
      <text:p text:style-name="P31">Para garantizar la persistencia de los datos, creamos un volumen gestionado por Docker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"><text:span text:style-name="T20">docker volume create grafana-storage</text:span></text:p>
          </table:table-cell>
        </table:table-row>
      </table:table>
      <text:p text:style-name="P31">Podemos verificar que se ha creado correctamente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<text:span text:style-name="T20">docker volume inspect grafana-storage</text:span></text:p>
          </table:table-cell>
        </table:table-row>
      </table:table>
      <text:p text:style-name="P32"/>
      <text:p text:style-name="Standard">Tras crear los volúmenes, ejecutamos el siguiente comando para iniciar Grafana utilizando el volumen previamente creado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20">docker run -d --name=grafana --volume grafana-storage:/var/lib/grafana -p 3000:3000 <text:s/>grafana/grafana-enterprise</text:span></text:p>
          </table:table-cell>
        </table:table-row>
      </table:table>
      <text:p text:style-name="Standard"/>
      <text:p text:style-name="Standard">Con esta orden:</text:p>
      <text:list xml:id="list4172278853" text:style-name="WWNum4">
        <text:list-item>
          <text:p text:style-name="P23">Se ejecuta Grafana en segundo plano (-d).</text:p>
        </text:list-item>
        <text:list-item>
          <text:p text:style-name="P26">Se le asigna el nombre grafana.</text:p>
        </text:list-item>
        <text:list-item>
          <text:p text:style-name="P26">Se monta el volumen grafana-storage con el directorio /var/lib/grafana del contenedor.</text:p>
        </text:list-item>
        <text:list-item>
          <text:p text:style-name="P28">Se expone el puerto 3000 para acceder desde el navegador.</text:p>
        </text:list-item>
      </text:list>
      <text:p text:style-name="P11"><text:soft-page-break/></text:p>
      <text:p text:style-name="P11"/>
      <text:list xml:id="list64428842577312" text:continue-list="list64429792566929" text:style-name="WWNum3">
        <text:list-item>
          <text:p text:style-name="P34"><text:bookmark text:name="_7jdwpxdkp49j"/>Desplegando Grafana con Binding Mounts (forma alternativa)</text:p>
        </text:list-item>
      </text:list>
      <text:p text:style-name="Standard">Si se prefiere almacenar los datos en un directorio del sistema anfitrión, se debe crear primero la carpeta local: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<text:span text:style-name="T20">mkdir -p ./grafana-data</text:span></text:p>
          </table:table-cell>
        </table:table-row>
      </table:table>
      <text:p text:style-name="Standard"/>
      <text:p text:style-name="Standard">Luego, iniciamos el contenedor con el usuario actual y el directorio creado: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span text:style-name="T20">docker run -d --name=grafana --user </text:span><text:span text:style-name="T21">"</text:span><text:span text:style-name="T22">$(id -u)</text:span><text:span text:style-name="T21">"</text:span><text:span text:style-name="T20"> --volume ./grafana-data:/var/lib/grafana -p 3000:3000 <text:s/>grafana/grafana-enterprise</text:span></text:p>
          </table:table-cell>
        </table:table-row>
      </table:table>
      <text:p text:style-name="Standard">En este caso:</text:p>
      <text:list xml:id="list2083542411" text:style-name="WWNum1">
        <text:list-item>
          <text:p text:style-name="P24">Se usa `--user "$(id -u)"` para evitar problemas de permisos, ejecutando el contenedor con el usuario local de nuestra máquina dentro del contenedor.</text:p>
        </text:list-item>
        <text:list-item>
          <text:p text:style-name="P27">Se monta `./grafana-data` en `/var/lib/grafana`.</text:p>
        </text:list-item>
        <text:list-item>
          <text:p text:style-name="P29">Se expone el puerto `3000`.</text:p>
        </text:list-item>
      </text:list>
      <text:list xml:id="list64429726084873" text:continue-list="list64428842577312" text:style-name="WWNum3">
        <text:list-item>
          <text:p text:style-name="P34"><text:bookmark text:name="_vdnle5l1gurq"/>Acceso a Grafana </text:p>
        </text:list-item>
      </text:list>
      <text:p text:style-name="Standard">Una vez desplegado el contenedor por cualquiera de las dos vías anteriores, accedemos a Grafana desde el navegador en: <text:a xlink:type="simple" xlink:href="http://localhost:3000" text:style-name="ListLabel_20_37" text:visited-style-name="ListLabel_20_37"><text:span text:style-name="T18">http://localhost:3000</text:span></text:a></text:p>
      <text:p text:style-name="P1"><draw:frame draw:style-name="fr1" draw:name="image3.png" text:anchor-type="as-char" svg:width="4.8016in" svg:height="3.5165in" draw:z-index="0"><draw:image xlink:href="Pictures/100002010000035D000002765D682288D219876F.png" xlink:type="simple" xlink:show="embed" xlink:actuate="onLoad" loext:mime-type="image/png"/></draw:frame></text:p>
      <text:p text:style-name="Standard">Las credenciales por defecto son:</text:p>
      <text:list xml:id="list1498425451" text:style-name="WWNum2">
        <text:list-item>
          <text:p text:style-name="P25">Usuario: admin</text:p>
        </text:list-item>
        <text:list-item>
          <text:p text:style-name="P30">Contraseña: admin</text:p>
        </text:list-item>
      </text:list>
      <text:p text:style-name="Standard">En este caso se recomienda cambiar la contraseña en el primer inicio de sesión para mayor seguridad. Ahora podremos utilizar y configurar Grafana a nuestro gusto.</text:p>
      <text:p text:style-name="Standard">A continuación documentación de referencia para el uso de Grafana <text:a xlink:type="simple" xlink:href="https://grafana.com/docs/grafana/latest/" text:style-name="ListLabel_20_37" text:visited-style-name="ListLabel_20_37"><text:span text:style-name="T18">https://grafana.com/docs/grafana/latest/</text:span></text:a></text:p>
      <text:list xml:id="list64429021709152" text:continue-list="list64429726084873" text:style-name="WWNum3">
        <text:list-item>
          <text:p text:style-name="P36"><text:bookmark text:name="_72yv1gty1dke"/>Bibliografía</text:p>
        </text:list-item>
      </text:list>
      <text:p text:style-name="P9">[1] Docker Docs <text:a xlink:type="simple" xlink:href="https://docs.docker.com/" text:style-name="ListLabel_20_37" text:visited-style-name="ListLabel_20_37"><text:span text:style-name="T18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5. Caso práctico 01</text:span></text:p>
      </style:header>
      <style:footer>
        <text:p text:style-name="MP4"><text:span text:style-name="MT1">Curso Introducción a Docker y Kubernetes<text:tab/><text:tab/>UD05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2" meta:paragraph-count="58" meta:word-count="534" meta:character-count="3588" meta:non-whitespace-character-count="3122"/>
    <meta:generator>LibreOfficeDev/6.0.5.2$Linux_X86_64 LibreOffice_project/</meta:generator>
  </office:meta>
</office:document-meta>
</file>