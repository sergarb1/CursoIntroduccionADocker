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/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5. Actividades entregables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xu5on6towlw5" text:style-name="Index_20_Link" text:visited-style-name="Index_20_Link"><text:span text:style-name="T17">5. Entrega “Caso práctico 4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5. Actividades entregables</text:span></text:p>
      <text:list xml:id="list1412768525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4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2 de los 4 casos prácticos!</text:span> :)</text:p>
      <text:list xml:id="list34558611687252" text:continue-numbering="true" text:style-name="WWNum1">
        <text:list-item>
          <text:p text:style-name="P26"><text:bookmark text:name="_vyhbfp4t666x"/><text:soft-page-break/>Entrega “Caso práctico 1”</text:p>
        </text:list-item>
      </text:list>
      <text:p text:style-name="P11">Adjunta una captura donde se muestre que Wordpress funciona y otra captura donde se pueda observar que los dos contenedores están funcionando (con “<text:span text:style-name="T19">docker ps</text:span>”).</text:p>
      <text:list xml:id="list34559547692611" text:continue-numbering="true" text:style-name="WWNum1">
        <text:list-item>
          <text:p text:style-name="P26"><text:bookmark text:name="_ow4x0s724zlg"/>Entrega “Caso práctico 2”</text:p>
        </text:list-item>
      </text:list>
      <text:p text:style-name="P11">Adjunta una captura donde se muestre que el balanceo de carga funciona correctamente y otra captura donde se pueda observar que los contenedores están en marcha.</text:p>
      <text:list xml:id="list34557646457692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P11">Adjunta una captura donde se muestre como se ha accedido a MySQL y se ha hecho la consulta de prueba de rendimiento propuestas.</text:p>
      <text:list xml:id="list34559299308324" text:continue-numbering="true" text:style-name="WWNum1">
        <text:list-item>
          <text:p text:style-name="P25"><text:bookmark text:name="_xu5on6towlw5"/>Entrega “Caso práctico 4”</text:p>
        </text:list-item>
      </text:list>
      <text:p text:style-name="Standard">Adjunta una captura donde se muestre como <text:s/>Grafana funciona correctament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Actividades entregables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87" meta:character-count="1749" meta:non-whitespace-character-count="1488"/>
    <meta:generator>LibreOfficeDev/6.0.5.2$Linux_X86_64 LibreOffice_project/</meta:generator>
  </office:meta>
</office:document-meta>
</file>