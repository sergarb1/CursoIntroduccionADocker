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05C3CB62EA13EAE53F7.png" manifest:media-type="image/png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9" style:family="paragraph" style:parent-style-name="Heading_20_1" style:list-style-name="WWNum1">
      <style:paragraph-properties fo:break-before="auto" fo:break-after="auto"/>
    </style:style>
    <style:style style:name="P30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1" style:family="paragraph" style:parent-style-name="Heading_20_2" style:list-style-name="WWNum1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color="#000000" style:text-underline-style="none" fo:font-weight="bold" style:font-weight-asian="bold" style:font-weight-complex="bold"/>
    </style:style>
    <style:style style:name="T15" style:family="text">
      <style:text-properties fo:color="#000000" style:text-underline-style="none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Docker y Kubernetes</text:span><text:span text:style-name="T3"><text:line-break/></text:span><text:span text:style-name="T4">UD 05. Caso práctico 02 - Balanceo de carga con HAProxy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6">Autor: Sergi García Barea</text:span></text:p>
      <text:p text:style-name="P2"><text:span text:style-name="T6">Actualizado Enero 2026</text:span></text:p>
      <text:p text:style-name="P5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7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4">1. Introducción<text:tab/>2</text:span></text:a></text:p>
          <text:p text:style-name="P11"><text:a xlink:type="simple" xlink:href="#_embuw89zdyyp" text:style-name="Index_20_Link" text:visited-style-name="Index_20_Link"><text:span text:style-name="T14">2. Paso 1: Creando las imágenes necesarias<text:tab/>3</text:span></text:a></text:p>
          <text:p text:style-name="P13"><text:a xlink:type="simple" xlink:href="#_pef2tdwmpszl" text:style-name="Index_20_Link" text:visited-style-name="Index_20_Link"><text:span text:style-name="T15">2.1 <text:s/>Dockerfile para imágenes de servidores Apache<text:tab/>3</text:span></text:a></text:p>
          <text:p text:style-name="P13"><text:a xlink:type="simple" xlink:href="#_7o85apyadngy" text:style-name="Index_20_Link" text:visited-style-name="Index_20_Link"><text:span text:style-name="T15">2.2 <text:s/>Dockerfile para imagen de servidor HAProxy<text:tab/>3</text:span></text:a></text:p>
          <text:p text:style-name="P11"><text:a xlink:type="simple" xlink:href="#_56qf1raxh6jo" text:style-name="Index_20_Link" text:visited-style-name="Index_20_Link"><text:span text:style-name="T14">3. Paso 2: Creando la red y los contenedores con Apache<text:tab/>5</text:span></text:a></text:p>
          <text:p text:style-name="P11"><text:a xlink:type="simple" xlink:href="#_lqv3oojzaj" text:style-name="Index_20_Link" text:visited-style-name="Index_20_Link"><text:span text:style-name="T14">4. Paso 3: Creando contenedor con HAProxy<text:tab/>5</text:span></text:a></text:p>
          <text:p text:style-name="P11"><text:a xlink:type="simple" xlink:href="#_2uxuz7ax8rpk" text:style-name="Index_20_Link" text:visited-style-name="Index_20_Link"><text:span text:style-name="T14">5. Servidores de Apache usando un volumen común<text:tab/>6</text:span></text:a></text:p>
          <text:p text:style-name="P11"><text:a xlink:type="simple" xlink:href="#_72yv1gty1dke" text:style-name="Index_20_Link" text:visited-style-name="Index_20_Link"><text:span text:style-name="T14">6. Bibliografía<text:tab/>7</text:span></text:a></text:p>
        </text:index-body>
      </text:table-of-content>
      <text:p text:style-name="Standard"/>
      <text:p text:style-name="P14"/>
      <text:p text:style-name="P15"><text:span text:style-name="T16">UD05. Caso práctico 02</text:span></text:p>
      <text:list xml:id="list2757464721" text:style-name="WWNum1">
        <text:list-item>
          <text:p text:style-name="P29"><text:bookmark text:name="_dbh0n1vac4c8"/>Introducción</text:p>
        </text:list-item>
      </text:list>
      <text:p text:style-name="P10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umen.</text:p>
      <text:list xml:id="list34260336576068" text:continue-numbering="true" text:style-name="WWNum1">
        <text:list-item>
          <text:p text:style-name="P29"><text:bookmark text:name="_embuw89zdyyp"/>Paso 1: Creando las imágenes necesarias</text:p>
        </text:list-item>
      </text:list>
      <text:p text:style-name="P10">En este paso hemos creado dos sencillos Dockerfiles: uno que será utilizado dos veces en los servidores Apache y otro que será utilizado en el servidor HAProxy.</text:p>
      <text:p text:style-name="P10"/>
      <text:p text:style-name="P10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P10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1">cd</text:span><text:span text:style-name="T23"> apache01</text:span></text:p>
          </table:table-cell>
        </table:table-row>
      </table:table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docker build -t miapache01 .</text:span></text:p>
          </table:table-cell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1">cd</text:span><text:span text:style-name="T23"> ../apache02</text:span></text:p>
          </table:table-cell>
        </table:table-row>
      </table:table>
      <text:p text:style-name="P2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3">docker build -t miapache02 .</text:span></text:p>
          </table:table-cell>
        </table:table-row>
      </table:table>
      <text:p text:style-name="P2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1">cd</text:span><text:span text:style-name="T23"> ../haproxy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3">docker build -t mihaproxy .</text:span></text:p>
          </table:table-cell>
        </table:table-row>
      </table:table>
      <text:p text:style-name="P10">Con esto habremos creado las imágenes locales “<text:span text:style-name="T20">miapache01</text:span>”, “<text:span text:style-name="T20">miapache02</text:span>” y “<text:span text:style-name="T20">mihaproxy</text:span>”.</text:p>
      <text:p text:style-name="P10">A continuación describimos cómo se han creado las distintas imágenes. </text:p>
      <text:list xml:id="list34259200579731" text:continue-numbering="true" text:style-name="WWNum1">
        <text:list-item>
          <text:list>
            <text:list-item>
              <text:p text:style-name="P31"><text:bookmark text:name="_pef2tdwmpszl"/><text:soft-page-break/>Dockerfile para imágenes de servidores Apache</text:p>
            </text:list-item>
          </text:list>
        </text:list-item>
      </text:list>
      <text:p text:style-name="P10">Las imágenes generadas se basan en la imagen <text:a xlink:type="simple" xlink:href="https://hub.docker.com/_/httpd" text:style-name="ListLabel_20_10" text:visited-style-name="ListLabel_20_10"><text:span text:style-name="T19">https://hub.docker.com/_/httpd</text:span></text:a>. </text:p>
      <text:p text:style-name="P10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P10"/>
      <text:p text:style-name="P10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34258860270351" text:continue-numbering="true" text:style-name="WWNum1">
        <text:list-item>
          <text:list>
            <text:list-item>
              <text:p text:style-name="P31"><text:bookmark text:name="_7o85apyadngy"/>Dockerfile para imagen de servidor HAProxy</text:p>
            </text:list-item>
          </text:list>
        </text:list-item>
      </text:list>
      <text:p text:style-name="P10">La imagen generada se basan en la ima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P10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  <text:p text:style-name="P23"><text:span text:style-name="T24">RUN chmod 750 /usr/local/etc/haproxy/haproxy.cfg</text:span></text:p>
          </table:table-cell>
        </table:table-row>
      </table:table>
      <text:p text:style-name="P10"/>
      <text:p text:style-name="P10">Básicamente, lo que se copia dentro del contenedor es el fichero de configuración de HAProxy. Aquí lo podemos observar en detalle.</text:p>
      <text:p text:style-name="P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P10"/>
      <text:p text:style-name="P10"/>
      <text:p text:style-name="P10">Este fichero de configuración entre otras cosas indica:</text:p>
      <text:list xml:id="list2954008003" text:style-name="WWNum2">
        <text:list-item>
          <text:p text:style-name="P24">Que HAProxy funcionará en el puerto 80.</text:p>
        </text:list-item>
        <text:list-item>
          <text:p text:style-name="P25">Que el balanceo de carga seguirá el algoritmo “<text:span text:style-name="T20">roundrobin</text:span>” (cada petición a un servidor).</text:p>
        </text:list-item>
        <text:list-item>
          <text:p text:style-name="P25">Que los servidores se definen así:</text:p>
          <text:list>
            <text:list-item>
              <text:p text:style-name="P26">server apache1 ${APACHE_1_IP}:${APACHE_EXPOSED_PORT} check</text:p>
            </text:list-item>
            <text:list-item>
              <text:p text:style-name="P26">server apache2 ${APACHE_2_IP}:${APACHE_EXPOSED_PORT} check</text:p>
              <text:list>
                <text:list-item>
                  <text:p text:style-name="P27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P10"/>
      <text:list xml:id="list34260220164842" text:continue-list="list34258860270351" text:style-name="WWNum1">
        <text:list-item>
          <text:p text:style-name="P29"><text:bookmark text:name="_56qf1raxh6jo"/>Paso 2: Creando la red y los contenedores con Apache</text:p>
        </text:list-item>
      </text:list>
      <text:p text:style-name="P10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3">docker network create balanceo</text:span></text:p>
          </table:table-cell>
        </table:table-row>
      </table:table>
      <text:p text:style-name="P10"/>
      <text:p text:style-name="P10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3">docker run -it --name ap01 --network balanceo -d miapache01</text:span></text:p>
          </table:table-cell>
        </table:table-row>
      </table:table>
      <text:p text:style-name="P2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3">docker run -it --name ap02 --network balanceo -d miapache02</text:span></text:p>
          </table:table-cell>
        </table:table-row>
      </table:table>
      <text:p text:style-name="P10"/>
      <text:list xml:id="list34260683121882" text:continue-numbering="true" text:style-name="WWNum1">
        <text:list-item>
          <text:p text:style-name="P29"><text:bookmark text:name="_lqv3oojzaj"/>Paso 3: Creando contenedor con HAProxy</text:p>
        </text:list-item>
      </text:list>
      <text:p text:style-name="P10">Creamos el contenedor con HAProxy con nombre “ha01”, dentro de la red “<text:span text:style-name="T20">balanceo</text:span>” y con el puerto 80 del servidor HAProxy se mapeará con el puerto 8080 de la máquina anfitrión.</text:p>
      <text:p text:style-name="P10"/>
      <text:p text:style-name="P10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P10"/>
      <text:p text:style-name="P10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P10"/>
      <text:p text:style-name="P10">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, ya que a cada recarga le atenderá a la petición un servidor diferente.</text:p>
      <text:p text:style-name="P10"/>
      <text:p text:style-name="P10">Servidor de contenedor “<text:span text:style-name="T20">ap01</text:span>”.</text:p>
      <text:p text:style-name="P10"><draw:frame draw:style-name="fr1" draw:name="image6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P10">Servidor de contenedor “<text:span text:style-name="T20">ap02</text:span>”.</text:p>
      <text:p text:style-name="P10"><draw:frame draw:style-name="fr1" draw:name="image5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p text:style-name="P10"/>
      <text:p text:style-name="P28"><text:span text:style-name="T12"><text:s/>❕</text:span><text:span text:style-name="T13"> </text:span><text:span text:style-name="T11">Atención: </text:span><text:s/><text:span text:style-name="T30">¿No puedes ver correctamente como la web es servida por varios servidores?</text:span> Prueba a recargar la página con CTRL + F5 para evitar recibir la página cacheada. Si no funciona, puedes probar a utilizar el modo incógnito del navegador o en última instancia, pedir la página, borrar la caché y tras ello pedir de nuevo la página para observar que lo sirve otro servidor.</text:p>
      <text:list xml:id="list34259983196666" text:continue-numbering="true" text:style-name="WWNum1">
        <text:list-item>
          <text:p text:style-name="P29"><text:bookmark text:name="_2uxuz7ax8rpk"/>Servidores de Apache usando un volumen común</text:p>
        </text:list-item>
      </text:list>
      <text:p text:style-name="P10">En este caso práctico, los servidores de cada contenedor servían información distinta. En este paso modificamos un poco lo realizado anteriormente para que usen un volumen común.</text:p>
      <text:p text:style-name="P10"/>
      <text:p text:style-name="P10">En primer lugar, creamos una nueva imagen, usando el Dockerfile proporcionado dentro de la carpeta “<text:span text:style-name="T20">apachevolumen</text:span>”.</text:p>
      <text:p text:style-name="P16"><text:soft-page-break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21">cd</text:span><text:span text:style-name="T23"> ../apachevolumen</text:span></text:p>
          </table:table-cell>
        </table:table-row>
      </table:table>
      <text:p text:style-name="P1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1"><text:span text:style-name="T23">docker build -t miapachevolumen .</text:span></text:p>
          </table:table-cell>
        </table:table-row>
      </table:table>
      <text:p text:style-name="P10"/>
      <text:p text:style-name="P10">Detenemos y eliminamos los anteriores contenedores “ap01” y ap02”</text:p>
      <text:p text:style-name="P1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3">docker stop ap01 ap02</text:span></text:p>
          </table:table-cell>
        </table:table-row>
      </table:table>
      <text:p text:style-name="P2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3">docker rm ap01 ap02</text:span></text:p>
          </table:table-cell>
        </table:table-row>
      </table:table>
      <text:p text:style-name="P10"/>
      <text:p text:style-name="P10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P10"/>
      <text:p text:style-name="P10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P10"/>
      <text:p text:style-name="P10">Este directorio contiene un fichero “<text:span text:style-name="T20">index.html</text:span>”. Recordamos que si se crea un volumen nuevo sobre un directorio no vacío, se copia el contenido de ese directorio al volumen (se puebla).</text:p>
      <text:p text:style-name="P10"/>
      <text:p text:style-name="P10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P10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P10"/>
      <text:p text:style-name="P10">Si todo va bien, 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P10"/>
      <text:p text:style-name="P10"><draw:frame draw:style-name="fr1" draw:name="image4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P10"/>
      <text:list xml:id="list34258891692008" text:continue-numbering="true" text:style-name="WWNum1">
        <text:list-item>
          <text:p text:style-name="P30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91" meta:word-count="1133" meta:character-count="7554" meta:non-whitespace-character-count="6484"/>
    <meta:generator>LibreOfficeDev/6.0.5.2$Linux_X86_64 LibreOffice_project/</meta:generator>
  </office:meta>
</office:document-meta>
</file>