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047A331F897218DC864.png" manifest:media-type="image/png"/>
  <manifest:file-entry manifest:full-path="Pictures/100002010000037E000001017BEA5681E0485606.png" manifest:media-type="image/png"/>
  <manifest:file-entry manifest:full-path="Pictures/100002010000024F00000083BD48D8C45C6E668D.png" manifest:media-type="image/png"/>
  <manifest:file-entry manifest:full-path="Pictures/10000201000001F60000010074B68961F2507E7B.png" manifest:media-type="image/png"/>
  <manifest:file-entry manifest:full-path="Pictures/10000201000002E90000004725A8F47D6906CA60.png" manifest:media-type="image/png"/>
  <manifest:file-entry manifest:full-path="Pictures/1000020100000315000000C32AC18C0A07EBC8FB.png" manifest:media-type="image/png"/>
  <manifest:file-entry manifest:full-path="Pictures/1000020100000326000001D29AC56A3EA78352A4.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style:min-row-height="0.2604in"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text-align="center" style:justify-single-word="false" fo:break-before="auto" fo:break-after="auto"/>
    </style:style>
    <style:style style:name="P14" style:family="paragraph" style:parent-style-name="Standard">
      <style:paragraph-properties fo:break-before="auto" fo:break-after="auto"/>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0pt" fo:font-weight="bold" style:font-name-asian="Arial1" style:font-size-asian="10pt" style:font-weight-asian="bold" style:font-name-complex="Arial1" style:font-size-complex="10pt" style:font-weight-complex="bold"/>
    </style:style>
    <style:style style:name="P16" style:family="paragraph" style:parent-style-name="Standard">
      <style:paragraph-properties fo:margin-top="0.1665in" fo:margin-bottom="0.0835in" loext:contextual-spacing="false" fo:line-height="100%" fo:break-before="auto" fo:break-after="auto" fo:keep-with-next="alway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end" style:justify-single-word="false"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15%" fo:text-align="start" style:justify-single-word="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5"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9"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0" style:family="paragraph" style:parent-style-name="Standard" style:list-style-name="WWNum8">
      <style:paragraph-properties fo:margin-left="1.5in" fo:margin-right="0in" fo:margin-top="0in" fo:margin-bottom="0.0429in" loext:contextual-spacing="false" fo:text-indent="-0.25in" style:auto-text-indent="false" fo:break-before="auto" fo:break-after="auto"/>
    </style:style>
    <style:style style:name="P51" style:family="paragraph" style:parent-style-name="Heading_20_3" style:list-style-name="WWNum6">
      <style:paragraph-properties fo:break-before="auto" fo:break-after="auto"/>
    </style:style>
    <style:style style:name="P52" style:family="paragraph" style:parent-style-name="Heading_20_1" style:list-style-name="WWNum6">
      <style:paragraph-properties fo:break-before="auto" fo:break-after="auto"/>
    </style:style>
    <style:style style:name="P53" style:family="paragraph" style:parent-style-name="Heading_20_1" style:list-style-name="WWNum6">
      <style:paragraph-properties fo:text-align="justify" style:justify-single-word="false" fo:break-before="auto" fo:break-after="auto"/>
    </style:style>
    <style:style style:name="P54" style:family="paragraph" style:parent-style-name="Heading_20_1" style:list-style-name="WWNum6">
      <style:paragraph-properties fo:margin-top="0.0398in" fo:margin-bottom="0in" loext:contextual-spacing="false" fo:break-before="auto" fo:break-after="auto"/>
    </style:style>
    <style:style style:name="P55" style:family="paragraph" style:parent-style-name="Heading_20_1" style:list-style-name="WWNum6">
      <style:paragraph-properties fo:margin-left="0.4in" fo:margin-right="0in" fo:text-align="justify" style:justify-single-word="false" fo:text-indent="-0.3in" style:auto-text-indent="false" fo:break-before="auto" fo:break-after="auto"/>
    </style:style>
    <style:style style:name="P56" style:family="paragraph" style:parent-style-name="Heading_20_2" style:list-style-name="WWNum6">
      <style:paragraph-properties fo:break-before="auto" fo:break-after="auto"/>
    </style:style>
    <style:style style:name="P57" style:family="paragraph" style:parent-style-name="Heading_20_2" style:list-style-name="WWNum6">
      <style:paragraph-properties fo:margin-top="0in" fo:margin-bottom="0.0429in" loext:contextual-spacing="false" fo:break-before="auto" fo:break-after="auto"/>
    </style:style>
    <style:style style:name="P5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font-weight-complex="bold"/>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font-style-complex="normal" style:font-weight-complex="normal"/>
    </style:style>
    <style:style style:name="T17" style:family="text">
      <style:text-properties fo:color="#000000" style:text-underline-style="none" fo:font-weight="bold" style:font-weight-asian="bold" style:font-weight-complex="bold"/>
    </style:style>
    <style:style style:name="T18" style:family="text">
      <style:text-properties fo:color="#000000" style:text-underline-style="none"/>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text-underline-style="none"/>
    </style:style>
    <style:style style:name="T24" style:family="text">
      <style:text-properties fo:color="#333333" style:font-name="Consolas" fo:background-color="#f8f8f8" loext:char-shading-value="0" style:font-name-asian="Consolas1" style:font-name-complex="Consolas1"/>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color="#1155cc" style:text-underline-style="solid" style:text-underline-width="auto" style:text-underline-color="font-color"/>
    </style:style>
    <style:style style:name="T27" style:family="text">
      <style:text-properties fo:color="#1155cc" fo:font-size="8pt" fo:font-style="italic" style:text-underline-style="solid" style:text-underline-width="auto" style:text-underline-color="font-color" style:font-size-asian="8pt" style:font-style-asian="italic" style:font-size-complex="8pt" style:font-style-complex="italic"/>
    </style:style>
    <style:style style:name="T28" style:family="text">
      <style:text-properties fo:color="#1155cc" fo:font-size="11pt" style:text-underline-style="solid" style:text-underline-width="auto" style:text-underline-color="font-color" style:font-size-asian="11pt" style:font-size-complex="11pt"/>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8pt" fo:font-style="italic" style:font-size-asian="8pt" style:font-style-asian="italic" style:font-size-complex="8pt" style:font-style-complex="italic"/>
    </style:style>
    <style:style style:name="T31" style:family="text">
      <style:text-properties fo:color="#0086b3" style:font-name="Consolas" fo:background-color="#f8f8f8" loext:char-shading-value="0" style:font-name-asian="Consolas1"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Docker y Kubernetes</text:span><text:span text:style-name="T4"><text:line-break/></text:span><text:span text:style-name="T5">UD 05. Redes y volúmenes en Docker</text:span></text:p>
      <text:p text:style-name="P2"><draw:frame draw:style-name="fr1"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6"><draw:frame draw:style-name="fr1" draw:name="image2.png" text:anchor-type="as-char" svg:width="6.6929in" svg:height="0.4862in" draw:z-index="0"><draw:image xlink:href="Pictures/10000000000007800000008BADE10FA77D575FB0.png" xlink:type="simple" xlink:show="embed" xlink:actuate="onLoad" loext:mime-type="image/png"/></draw:frame></text:p>
      <text:p text:style-name="P3"/>
      <text:p text:style-name="P4"/>
      <text:p text:style-name="P4"/>
      <text:p text:style-name="P4"/>
      <text:p text:style-name="P5"><text:span text:style-name="T7">Autor: Sergi García Barea</text:span></text:p>
      <text:p text:style-name="P5"><text:span text:style-name="T7">Actualizado Enero 2026</text:span></text:p>
      <text:p text:style-name="P5"><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1"><text:s/>📖 </text:span><text:span text:style-name="T12">Importante</text:span></text:p>
      <text:p text:style-name="P12"/>
      <text:p text:style-name="P11"><text:span text:style-name="T13"><text:s/>❕</text:span><text:span text:style-name="T14"> </text:span><text:span text:style-name="T12">Atención</text:span></text:p>
      <text:p text:style-name="P12"/>
      <text:p text:style-name="P11"><text:span text:style-name="T11"><text:s/>💬</text:span> <text:span text:style-name="T12">Interesante</text:span></text:p>
      <text:p text:style-name="P1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dbh0n1vac4c8" text:style-name="Index_20_Link" text:visited-style-name="Index_20_Link"><text:span text:style-name="T15">1. Introducción<text:tab/>3</text:span></text:a></text:p>
          <text:p text:style-name="P17"><text:a xlink:type="simple" xlink:href="#_vyhbfp4t666x" text:style-name="Index_20_Link" text:visited-style-name="Index_20_Link"><text:span text:style-name="T15">2. Gestionando redes<text:tab/>3</text:span></text:a></text:p>
          <text:p text:style-name="P19"><text:a xlink:type="simple" xlink:href="#_iol64q9i0w94" text:style-name="Index_20_Link" text:visited-style-name="Index_20_Link"><text:span text:style-name="T16">2.1 <text:s/>Redes predefinidas al instalar Docker<text:tab/>3</text:span></text:a></text:p>
          <text:p text:style-name="P19"><text:a xlink:type="simple" xlink:href="#_forsb6xkc2w5" text:style-name="Index_20_Link" text:visited-style-name="Index_20_Link"><text:span text:style-name="T16">2.2 <text:s/>Crear redes internas en Docker<text:tab/>3</text:span></text:a></text:p>
          <text:p text:style-name="P19"><text:a xlink:type="simple" xlink:href="#_4njryo0l3av" text:style-name="Index_20_Link" text:visited-style-name="Index_20_Link"><text:span text:style-name="T16">2.3 <text:s/>Inspeccionar y eliminar redes<text:tab/>4</text:span></text:a></text:p>
          <text:p text:style-name="P17"><text:a xlink:type="simple" xlink:href="#_97ftdnh0fpp4" text:style-name="Index_20_Link" text:visited-style-name="Index_20_Link"><text:span text:style-name="T15">3. Asignando redes a contenedores<text:tab/>5</text:span></text:a></text:p>
          <text:p text:style-name="P19"><text:a xlink:type="simple" xlink:href="#_c9hz7unwv0w" text:style-name="Index_20_Link" text:visited-style-name="Index_20_Link"><text:span text:style-name="T16">3.1 <text:s/>Asignar la red al crear un contenedor<text:tab/>5</text:span></text:a></text:p>
          <text:p text:style-name="P19"><text:a xlink:type="simple" xlink:href="#_1sqt15nohdqs" text:style-name="Index_20_Link" text:visited-style-name="Index_20_Link"><text:span text:style-name="T16">3.2 <text:s/>Conectar y desconectar un contenedor de una red<text:tab/>6</text:span></text:a></text:p>
          <text:p text:style-name="P17"><text:a xlink:type="simple" xlink:href="#_6lyvzg2kpq1f" text:style-name="Index_20_Link" text:visited-style-name="Index_20_Link"><text:span text:style-name="T15">4. Persistencia de datos en Docker<text:tab/>7</text:span></text:a></text:p>
          <text:p text:style-name="P19"><text:a xlink:type="simple" xlink:href="#_ht3tmouzfilx" text:style-name="Index_20_Link" text:visited-style-name="Index_20_Link"><text:span text:style-name="T16">4.1 <text:s/>¿Cuáles son las principales herramientas de persistencia en Docker?<text:tab/>7</text:span></text:a></text:p>
          <text:p text:style-name="P19"><text:a xlink:type="simple" xlink:href="#_n3c7fsh9v8ni" text:style-name="Index_20_Link" text:visited-style-name="Index_20_Link"><text:span text:style-name="T16">4.2 <text:s/>Utilizando “Binding mount”<text:tab/>8</text:span></text:a></text:p>
          <text:p text:style-name="P19"><text:a xlink:type="simple" xlink:href="#_m13keevf8n2j" text:style-name="Index_20_Link" text:visited-style-name="Index_20_Link"><text:span text:style-name="T16">4.3 <text:s/>Creando volúmenes Docker<text:tab/>9</text:span></text:a></text:p>
          <text:p text:style-name="P20"><text:a xlink:type="simple" xlink:href="#_k94wv05w33x6" text:style-name="Index_20_Link" text:visited-style-name="Index_20_Link"><text:span text:style-name="T16">4.3.1 <text:s/>Creando volumen al crear contenedor<text:tab/>9</text:span></text:a></text:p>
          <text:p text:style-name="P20"><text:a xlink:type="simple" xlink:href="#_fqmqwemxmsb5" text:style-name="Index_20_Link" text:visited-style-name="Index_20_Link"><text:span text:style-name="T16">4.3.2 <text:s/>Gestionando volúmenes<text:tab/>9</text:span></text:a></text:p>
          <text:p text:style-name="P20"><text:a xlink:type="simple" xlink:href="#_idgy9bqniqqo" text:style-name="Index_20_Link" text:visited-style-name="Index_20_Link"><text:span text:style-name="T16">4.3.3 <text:s/>Poblando volúmenes<text:tab/>9</text:span></text:a></text:p>
          <text:p text:style-name="P19"><text:a xlink:type="simple" xlink:href="#_v538eauoj9d7" text:style-name="Index_20_Link" text:visited-style-name="Index_20_Link"><text:span text:style-name="T16">4.4 <text:s/>Creando volúmenes “tmpfs”<text:tab/>9</text:span></text:a></text:p>
          <text:p text:style-name="P19"><text:a xlink:type="simple" xlink:href="#_gxfh351io8sp" text:style-name="Index_20_Link" text:visited-style-name="Index_20_Link"><text:span text:style-name="T16">4.5 <text:s/>Copia de seguridad de un Volumen<text:tab/>10</text:span></text:a></text:p>
          <text:p text:style-name="P19"><text:a xlink:type="simple" xlink:href="#_e0erkkd0ksst" text:style-name="Index_20_Link" text:visited-style-name="Index_20_Link"><text:span text:style-name="T16">4.6 <text:s/>Plugins para volúmenes en Docker<text:tab/>10</text:span></text:a></text:p>
          <text:p text:style-name="P17"><text:a xlink:type="simple" xlink:href="#_g1qlmy5ta6mu" text:style-name="Index_20_Link" text:visited-style-name="Index_20_Link"><text:span text:style-name="T15">5. Bibliografía<text:tab/>11</text:span></text:a></text:p>
          <text:p text:style-name="P17"><text:a xlink:type="simple" xlink:href="#_7p54dmtq0xai" text:style-name="Index_20_Link" text:visited-style-name="Index_20_Link"><text:span text:style-name="T15">6. Licencias de elementos externos utilizados<text:tab/>11</text:span></text:a></text:p>
        </text:index-body>
      </text:table-of-content>
      <text:p text:style-name="P15"/>
      <text:p text:style-name="P21"/>
      <text:p text:style-name="P21"/>
      <text:p text:style-name="P22"><text:span text:style-name="T19">UD05. Redes y volúmenes en Docker</text:span></text:p>
      <text:list xml:id="list3359803195" text:style-name="WWNum6">
        <text:list-item>
          <text:p text:style-name="P52"><text:bookmark text:name="_dbh0n1vac4c8"/>Introducción</text:p>
        </text:list-item>
      </text:list>
      <text:p text:style-name="P12">Hasta el momento hemos tratado con contenedores relativamente aislados y con poco contacto con la máquina anfitrión y con otros contenedores. En esta unidad hablaremos de cómo configurar redes entre contenedores y de cómo compartir datos y dotarlos de persistencia mediante volúmenes.</text:p>
      <text:list xml:id="list34054339197997" text:continue-numbering="true" text:style-name="WWNum6">
        <text:list-item>
          <text:p text:style-name="P53"><text:bookmark text:name="_vyhbfp4t666x"/>Gestionando redes</text:p>
        </text:list-item>
      </text:list>
      <text:p text:style-name="P12">En este apartado veremos las redes predefinidas que posee Docker y cómo podemos crear y eliminar nuestras propias redes.</text:p>
      <text:list xml:id="list34055557883739" text:continue-numbering="true" text:style-name="WWNum6">
        <text:list-item>
          <text:list>
            <text:list-item>
              <text:p text:style-name="P56"><text:bookmark text:name="_iol64q9i0w94"/><text:soft-page-break/>Redes predefinidas al instalar Docker</text:p>
            </text:list-item>
          </text:list>
        </text:list-item>
      </text:list>
      <text:p text:style-name="P12">Al instalar Docker se establecen de forma predefinida 3 redes internas con las que podemos trabajar. Estas redes no se pueden eliminar y están siempre presentes:</text:p>
      <text:list xml:id="list2326428801" text:style-name="WWNum3">
        <text:list-item>
          <text:p text:style-name="P28"><text:span text:style-name="T12">Red “bridge”:</text:span> es la red por defecto de cualquier contenedor, dando una IP propia. Para funcionar utiliza una interfaz de red virtual en la máquina anfitriona llamada “<text:span text:style-name="T22">docker0</text:span>”.</text:p>
        </text:list-item>
        <text:list-item>
          <text:p text:style-name="P35"><text:span text:style-name="T12">Red “host”:</text:span> si un contenedor utiliza esta red, estará utilizando la misma configuración de red de la máquina anfitriona.</text:p>
        </text:list-item>
        <text:list-item>
          <text:p text:style-name="P40"><text:span text:style-name="T12">Red “none”</text:span>: red no permite acceso a otras redes. Solo permite el acceso a la interfaz de loopback.</text:p>
        </text:list-item>
      </text:list>
      <text:p text:style-name="P12">Podremos observar en la máquina anfitriona la interfaz “<text:span text:style-name="T22">docker0</text:span>” usando:</text:p>
      <table:table table:name="Table1" table:style-name="Table1">
        <table:table-column table:style-name="Table1.A"/>
        <table:table-row table:style-name="Table1.1">
          <table:table-cell table:style-name="Table1.A1" office:value-type="string">
            <text:p text:style-name="P44"><text:span text:style-name="T24">ifconfig docker0</text:span></text:p>
          </table:table-cell>
        </table:table-row>
      </table:table>
      <text:p text:style-name="P12">o</text:p>
      <table:table table:name="Table2" table:style-name="Table2">
        <table:table-column table:style-name="Table2.A"/>
        <table:table-row table:style-name="Table2.1">
          <table:table-cell table:style-name="Table2.A1" office:value-type="string">
            <text:p text:style-name="P44"><text:span text:style-name="T24">ip a show docker0</text:span></text:p>
          </table:table-cell>
        </table:table-row>
      </table:table>
      <text:p text:style-name="P12"/>
      <text:p text:style-name="P1"><draw:frame draw:style-name="fr1" draw:name="image8.png" text:anchor-type="as-char" svg:width="4.361in" svg:height="2.5252in" draw:z-index="0"><draw:image xlink:href="Pictures/1000020100000326000001D29AC56A3EA78352A4.png" xlink:type="simple" xlink:show="embed" xlink:actuate="onLoad" loext:mime-type="image/png"/></draw:frame></text:p>
      <text:list xml:id="list34055627581882" text:continue-list="list34055557883739" text:style-name="WWNum6">
        <text:list-item>
          <text:list>
            <text:list-item>
              <text:p text:style-name="P56"><text:bookmark text:name="_forsb6xkc2w5"/>Crear redes internas en Docker</text:p>
            </text:list-item>
          </text:list>
        </text:list-item>
      </text:list>
      <text:p text:style-name="P12">Si lo deseamos, podemos crear distintas redes independientes, ampliando las 3 redes por defecto.</text:p>
      <text:p text:style-name="P12">¿Cuándo nos puede ser útil crear redes? En general, en contextos en los que queramos aislar las comunicaciones entre un conjunto de contenedores (por ejemplo, una red para pruebas de test y otra para desarrollo, o simular una red aislada con determinados servicios).</text:p>
      <text:p text:style-name="P12">Para crear una red, simplemente usando el comando</text:p>
      <table:table table:name="Table3" table:style-name="Table3">
        <table:table-column table:style-name="Table3.A"/>
        <table:table-row table:style-name="Table3.1">
          <table:table-cell table:style-name="Table3.A1" office:value-type="string">
            <text:p text:style-name="P44"><text:span text:style-name="T24">docker network create redtest</text:span></text:p>
          </table:table-cell>
        </table:table-row>
      </table:table>
      <text:p text:style-name="P12">Al crear la red, en la máquina anfitriona se creará una red virtual con formato “br-12 primeros dígitos del identificador”. Lo vemos con un ejemplo:</text:p>
      <text:p text:style-name="P12"><draw:frame draw:style-name="fr1" draw:name="image10.png" text:anchor-type="as-char" svg:width="6.6929in" svg:height="0.639in" draw:z-index="0"><draw:image xlink:href="Pictures/10000201000002E90000004725A8F47D6906CA60.png" xlink:type="simple" xlink:show="embed" xlink:actuate="onLoad" loext:mime-type="image/png"/></draw:frame></text:p>
      <text:p text:style-name="P12"/>
      <text:p text:style-name="P12"><draw:frame draw:style-name="fr1" draw:name="image5.png" text:anchor-type="as-char" svg:width="5.9161in" svg:height="1.4634in" draw:z-index="0"><draw:image xlink:href="Pictures/1000020100000315000000C32AC18C0A07EBC8FB.png" xlink:type="simple" xlink:show="embed" xlink:actuate="onLoad" loext:mime-type="image/png"/></draw:frame><text:s/></text:p>
      <text:p text:style-name="P12">Al crearse la red “<text:span text:style-name="T22">redtest</text:span>” se nos devuelve un identificador. Usando los 12 primeros dígitos del identificador, podemos observar la red virtual en la máquina anfitriona llamada “<text:span text:style-name="T22">br-25e210d7ed67</text:span>”.</text:p>
      <text:p text:style-name="P12"/>
      <text:p text:style-name="P12">En este caso, hemos creado una red simple con los parámetros por defecto. Algunos de los parámetros configurables más interesantes son:</text:p>
      <text:list xml:id="list3044215703" text:style-name="WWNum1">
        <text:list-item>
          <text:p text:style-name="P29">“<text:span text:style-name="T22">--internal</text:span>”: para red interna. Restringe el acceso desde el exterior.</text:p>
        </text:list-item>
        <text:list-item>
          <text:p text:style-name="P36">“<text:span text:style-name="T22">--gateway</text:span>”: para indicar la puerta de enlace de la red.</text:p>
        </text:list-item>
        <text:list-item>
          <text:p text:style-name="P36">“<text:span text:style-name="T22">--ip-range</text:span>”: delimita el rango de IPs asignables al contenedor.</text:p>
        </text:list-item>
        <text:list-item>
          <text:p text:style-name="P36">“<text:span text:style-name="T22">--ipv6</text:span>”: habilita el uso de IPV6.</text:p>
        </text:list-item>
        <text:list-item>
          <text:p text:style-name="P36">“<text:span text:style-name="T22">--subnet</text:span>”: define la subred en formato CIDR.</text:p>
          <text:list>
            <text:list-item>
              <text:p text:style-name="P45"><text:a xlink:type="simple" xlink:href="https://es.wikipedia.org/wiki/Classless_Inter-Domain_Routing" text:style-name="ListLabel_20_64" text:visited-style-name="ListLabel_20_64"><text:span text:style-name="T26">https://es.wikipedia.org/wiki/Classless_Inter-Domain_Routing</text:span></text:a></text:p>
            </text:list-item>
          </text:list>
        </text:list-item>
      </text:list>
      <text:p text:style-name="P12">Para más información relacionada con el comando “<text:span text:style-name="T22">docker network create</text:span>” podéis consultar el siguiente enlace: <text:a xlink:type="simple" xlink:href="https://docs.docker.com/engine/reference/commandline/network_create/" text:style-name="ListLabel_20_64" text:visited-style-name="ListLabel_20_64"><text:span text:style-name="T26">https://docs.docker.com/engine/reference/commandline/network_create/</text:span></text:a></text:p>
      <text:list xml:id="list34055153367901" text:continue-list="list34055627581882" text:style-name="WWNum6">
        <text:list-item>
          <text:list>
            <text:list-item>
              <text:p text:style-name="P56"><text:bookmark text:name="_4njryo0l3av"/>Inspeccionar y eliminar redes</text:p>
            </text:list-item>
          </text:list>
        </text:list-item>
      </text:list>
      <text:p text:style-name="P12">Podemos observar las redes Docker de nuestro sistema con el comando:</text:p>
      <table:table table:name="Table4" table:style-name="Table4">
        <table:table-column table:style-name="Table4.A"/>
        <table:table-row table:style-name="Table4.1">
          <table:table-cell table:style-name="Table4.A1" office:value-type="string">
            <text:p text:style-name="P44"><text:span text:style-name="T24">docker network ls</text:span></text:p>
          </table:table-cell>
        </table:table-row>
      </table:table>
      <text:p text:style-name="Standard"><draw:frame draw:style-name="fr1" draw:name="image4.png" text:anchor-type="as-char" svg:width="4.7425in" svg:height="1.0516in" draw:z-index="0"><draw:image xlink:href="Pictures/100002010000024F00000083BD48D8C45C6E668D.png" xlink:type="simple" xlink:show="embed" xlink:actuate="onLoad" loext:mime-type="image/png"/></draw:frame></text:p>
      <text:p text:style-name="P12">También podemos obtener información de cada red usando</text:p>
      <table:table table:name="Table5" table:style-name="Table5">
        <table:table-column table:style-name="Table5.A"/>
        <table:table-row table:style-name="Table5.1">
          <table:table-cell table:style-name="Table5.A1" office:value-type="string">
            <text:p text:style-name="P44"><text:span text:style-name="T24">docker network inspect ID/NOMBRE-RED</text:span></text:p>
          </table:table-cell>
        </table:table-row>
      </table:table>
      <text:p text:style-name="Standard"><draw:frame draw:style-name="fr1" draw:name="image7.png" text:anchor-type="as-char" svg:width="6.6929in" svg:height="1.9307in" draw:z-index="0"><draw:image xlink:href="Pictures/100002010000037E000001017BEA5681E0485606.png" xlink:type="simple" xlink:show="embed" xlink:actuate="onLoad" loext:mime-type="image/png"/></draw:frame></text:p>
      <text:p text:style-name="P12">También podemos eliminar redes mediante el comando “<text:span text:style-name="T22">docker network rm</text:span>”. Si todo va bien, este comando nos mostrará el nombre de la red eliminada.</text:p>
      <table:table table:name="Table6" table:style-name="Table6">
        <table:table-column table:style-name="Table6.A"/>
        <table:table-row table:style-name="Table6.1">
          <table:table-cell table:style-name="Table6.A1" office:value-type="string">
            <text:p text:style-name="P27"><text:span text:style-name="T24">docker network rm ID/NOMBRE-RED</text:span></text:p>
          </table:table-cell>
        </table:table-row>
      </table:table>
      <text:p text:style-name="P12"><text:s/><draw:frame draw:style-name="fr1" draw:name="image3.png" text:anchor-type="as-char" svg:width="6.6929in" svg:height="0.7083in" draw:z-index="0"><draw:image xlink:href="Pictures/10000201000002A400000047A331F897218DC864.png" xlink:type="simple" xlink:show="embed" xlink:actuate="onLoad" loext:mime-type="image/png"/></draw:frame></text:p>
      <text:p text:style-name="P11"><text:span text:style-name="T13">❕</text:span><text:span text:style-name="T14"> </text:span><text:span text:style-name="T12">Atención: </text:span><text:s/>para poder eliminar una red, es imprescindible que ningún contenedor en ejecución esté conectado a dicha red.</text:p>
      <text:list xml:id="list34054125543888" text:continue-numbering="true" text:style-name="WWNum6">
        <text:list-item>
          <text:p text:style-name="P54"><text:bookmark text:name="_97ftdnh0fpp4"/>Asignando redes a contenedores</text:p>
          <text:list>
            <text:list-item>
              <text:p text:style-name="P57"><text:bookmark text:name="_c9hz7unwv0w"/>Asignar la red al crear un contenedor</text:p>
            </text:list-item>
          </text:list>
        </text:list-item>
      </text:list>
      <text:p text:style-name="P12">Cuando creamos un contenedor mediante los comandos “<text:span text:style-name="T22">docker run</text:span>” o “<text:span text:style-name="T22">docker create</text:span>”, podemos especificar de que red va a formar parte <text:span text:style-name="T29">(por defecto, si no se indica, forma parte de “bridge”).</text:span></text:p>
      <text:p text:style-name="P12">Por ejemplo para lanzar un contenedor conectado a la red “redtest” usamos el comando:</text:p>
      <table:table table:name="Table7" table:style-name="Table7">
        <table:table-column table:style-name="Table7.A"/>
        <table:table-row table:style-name="Table7.1">
          <table:table-cell table:style-name="Table7.A1" office:value-type="string">
            <text:p text:style-name="P44"><text:span text:style-name="T24">docker run -it --network redtest ubuntu /bin/bash</text:span></text:p>
          </table:table-cell>
        </table:table-row>
      </table:table>
      <text:p text:style-name="P12">Al conectar un contenedor a una red, mediante un DNS interno implementado por Docker se nos permite referenciar a un contenedor usando su nombre de contenedor como un “hostname”.</text:p>
      <text:p text:style-name="P12">Si a un contenedor con nombre “<text:span text:style-name="T22">miserver</text:span>” es parte de una red, si alguien intenta resolver el nombre con “<text:span text:style-name="T22">dig</text:span>”, “<text:span text:style-name="T22">ping</text:span>”, etc. “miserver” se corresponderá a la IP de dicho contenedor. </text:p>
      <text:p text:style-name="P12"/>
      <text:p text:style-name="P12">Vamos a ver un ejemplo concreto, donde crearemos dos contenedores y haremos ping sobre ellos.</text:p>
      <text:p text:style-name="P12">Creamos un contenedor “<text:span text:style-name="T22">prueba1</text:span>” en la red “<text:span text:style-name="T22">redtest</text:span>” con:</text:p>
      <table:table table:name="Table8" table:style-name="Table8">
        <table:table-column table:style-name="Table8.A"/>
        <table:table-row table:style-name="Table8.1">
          <table:table-cell table:style-name="Table8.A1" office:value-type="string">
            <text:p text:style-name="P27"><text:span text:style-name="T24">docker run -it --network redtest --name prueba1 alpine</text:span></text:p>
          </table:table-cell>
        </table:table-row>
      </table:table>
      <text:p text:style-name="P12">Tras ello, salimos con “<text:span text:style-name="T22">exit</text:span>”. Al salir, se parará el contenedor, así que para nuestra prueba, lo iniciamos de nuevo con el comando:</text:p>
      <table:table table:name="Table9" table:style-name="Table9">
        <table:table-column table:style-name="Table9.A"/>
        <table:table-row table:style-name="Table9.1">
          <table:table-cell table:style-name="Table9.A1" office:value-type="string">
            <text:p text:style-name="P27"><text:span text:style-name="T24">docker start prueba1</text:span></text:p>
          </table:table-cell>
        </table:table-row>
      </table:table>
      <text:p text:style-name="P12"><text:soft-page-break/>tras ello lanzamos el segundo contenedor “prueba2” con el comando:</text:p>
      <table:table table:name="Table10" table:style-name="Table10">
        <table:table-column table:style-name="Table10.A"/>
        <table:table-row table:style-name="Table10.1">
          <table:table-cell table:style-name="Table10.A1" office:value-type="string">
            <text:p text:style-name="P27"><text:span text:style-name="T24">docker run -it --network redtest --name prueba2 alpine</text:span></text:p>
          </table:table-cell>
        </table:table-row>
      </table:table>
      <text:p text:style-name="P12">Ya dentro del contenedor “<text:span text:style-name="T22">prueba2</text:span>”, lanzamos el comando “<text:span text:style-name="T22">ping</text:span>” para comprobar que el contenedor “<text:span text:style-name="T22">prueba1</text:span>” es accesible desde la máquina “<text:span text:style-name="T22">prueba2</text:span>”:</text:p>
      <table:table table:name="Table11" table:style-name="Table11">
        <table:table-column table:style-name="Table11.A"/>
        <table:table-row table:style-name="Table11.1">
          <table:table-cell table:style-name="Table11.A1" office:value-type="string">
            <text:p text:style-name="P44"><text:span text:style-name="T24">ping prueba1</text:span></text:p>
          </table:table-cell>
        </table:table-row>
      </table:table>
      <text:p text:style-name="P12">Otro parámetro interesante relacionado con las redes que aplica a “docker run” es el parámetro “<text:span text:style-name="T22">--network-alias</text:span>”. Este parámetro permite asignar un alias al contenedor en la red, de forma que al resolver ese alias asignado, se resuelva la IP.</text:p>
      <text:p text:style-name="P12">Un ejemplo de uso:</text:p>
      <table:table table:name="Table12" table:style-name="Table12">
        <table:table-column table:style-name="Table12.A"/>
        <table:table-row table:style-name="Table12.1">
          <table:table-cell table:style-name="Table12.A1" office:value-type="string">
            <text:p text:style-name="P27"><text:span text:style-name="T25">docker run -it --network redtest --network-alias miservidor --name prueba3 alpine</text:span></text:p>
          </table:table-cell>
        </table:table-row>
      </table:table>
      <text:p text:style-name="P12"/>
      <text:p text:style-name="P12">En este ejemplo, vemos cómo se asigna el alias “<text:span text:style-name="T22">miservidor</text:span>”, por lo cual, si se intenta resolver el host “<text:span text:style-name="T22">miservidor</text:span>”, obtendremos la IP de este contenedor.</text:p>
      <text:list xml:id="list34054633808785" text:continue-numbering="true" text:style-name="WWNum6">
        <text:list-item>
          <text:list>
            <text:list-item>
              <text:p text:style-name="P56"><text:bookmark text:name="_1sqt15nohdqs"/>Conectar y desconectar un contenedor de una red</text:p>
            </text:list-item>
          </text:list>
        </text:list-item>
      </text:list>
      <text:p text:style-name="P12">Mediante el comando “<text:span text:style-name="T22">docker network connect/disconnect</text:span>” podemos conectar o desconectar un contenedor de una red. <text:s/>Un contenedor puede estar conectado a más de una red.</text:p>
      <text:p text:style-name="P12">Por ejemplo con el comando: </text:p>
      <table:table table:name="Table13" table:style-name="Table13">
        <table:table-column table:style-name="Table13.A"/>
        <table:table-row table:style-name="Table13.1">
          <table:table-cell table:style-name="Table13.A1" office:value-type="string">
            <text:p text:style-name="P44"><text:span text:style-name="T24">docker network connect IDRED IDCONTENEDOR</text:span></text:p>
          </table:table-cell>
        </table:table-row>
      </table:table>
      <text:p text:style-name="P12">Conectaremos el contenedor a una red existente. A continuación comentamos algunas opciones interesantes de “<text:span text:style-name="T22">docker network connect</text:span>”:</text:p>
      <text:list xml:id="list3302728324" text:style-name="WWNum2">
        <text:list-item>
          <text:p text:style-name="P30">De forma similar a la comentada en el punto anterior, podemos establecer un alias en la red de este contenedor con el parámetro “<text:span text:style-name="T22">--alias</text:span>”. Esto permitirá que al resolver el nombre DNS del alias, indique la IP del contenedor. </text:p>
        </text:list-item>
        <text:list-item>
          <text:p text:style-name="P41">En el ejemplo planteado, <text:s/>al contenedor se le asignará una IP entre las disponibles en el rango de la red. <text:s/>Si se quiere intentar a que se le asigne una IP fija, se puede usar la opción “<text:span text:style-name="T22">--ip</text:span>” para una IPV4 o “<text:span text:style-name="T22">--ip6</text:span>” para una IPV6.</text:p>
        </text:list-item>
      </text:list>
      <text:p text:style-name="P12">Para desconectar, podemos usar simplemente la opción “<text:span text:style-name="T22">disconnect</text:span>”, como vemos aquí:</text:p>
      <table:table table:name="Table14" table:style-name="Table14">
        <table:table-column table:style-name="Table14.A"/>
        <table:table-row table:style-name="Table14.1">
          <table:table-cell table:style-name="Table14.A1" office:value-type="string">
            <text:p text:style-name="P27"><text:span text:style-name="T24">docker network disconnect IDRED IDCONTENEDOR</text:span></text:p>
          </table:table-cell>
        </table:table-row>
      </table:table>
      <text:p text:style-name="P12">Para más información relacionada con el comando “<text:span text:style-name="T22">docker network connect</text:span>” podéis consultar el siguiente enlace: <text:a xlink:type="simple" xlink:href="https://docs.docker.com/engine/reference/commandline/network_connect/" text:style-name="ListLabel_20_64" text:visited-style-name="ListLabel_20_64"><text:span text:style-name="T26">https://docs.docker.com/engine/reference/commandline/network_connect/</text:span></text:a> </text:p>
      <text:list xml:id="list34053995881903" text:continue-list="list34054633808785" text:style-name="WWNum6">
        <text:list-item>
          <text:p text:style-name="P53"><text:bookmark text:name="_6lyvzg2kpq1f"/>Persistencia de datos en Docker</text:p>
        </text:list-item>
      </text:list>
      <text:p text:style-name="P12">En este apartado veremos cómo gestionar la persistencia de datos en Docker usando distintos tipos de herramientas, conociendo sus casos de uso más típicos. También hablaremos de estrategias no orientadas a la persistencia como “<text:span text:style-name="T22">tmpfs</text:span>”.</text:p>
      <text:list xml:id="list34054785607168" text:continue-numbering="true" text:style-name="WWNum6">
        <text:list-item>
          <text:list>
            <text:list-item>
              <text:p text:style-name="P56"><text:bookmark text:name="_ht3tmouzfilx"/>¿Cuáles son las principales herramientas de persistencia en Docker?</text:p>
            </text:list-item>
          </text:list>
        </text:list-item>
      </text:list>
      <text:p text:style-name="P12">Los principales métodos de persistencia en Docker son “<text:span text:style-name="T22">binding mount</text:span>”, volúmenes y “<text:span text:style-name="T22">tmpfs</text:span>”.</text:p>
      <text:list xml:id="list1829270635" text:style-name="WWNum8">
        <text:list-item>
          <text:p text:style-name="P31">“<text:span text:style-name="T22">Binding mount</text:span>”: básicamente este tipo de persistencia consiste en “montar” un fichero o directorio de la máquina anfitrión en un fichero o directorio del contenedor. Este montaje se hace en el momento de crear el contenedor.</text:p>
          <text:list>
            <text:list-item>
              <text:p text:style-name="P47">El fichero o directorio se indica en ambos casos con una <text:span text:style-name="T29">ruta absoluta,</text:span> no tiene por qué existir en el contenedor (si no existe, se creará).</text:p>
            </text:list-item>
            <text:list-item>
              <text:p text:style-name="P47">El rendimiento de este tipo de persistencia, a efectos prácticos, depende del sistema de ficheros y de las características del hardware de la máquina real. Una buena configuración según las necesidades del contenedor influirá en el rendimiento.</text:p>
            </text:list-item>
            <text:list-item>
              <text:p text:style-name="P47">Estos volúmenes pueden ser usados por<text:span text:style-name="T29"> varios contenedores simultáneamente</text:span>.</text:p>
            </text:list-item>
            <text:list-item>
              <text:p text:style-name="P47">En sistemas Linux no suele haber diferencias de rendimiento respecto a volúmenes, pero en sistemas Windows y Mac el rendimiento es peor.</text:p>
            </text:list-item>
          </text:list>
        </text:list-item>
        <text:list-item>
          <text:p text:style-name="P37"><text:span text:style-name="T22">Volúmenes Docker</text:span>: similar al “<text:span text:style-name="T22">binding mount</text:span>”, solo que no especificamos en qué lugar está el directorio a montar en la máquina anfitrión, sino que solo damos un nombre del volumen para identificarlo. Esto nos proporciona algunas ventajas respecto al anterior:</text:p>
          <text:list>
            <text:list-item>
              <text:p text:style-name="P47">Nos permite abstraernos de “donde” está realmente el volumen. Esta abstracción no es únicamente a nivel de directorio de la máquina anfitrión, sino incluso pudiendo estar el volumen en servidores remotos.</text:p>
            </text:list-item>
            <text:list-item>
              <text:p text:style-name="P47">Obtienen mejor rendimiento que “<text:span text:style-name="T22">binding mount</text:span>” en sistemas Windows y Mac.</text:p>
            </text:list-item>
          </text:list>
        </text:list-item>
        <text:list-item>
          <text:p text:style-name="P37">“<text:span text:style-name="T22">Tmpfs</text:span>”: este tipo de volumen utiliza el sistema de ficheros <text:a xlink:type="simple" xlink:href="https://es.wikipedia.org/wiki/Tmpfs" text:style-name="ListLabel_20_64" text:visited-style-name="ListLabel_20_64"><text:span text:style-name="T26">https://es.wikipedia.org/wiki/Tmpfs</text:span></text:a> el cual se aloja en memoria y no en el disco, por lo cual <text:span text:style-name="T22">no tiene persistencia</text:span>. A cambio, aumentaremos el rendimiento de entrada y salida. </text:p>
          <text:list>
            <text:list-item>
              <text:p text:style-name="P47">Tiene algunas limitaciones:</text:p>
              <text:list>
                <text:list-item>
                  <text:p text:style-name="P49">Solo funciona en sistemas Linux.</text:p>
                </text:list-item>
                <text:list-item>
                  <text:p text:style-name="P50">No permite compartir el volumen entre contenedores.</text:p>
                </text:list-item>
              </text:list>
            </text:list-item>
          </text:list>
        </text:list-item>
      </text:list>
      <text:p text:style-name="P12">Para entender mejor estas definiciones, vamos a observar y comentar esta imagen que ilustra su funcionamiento:</text:p>
      <text:p text:style-name="P13"><draw:frame draw:style-name="fr1" draw:name="image6.png" text:anchor-type="as-char" svg:width="5.2291in" svg:height="2.6665in" draw:z-index="0"><draw:image xlink:href="Pictures/10000201000001F60000010074B68961F2507E7B.png" xlink:type="simple" xlink:show="embed" xlink:actuate="onLoad" loext:mime-type="image/png"/></draw:frame></text:p>
      <text:p text:style-name="P13"><text:span text:style-name="T30">Fuente imagen: </text:span><text:a xlink:type="simple" xlink:href="https://github.com/docker/docker.github.io/blob/master/storage/images/types-of-mounts-bind.png" text:style-name="ListLabel_20_65" text:visited-style-name="ListLabel_20_65"><text:span text:style-name="T27">https://github.com/docker/docker.github.io/blob/master/storage/images/types-of-mounts-bind.png</text:span></text:a><text:span text:style-name="T30"> <text:s/></text:span></text:p>
      <text:list xml:id="list223349095" text:style-name="WWNum7">
        <text:list-item>
          <text:p text:style-name="P32">Observamos que “<text:span text:style-name="T22">Binding mount</text:span>” y volumen, apuntan al sistema de ficheros. La principal diferencia es que “<text:span text:style-name="T22">Binding mount”</text:span> puede ir a cualquier parte del sistema y volumen apunta a un área concreta de Docker (donde se almacenan los volúmenes).</text:p>
        </text:list-item>
        <text:list-item>
          <text:p text:style-name="P42">En el caso de “<text:span text:style-name="T22">tmpfs</text:span>”, vemos que va directamente a la memoria del sistema.</text:p>
        </text:list-item>
      </text:list>
      <text:p text:style-name="P12"/>
      <text:p text:style-name="P11"><text:span text:style-name="T11"><text:s/>💬</text:span> <text:span text:style-name="T12">Interesante:</text:span> al igual que con el comando “mount” de sistemas Linux, si montamos un volumen en un directorio existente, lo que hará es “solapar” el contenido de ese directorio con el volumen montado. Esto puede ser útil, para por ejemplo, probar una nueva versión de una aplicación en un contenedor sin tener que rehacer la imagen.</text:p>
      <text:p text:style-name="P12"/>
      <text:list xml:id="list34053736495380" text:continue-list="list34054785607168" text:style-name="WWNum6">
        <text:list-item>
          <text:list>
            <text:list-item>
              <text:p text:style-name="P56"><text:bookmark text:name="_n3c7fsh9v8ni"/>Utilizando “Binding mount”</text:p>
            </text:list-item>
          </text:list>
        </text:list-item>
      </text:list>
      <text:p text:style-name="P12">Este tipo de persistencia (al igual que el resto) es montada en el momento de crear el contenedor. Como veremos a la hora de montar todo tipo de contenedores, podemos usar dos parámetros distintos: “<text:span text:style-name="T12">-v</text:span>” que es más simple y “<text:span text:style-name="T12">--mount</text:span>” que es más explícito. Al utilizar estos comandos, debemos utilizar <text:span text:style-name="T29">rutas absolutas.</text:span></text:p>
      <table:table table:name="Table15" table:style-name="Table15">
        <table:table-column table:style-name="Table15.A"/>
        <table:table-row table:style-name="Table15.1">
          <table:table-cell table:style-name="Table15.A1" office:value-type="string">
            <text:p text:style-name="P44"><text:span text:style-name="T25">docker run -d -it --name appcontainer <text:s text:c="2"/>-v /home//target:/app nginx:latest</text:span></text:p>
          </table:table-cell>
        </table:table-row>
      </table:table>
      <text:p text:style-name="P12">o</text:p>
      <table:table table:name="Table16" table:style-name="Table16">
        <table:table-column table:style-name="Table16.A"/>
        <table:table-row table:style-name="Table16.1">
          <table:table-cell table:style-name="Table16.A1" office:value-type="string">
            <text:p text:style-name="P44"><text:span text:style-name="T24">docker run -d -it --name appcontainer --mount </text:span><text:span text:style-name="T31">type</text:span><text:span text:style-name="T24">=</text:span><text:span text:style-name="T31">bind</text:span><text:span text:style-name="T24">,</text:span><text:span text:style-name="T31">source</text:span><text:span text:style-name="T24">=/home/alumno/target,target=/app nginx:latest</text:span></text:p>
          </table:table-cell>
        </table:table-row>
      </table:table>
      <text:p text:style-name="P12"/>
      <text:p text:style-name="P12">En ambos casos, este comando crea un contenedor llamado “<text:span text:style-name="T22">appcontainer</text:span>” donde la ruta del anfitrión “<text:span text:style-name="T22">/home/alumno/target</text:span>” se montará en el contenedor en “<text:span text:style-name="T22">/app</text:span>”.</text:p>
      <text:p text:style-name="P12"/>
      <text:p text:style-name="P12">Más información en: <text:a xlink:type="simple" xlink:href="https://docs.docker.com/storage/bind-mounts/" text:style-name="ListLabel_20_64" text:visited-style-name="ListLabel_20_64"><text:span text:style-name="T26">https://docs.docker.com/storage/bind-mounts/</text:span></text:a></text:p>
      <text:p text:style-name="P12"/>
      <text:list xml:id="list34055109912031" text:continue-numbering="true" text:style-name="WWNum6">
        <text:list-item>
          <text:list>
            <text:list-item>
              <text:p text:style-name="P56"><text:bookmark text:name="_m13keevf8n2j"/>Creando volúmenes Docker</text:p>
            </text:list-item>
          </text:list>
        </text:list-item>
      </text:list>
      <text:p text:style-name="P12"><text:soft-page-break/>En estos apartados comentamos las principales acciones con volúmenes Docker. No obstante, si quieres saber más puedes consultar <text:a xlink:type="simple" xlink:href="https://docs.docker.com/storage/volumes/" text:style-name="ListLabel_20_64" text:visited-style-name="ListLabel_20_64"><text:span text:style-name="T26">https://docs.docker.com/storage/volumes/</text:span></text:a>.</text:p>
      <text:list xml:id="list34055451820429" text:continue-numbering="true" text:style-name="WWNum6">
        <text:list-item>
          <text:list>
            <text:list-item>
              <text:list>
                <text:list-item>
                  <text:p text:style-name="P51"><text:bookmark text:name="_k94wv05w33x6"/>Creando volumen al crear contenedor</text:p>
                </text:list-item>
              </text:list>
            </text:list-item>
          </text:list>
        </text:list-item>
      </text:list>
      <text:p text:style-name="P12">De manera similar a “<text:span text:style-name="T22">binding mount</text:span>”, es posible crear volúmenes Docker usando “<text:span text:style-name="T22">-v</text:span>” o “<text:span text:style-name="T22">--mount</text:span>”. Aquí vemos un ejemplo:</text:p>
      <text:p text:style-name="P14"/>
      <table:table table:name="Table17" table:style-name="Table17">
        <table:table-column table:style-name="Table17.A"/>
        <table:table-row table:style-name="Table17.1">
          <table:table-cell table:style-name="Table17.A1" office:value-type="string">
            <text:p text:style-name="P27"><text:span text:style-name="T24">docker run -d -it --name appcontainer <text:s text:c="2"/>-v mivolumen:/app nginx:latest</text:span></text:p>
          </table:table-cell>
        </table:table-row>
      </table:table>
      <text:p text:style-name="P12">o</text:p>
      <table:table table:name="Table18" table:style-name="Table18">
        <table:table-column table:style-name="Table18.A"/>
        <table:table-row table:style-name="Table18.1">
          <table:table-cell table:style-name="Table18.A1" office:value-type="string">
            <text:p text:style-name="P27"><text:span text:style-name="T24">docker run -d -it --name appcontainer --mount </text:span><text:span text:style-name="T31">source</text:span><text:span text:style-name="T24">=mivolumen,target=/app nginx:latest</text:span></text:p>
          </table:table-cell>
        </table:table-row>
      </table:table>
      <text:p text:style-name="P12">En este ejemplo, se ha montado el volumen gestionado por Docker “<text:span text:style-name="T22">mivolumen</text:span>” en el directorio “<text:span text:style-name="T22">/app</text:span>” del contenedor. Si el volumen “<text:span text:style-name="T22">mivolumen</text:span>” no existía previamente, lo crea.</text:p>
      <text:list xml:id="list34053750153170" text:continue-numbering="true" text:style-name="WWNum6">
        <text:list-item>
          <text:list>
            <text:list-item>
              <text:list>
                <text:list-item>
                  <text:p text:style-name="P51"><text:bookmark text:name="_fqmqwemxmsb5"/>Gestionando volúmenes</text:p>
                </text:list-item>
              </text:list>
            </text:list-item>
          </text:list>
        </text:list-item>
      </text:list>
      <text:p text:style-name="P12">Este tipo de volúmenes, pueden crearse de forma separada, sin crear un contenedor asociado al mismo. Esto lo podemos hacer con el comando “<text:span text:style-name="T22">docker volume</text:span>”:</text:p>
      <text:list xml:id="list556067382" text:style-name="WWNum5">
        <text:list-item>
          <text:p text:style-name="P33">Con “<text:span text:style-name="T22">docker volume create mivolumen</text:span>” podemos crear el volumen vacío.</text:p>
        </text:list-item>
        <text:list-item>
          <text:p text:style-name="P38">Con “<text:span text:style-name="T22">docker volume ls</text:span>” podemos observar los volúmenes existentes.</text:p>
        </text:list-item>
        <text:list-item>
          <text:p text:style-name="P43">Con “<text:span text:style-name="T22">docker volume rm mivolumen</text:span>” puedes borrar un volumen, siempre que todo contenedor que lo utilice esté parado.</text:p>
        </text:list-item>
      </text:list>
      <text:p text:style-name="P12"/>
      <text:list xml:id="list34054958560648" text:continue-list="list34053750153170" text:style-name="WWNum6">
        <text:list-item>
          <text:list>
            <text:list-item>
              <text:list>
                <text:list-item>
                  <text:p text:style-name="P51"><text:bookmark text:name="_idgy9bqniqqo"/>Poblando volúmenes</text:p>
                </text:list-item>
              </text:list>
            </text:list-item>
          </text:list>
        </text:list-item>
      </text:list>
      <text:p text:style-name="P12">Si creamos un volumen directamente al lanzar un contenedor (no aplicable al caso de un contenedor vacío, pero creado previamente) y lo asociamos a un directorio que no está vacío, el contenido de ese directorio se copiará al volúmen. Por ejemplo, si lanzamos</text:p>
      <table:table table:name="Table19" table:style-name="Table19">
        <table:table-column table:style-name="Table19.A"/>
        <table:table-row table:style-name="Table19.1">
          <table:table-cell table:style-name="Table19.A1" office:value-type="string">
            <text:p text:style-name="P44"><text:span text:style-name="T24">docker run -d -it --name appcontainer <text:s/>--mount </text:span><text:span text:style-name="T31">source</text:span><text:span text:style-name="T24">=mivolumen,target=/app nginx:latest</text:span></text:p>
          </table:table-cell>
        </table:table-row>
      </table:table>
      <text:p text:style-name="P12">Si el directorio “<text:span text:style-name="T22">/app</text:span>” tenía información, esta se copiará al volumen “<text:span text:style-name="T22">mivolumen</text:span>”.</text:p>
      <text:p text:style-name="P12"/>
      <text:list xml:id="list34055238662457" text:continue-numbering="true" text:style-name="WWNum6">
        <text:list-item>
          <text:list>
            <text:list-item>
              <text:p text:style-name="P56"><text:bookmark text:name="_v538eauoj9d7"/>Creando volúmenes “tmpfs”</text:p>
            </text:list-item>
          </text:list>
        </text:list-item>
      </text:list>
      <text:p text:style-name="P12">Como hemos comentado antes, los volúmenes “tmpfs” no tiene persistencia (se alojan en memoria) y tienen algunas limitaciones (solo pueden ser usados en sistemas Linux y no pueden ser compartidos entre contenedores). Para crear un volumen de este tipo podemos usar dos parámetros distintos: “<text:span text:style-name="T12">--tmpfs</text:span>” que es más simple y “<text:span text:style-name="T12">--mount</text:span>” que es más explícito. </text:p>
      <text:p text:style-name="P12">Al utilizar estos comandos, debemos usar <text:span text:style-name="T29">rutas absolutas.</text:span></text:p>
      <table:table table:name="Table20" table:style-name="Table20">
        <table:table-column table:style-name="Table20.A"/>
        <table:table-row table:style-name="Table20.1">
          <table:table-cell table:style-name="Table20.A1" office:value-type="string">
            <text:p text:style-name="P44"><text:span text:style-name="T24">docker run -d <text:s/>-it --tmpfs /app nginx</text:span></text:p>
          </table:table-cell>
        </table:table-row>
      </table:table>
      <text:p text:style-name="P12">o</text:p>
      <table:table table:name="Table21" table:style-name="Table21">
        <table:table-column table:style-name="Table21.A"/>
        <table:table-row table:style-name="Table21.1">
          <table:table-cell table:style-name="Table21.A1" office:value-type="string">
            <text:p text:style-name="P44"><text:span text:style-name="T24">docker run -d -it --mount </text:span><text:span text:style-name="T31">type</text:span><text:span text:style-name="T24">=tmpfs,destination=/app nginx</text:span></text:p>
          </table:table-cell>
        </table:table-row>
      </table:table>
      <text:p text:style-name="P12">Este tipo de contenedores son útiles para:</text:p>
      <text:list xml:id="list1574522093" text:style-name="WWNum4">
        <text:list-item>
          <text:p text:style-name="P34">Almacenar ficheros que por algún motivo no quieres que se guarden ni en el contenedor ni en otros volúmenes (por ejemplo, datos sensibles).</text:p>
        </text:list-item>
        <text:list-item>
          <text:p text:style-name="P39">Al operar en memoria, puede ser útil utilizar este tipo de ficheros para acelerar operaciones de lectura/escritura. Por ejemplo, podemos almacenar unos juegos de prueba que vayan a ser leídos muchas veces, copiar contenido de una página a servir, etc.</text:p>
          <text:list>
            <text:list-item>
              <text:p text:style-name="P46">Esto también puede hacerse usando “<text:span text:style-name="T12">binding mounts</text:span>” y una correcta configuración del sistema de ficheros en el anfitrión, usando el mismo “<text:span text:style-name="T22">tmpfs</text:span>” o “<text:span text:style-name="T22">ramfs</text:span>”. Más información <text:a xlink:type="simple" xlink:href="https://www.jamescoyle.net/how-to/943-create-a-ram-disk-in-linux" text:style-name="ListLabel_20_64" text:visited-style-name="ListLabel_20_64"><text:span text:style-name="T26">https://www.jamescoyle.net/how-to/943-create-a-ram-disk-in-linux</text:span></text:a></text:p>
            </text:list-item>
          </text:list>
        </text:list-item>
      </text:list>
      <text:p text:style-name="P12">Para más información sobre “<text:span text:style-name="T22">tmpfs</text:span>” <text:a xlink:type="simple" xlink:href="https://docs.docker.com/storage/tmpfs/" text:style-name="ListLabel_20_64" text:visited-style-name="ListLabel_20_64"><text:span text:style-name="T26">https://docs.docker.com/storage/tmpfs/</text:span></text:a></text:p>
      <text:p text:style-name="P12"/>
      <text:list xml:id="list34055180525133" text:continue-list="list34055238662457" text:style-name="WWNum6">
        <text:list-item>
          <text:list>
            <text:list-item>
              <text:p text:style-name="P56"><text:bookmark text:name="_gxfh351io8sp"/>Copia de seguridad de un Volumen</text:p>
            </text:list-item>
          </text:list>
        </text:list-item>
      </text:list>
      <text:p text:style-name="P12">Realizar una copia de seguridad de volúmenes Docker, es tan sencillo como realizar una copia de seguridad en el sistema anfitrión en los directorios pertinentes (o implementar en el sistema de ficheros elementos tales como “discos espejo”, etc.).</text:p>
      <text:p text:style-name="P12">Aun así, si se desea realizar una copia de seguridad, por ejemplo, en un fichero “<text:span text:style-name="T22">.tar</text:span>” es posible realizarlo mediante comandos. Supongamos tengamos un “<text:span text:style-name="T22">contenedor1</text:span>”, que utiliza el volumen “<text:span text:style-name="T22">misdatos</text:span>” montados en “<text:span text:style-name="T22">/datos</text:span>”. Para realizar la copia de seguridad, seguiremos estos pasos:</text:p>
      <text:p text:style-name="P12">En primer lugar, pararemos el contenedor.</text:p>
      <table:table table:name="Table22" table:style-name="Table22">
        <table:table-column table:style-name="Table22.A"/>
        <table:table-row table:style-name="Table22.1">
          <table:table-cell table:style-name="Table22.A1" office:value-type="string">
            <text:p text:style-name="P44"><text:span text:style-name="T24">docker stop contenedor1</text:span></text:p>
          </table:table-cell>
        </table:table-row>
      </table:table>
      <text:p text:style-name="P12">y tras ello, lanzando la siguiente orden:</text:p>
      <table:table table:name="Table23" table:style-name="Table23">
        <table:table-column table:style-name="Table23.A"/>
        <table:table-row table:style-name="Table23.1">
          <table:table-cell table:style-name="Table23.A1" office:value-type="string">
            <text:p text:style-name="P44"><text:span text:style-name="T24">docker run --rm --volumes-from contenedor1 -v /home/alumno/backup:/backup ubuntu bash -c </text:span><text:span text:style-name="T32">"cd /datos &amp;&amp; tar cvf /backup/copiaseguridad.tar ."</text:span></text:p>
          </table:table-cell>
        </table:table-row>
      </table:table>
      <text:p text:style-name="P12">Este comando, lanza un contenedor temporal (se borra al acabar con “<text:span text:style-name="T22">--rm</text:span>”), que monta los contenedores existentes en “<text:span text:style-name="T22">contenedor1</text:span>” (usando “<text:span text:style-name="T22">--volumes-from</text:span>”) y realiza un “<text:span text:style-name="T22">binding mount</text:span>” del directorio del anfitrión “<text:span text:style-name="T22">/home/alumno/backup</text:span>” con el directorio “<text:span text:style-name="T22">/backup</text:span>” del contenedor. Tras ello, entra en la carpeta “<text:span text:style-name="T22">/datos</text:span>” (donde se monta el volumen) y guarda todo el contenido empaquetado en un fichero “<text:span text:style-name="T22">.tar</text:span>” en “<text:span text:style-name="T22">/backup</text:span>”. Al acabar la ejecución, como “<text:span text:style-name="T22">/backup</text:span>” está montada en “<text:span text:style-name="T22">/home/alumno/backup</text:span>”, ahí tendremos disponible la copia de seguridad.</text:p>
      <text:p text:style-name="P12"/>
      <text:list xml:id="list34054364492809" text:continue-numbering="true" text:style-name="WWNum6">
        <text:list-item>
          <text:list>
            <text:list-item>
              <text:p text:style-name="P56"><text:bookmark text:name="_e0erkkd0ksst"/>Plugins para volúmenes en Docker</text:p>
            </text:list-item>
          </text:list>
        </text:list-item>
      </text:list>
      <text:p text:style-name="P12">La funcionalidad de Docker puede extenderse mediante el uso de plugins. Entre ellos existe una gran multitud de plugins para ampliar los tipos de volúmenes soportados. <text:s/>Como curiosidad, decir que los plugins son distribuidos como imágenes en Docker Hub. Una forma de buscar plugins alojados en Docker Hub es mediante <text:a xlink:type="simple" xlink:href="https://hub.docker.com/search?q=&amp;type=plugin" text:style-name="ListLabel_20_64" text:visited-style-name="ListLabel_20_64"><text:span text:style-name="T26">https://hub.docker.com/search?q=&amp;type=plugin</text:span></text:a></text:p>
      <text:p text:style-name="P12"/>
      <text:p text:style-name="P12">Aquí <text:a xlink:type="simple" xlink:href="https://docs.docker.com/engine/extend/" text:style-name="ListLabel_20_64" text:visited-style-name="ListLabel_20_64"><text:span text:style-name="T26">https://docs.docker.com/engine/extend/</text:span></text:a> se muestra como ejemplo de uso, la instalación y configuración del plugin “<text:span text:style-name="T22">sshfs</text:span>” plugin, alojado en <text:a xlink:type="simple" xlink:href="https://hub.docker.com/r/vieux/sshfs" text:style-name="ListLabel_20_64" text:visited-style-name="ListLabel_20_64"><text:span text:style-name="T26">https://hub.docker.com/r/vieux/sshfs</text:span></text:a>.</text:p>
      <text:p text:style-name="P12"/>
      <text:p text:style-name="P12"/>
      <text:p text:style-name="P12"/>
      <text:p text:style-name="P12"/>
      <text:list xml:id="list34054237594666" text:continue-numbering="true" text:style-name="WWNum6">
        <text:list-item>
          <text:p text:style-name="P55"><text:bookmark text:name="_g1qlmy5ta6mu"/>Bibliografía</text:p>
        </text:list-item>
      </text:list>
      <text:p text:style-name="P9">[1] Docker Docs <text:a xlink:type="simple" xlink:href="https://docs.docker.com/" text:style-name="ListLabel_20_64" text:visited-style-name="ListLabel_20_64"><text:span text:style-name="T26">https://docs.docker.com/</text:span></text:a></text:p>
      <text:p text:style-name="P9">[2] Understanding Docker Volumes </text:p>
      <text:p text:style-name="P9"><text:a xlink:type="simple" xlink:href="https://medium.com/bb-tutorials-and-thoughts/understanding-docker-volumes-with-an-example-d898cb5e40d7" text:style-name="ListLabel_20_64" text:visited-style-name="ListLabel_20_64"><text:span text:style-name="T26">https://medium.com/bb-tutorials-and-thoughts/understanding-docker-volumes-with-an-example-d898cb5e40d7</text:span></text:a></text:p>
      <text:p text:style-name="P9">[3] Docker Volumes: how to understand and get started</text:p>
      <text:p text:style-name="P9"><text:s/><text:a xlink:type="simple" xlink:href="https://phoenixnap.com/kb/docker-volumes" text:style-name="ListLabel_20_64" text:visited-style-name="ListLabel_20_64"><text:span text:style-name="T26">https://phoenixnap.com/kb/docker-volumes</text:span></text:a></text:p>
      <text:list xml:id="list34055806118905" text:continue-numbering="true" text:style-name="WWNum6">
        <text:list-item>
          <text:p text:style-name="P52"><text:bookmark text:name="_7p54dmtq0xai"/><text:soft-page-break/>Licencias de elementos externos utilizados</text:p>
        </text:list-item>
      </text:list>
      <text:p text:style-name="P12">Figura 1: Imagen con licencia Apache 2.0. Fuente:</text:p>
      <text:p text:style-name="P12"><text:a xlink:type="simple" xlink:href="https://github.com/docker/docker.github.io/blob/master/storage/images/types-of-mounts-bind.png" text:style-name="ListLabel_20_66" text:visited-style-name="ListLabel_20_66"><text:span text:style-name="T28">https://github.com/docker/docker.github.io/blob/master/storage/images/types-of-mounts-bind.png</text:span></text:a></text:p>
      <text:p text:style-name="P12"><text:s/></text:p>
      <text:p text:style-name="P12"/>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text-properties fo:color="#1155cc" fo:font-size="8pt" fo:font-style="italic" style:text-underline-style="solid" style:text-underline-width="auto" style:text-underline-color="font-color" style:font-size-asian="8pt" style:font-style-asian="italic" style:font-size-complex="8pt" style:font-style-complex="italic"/>
    </style:style>
    <style:style style:name="ListLabel_20_66" style:display-name="ListLabel 66"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Redes y volúmenes en Docker</text:span></text:p>
      </style:header>
      <style:footer>
        <text:p text:style-name="MP4"><text:span text:style-name="MT1">Curso Introducción a Docker<text:tab/><text:tab/>UD05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0" meta:object-count="0" meta:page-count="5" meta:paragraph-count="185" meta:word-count="2530" meta:character-count="16659" meta:non-whitespace-character-count="14316"/>
    <meta:generator>LibreOfficeDev/6.0.5.2$Linux_X86_64 LibreOffice_project/</meta:generator>
  </office:meta>
</office:document-meta>
</file>