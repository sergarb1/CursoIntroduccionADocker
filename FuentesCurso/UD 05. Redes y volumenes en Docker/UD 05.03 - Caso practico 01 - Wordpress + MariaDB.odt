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70000012F733864FDB0B1AF8C.png" manifest:media-type="image/png"/>
  <manifest:file-entry manifest:full-path="Pictures/10000000000002A5000002169E94DC35BCCDDA27.png" manifest:media-type="image/png"/>
  <manifest:file-entry manifest:full-path="Pictures/100002010000059D0000022F6A6A2E16D1A406EF.png" manifest:media-type="image/png"/>
  <manifest:file-entry manifest:full-path="Pictures/100002010000007600000029ABF5F7A91F7A9EF9.png" manifest:media-type="image/png"/>
  <manifest:file-entry manifest:full-path="Pictures/10000000000007800000008BADE10FA77D575FB0.png" manifest:media-type="image/png"/>
  <manifest:file-entry manifest:full-path="Pictures/100002010000002F00000006DBF21BC2612169B1.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font-weight-complex="bold"/>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text-align="center" style:justify-single-word="false" fo:break-before="auto" fo:break-after="auto"/>
    </style:style>
    <style:style style:name="P1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5" style:family="paragraph" style:parent-style-name="Standard">
      <style:paragraph-properties fo:margin-top="0in" fo:margin-bottom="0in" loext:contextual-spacing="false" fo:line-height="100%" fo:text-align="end" style:justify-single-word="false" fo:break-before="auto" fo:break-after="auto"/>
    </style:style>
    <style:style style:name="P1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9"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2"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3"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24"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25"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26" style:family="paragraph" style:parent-style-name="Heading_20_1" style:list-style-name="WWNum1">
      <style:paragraph-properties fo:break-before="auto" fo:break-after="auto"/>
    </style:style>
    <style:style style:name="P27" style:family="paragraph" style:parent-style-name="Heading_20_1" style:list-style-name="WWNum1">
      <style:paragraph-properties fo:text-align="justify" style:justify-single-word="false" fo:break-before="auto" fo:break-after="auto"/>
    </style:style>
    <style:style style:name="P28"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font-weight-complex="normal"/>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font-weight-complex="bold"/>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font-weight-complex="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normal" fo:text-transform="none" fo:color="#000000" style:text-line-through-style="none" style:text-line-through-type="none" style:text-position="0% 100%" fo:font-size="9pt" fo:font-style="normal" style:text-underline-style="none" fo:font-weight="bold" style:font-size-asian="9pt" style:font-style-asian="normal" style:font-weight-asian="bold" style:font-size-complex="9pt" style:font-style-complex="normal" style:font-weight-complex="bold"/>
    </style:style>
    <style:style style:name="T14" style:family="text">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16" style:family="text">
      <style:text-properties fo:font-variant="small-caps" fo:color="#336633" fo:font-size="16pt" style:font-size-asian="16pt"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color="#333333" style:font-name="Consolas" fo:background-color="#f8f8f8" loext:char-shading-value="0" style:font-name-asian="Consolas1" style:font-name-complex="Consolas1"/>
    </style:style>
    <style:style style:name="T21" style:family="text">
      <style:text-properties fo:color="#333333" style:font-name="Consolas" fo:font-size="10pt" fo:background-color="#f8f8f8" loext:char-shading-value="0" style:font-name-asian="Consolas1" style:font-size-asian="10pt" style:font-name-complex="Consolas1" style:font-size-complex="10pt"/>
    </style:style>
    <style:style style:name="T22" style:family="text">
      <style:text-properties fo:color="#1155cc" style:text-underline-style="solid" style:text-underline-width="auto" style:text-underline-color="font-color"/>
    </style:style>
    <style:style style:name="T23"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bookmark text:name="_aczyuw2yex2w"/><text:span text:style-name="T1">Introducción a Docker y Kubernetes</text:span><text:span text:style-name="T2"><text:line-break/></text:span><text:span text:style-name="T3">UD 05. Caso práctico 01 - Wordpress + MariaDB</text:span></text:p>
      <text:p text:style-name="P1"><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5"><draw:frame draw:style-name="fr1" draw:name="image3.png" text:anchor-type="as-char" svg:width="6.6929in" svg:height="0.4862in" draw:z-index="0"><draw:image xlink:href="Pictures/10000000000007800000008BADE10FA77D575FB0.png" xlink:type="simple" xlink:show="embed" xlink:actuate="onLoad" loext:mime-type="image/png"/></draw:frame></text:p>
      <text:p text:style-name="P2"/>
      <text:p text:style-name="P2"/>
      <text:p text:style-name="P3"/>
      <text:p text:style-name="P3"/>
      <text:p text:style-name="P3"/>
      <text:p text:style-name="P4"><text:span text:style-name="T5">Autor: Sergi García Barea</text:span></text:p>
      <text:p text:style-name="P5"><text:span text:style-name="T5">Actualizado Enero 2026</text:span></text:p>
      <text:p text:style-name="P4"><text:span text:style-name="T6">Licencia</text:span></text:p>
      <text:p text:style-name="P7"/>
      <text:p text:style-name="P6"><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text:span text:style-name="T6">Nomenclatura</text:span></text:p>
      <text:p text:style-name="P8">A lo largo de este tema se utilizarán distintos símbolos para distinguir elementos importantes dentro del contenido. Estos símbolos son:</text:p>
      <text:p text:style-name="P8"/>
      <text:p text:style-name="P9"><text:span text:style-name="T9"><text:s/>📖 </text:span><text:span text:style-name="T10">Importante</text:span></text:p>
      <text:p text:style-name="P10"/>
      <text:p text:style-name="P9"><text:span text:style-name="T11"><text:s/>❕</text:span><text:span text:style-name="T12"> </text:span><text:span text:style-name="T10">Atención</text:span></text:p>
      <text:p text:style-name="P10"/>
      <text:p text:style-name="P9"><text:span text:style-name="T9"><text:s/>💬</text:span> <text:span text:style-name="T10">Interesante</text:span></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2"><text:a xlink:type="simple" xlink:href="#_dbh0n1vac4c8" text:style-name="Index_20_Link" text:visited-style-name="Index_20_Link"><text:span text:style-name="T13">1. Introducción<text:tab/>3</text:span></text:a></text:p>
          <text:p text:style-name="P12"><text:a xlink:type="simple" xlink:href="#_vyhbfp4t666x" text:style-name="Index_20_Link" text:visited-style-name="Index_20_Link"><text:span text:style-name="T13">2. Paso 1: Creando la red<text:tab/>3</text:span></text:a></text:p>
          <text:p text:style-name="P12"><text:a xlink:type="simple" xlink:href="#_ps20tmdmej5i" text:style-name="Index_20_Link" text:visited-style-name="Index_20_Link"><text:span text:style-name="T13">3. Paso 2: creando contenedor MariaDB<text:tab/>3</text:span></text:a></text:p>
          <text:p text:style-name="P12"><text:a xlink:type="simple" xlink:href="#_3b05p2f899fh" text:style-name="Index_20_Link" text:visited-style-name="Index_20_Link"><text:span text:style-name="T13">4. Paso 3: Creando contenedor con Wordpress<text:tab/>4</text:span></text:a></text:p>
          <text:p text:style-name="P12"><text:a xlink:type="simple" xlink:href="#_8qw1hflbhu12" text:style-name="Index_20_Link" text:visited-style-name="Index_20_Link"><text:span text:style-name="T13">5. Paso 4: Instalando Wordpress<text:tab/>4</text:span></text:a></text:p>
          <text:p text:style-name="P12"><text:a xlink:type="simple" xlink:href="#_muqbttmxjiut" text:style-name="Index_20_Link" text:visited-style-name="Index_20_Link"><text:span text:style-name="T13">6. Migrando contenedor MariaDB de 10.6 a 10.7<text:tab/>5</text:span></text:a></text:p>
          <text:p text:style-name="P12"><text:a xlink:type="simple" xlink:href="#_72yv1gty1dke" text:style-name="Index_20_Link" text:visited-style-name="Index_20_Link"><text:span text:style-name="T13">7. Bibliografía</text:span></text:a><text:a xlink:type="simple" xlink:href="#_72yv1gty1dke" text:style-name="Index_20_Link" text:visited-style-name="Index_20_Link"><text:span text:style-name="T14"><text:tab/>6</text:span></text:a></text:p>
        </text:index-body>
      </text:table-of-content>
      <text:p text:style-name="Standard"/>
      <text:p text:style-name="P14"/>
      <text:p text:style-name="P15"><text:span text:style-name="T16">UD05. Caso práctico 01</text:span></text:p>
      <text:list xml:id="list3159752742" text:style-name="WWNum1">
        <text:list-item>
          <text:p text:style-name="P26"><text:bookmark text:name="_dbh0n1vac4c8"/>Introducción</text:p>
        </text:list-item>
      </text:list>
      <text:p text:style-name="P10">En este caso práctico vamos a poner en marcha el popular CMS Wordpress. Para ello usaremos una red donde se conectarán dos contenedores: el primero utilizando Apache + PHP, junto con una versión instalada de Wordpress, mientras que el segundo contendrá un servidor de bases de datos MariaDB. Además, realizaremos un ejemplo de una migración de versión del contenedor MariaDB.</text:p>
      <text:list xml:id="list34155665559691" text:continue-numbering="true" text:style-name="WWNum1">
        <text:list-item>
          <text:p text:style-name="P27"><text:bookmark text:name="_vyhbfp4t666x"/>Paso 1: Creando la red</text:p>
        </text:list-item>
      </text:list>
      <text:p text:style-name="P10">El primer paso a dar en este caso práctico, es crear la red que compartirán los contenedores que creemos, a la que llamaremos “<text:span text:style-name="T19">redwp</text:span>”. La podemos crear con el comando:</text:p>
      <table:table table:name="Table1" table:style-name="Table1">
        <table:table-column table:style-name="Table1.A"/>
        <table:table-row table:style-name="Table1.1">
          <table:table-cell table:style-name="Table1.A1" office:value-type="string">
            <text:p text:style-name="P21"><text:span text:style-name="T20">docker network create redwp</text:span></text:p>
          </table:table-cell>
        </table:table-row>
      </table:table>
      <text:p text:style-name="P10"/>
      <text:list xml:id="list34156068867686" text:continue-numbering="true" text:style-name="WWNum1">
        <text:list-item>
          <text:p text:style-name="P27"><text:bookmark text:name="_ps20tmdmej5i"/>Paso 2: creando contenedor MariaDB</text:p>
        </text:list-item>
      </text:list>
      <text:p text:style-name="P10">El primer paso será crear un contenedor con el servidor de bases de datos MariaDB dentro de la red. Lo haremos utilizando la imagen <text:a xlink:type="simple" xlink:href="https://hub.docker.com/_/mariadb" text:style-name="ListLabel_20_10" text:visited-style-name="ListLabel_20_10"><text:span text:style-name="T22">https://hub.docker.com/_/mariadb</text:span></text:a> con el siguiente comando:</text:p>
      <table:table table:name="Table2" table:style-name="Table2">
        <table:table-column table:style-name="Table2.A"/>
        <table:table-row table:style-name="Table2.1">
          <table:table-cell table:style-name="Table2.A1" office:value-type="string">
            <text:p text:style-name="P21"><text:span text:style-name="T21">docker run --name nuestromariadb --network redwp -v /home/sergi/mariadbdata:/var/lib/mysql -e MARIADB_ROOT_PASSWORD=cefireroot -e MARIADB_USER=cefireuser -e MARIADB_PASSWORD=cefirepass -e MARIADB_DATABASE=cefiredb -d mariadb:10.6</text:span></text:p>
          </table:table-cell>
        </table:table-row>
      </table:table>
      <text:p text:style-name="P10"/>
      <text:p text:style-name="P10">Con esta orden estamos creando un contenedor de nombre “<text:span text:style-name="T19">nuestromariadb</text:span>”, dentro de la “<text:span text:style-name="T19">redwp</text:span>” y mapeando mediante “binding mount” el directorio local “<text:span text:style-name="T19">/home/sergi/mariadbdata</text:span>” con “<text:span text:style-name="T19">/var/lib/mysql</text:span>” (valor por defecto, pese a ser MariaDB) del contenedor, donde se guarda la información de las bases de datos de MariaDB.</text:p>
      <text:p text:style-name="P10"/>
      <text:p text:style-name="P10">Siguiendo la información de la imagen, establecemos diferentes variables de entorno que soporta este contenedor. En ellas indicamos:</text:p>
      <text:list xml:id="list2020966920" text:style-name="WWNum2">
        <text:list-item>
          <text:p text:style-name="P22">Contraseña de “root” de MariaDB.</text:p>
        </text:list-item>
        <text:list-item>
          <text:p text:style-name="P23">Usuario “<text:span text:style-name="T19">cefireuser</text:span>” y contraseña “<text:span text:style-name="T19">cefirepass</text:span>” de un usuario de MariaDB que creará con privilegios de “<text:span text:style-name="T19">root</text:span>”.</text:p>
          <text:list>
            <text:list-item>
              <text:p text:style-name="P25">Creamos este usuario debido a que, por seguridad, MariaDB no soporta conexiones remotas como root. En la práctica, los permisos de MariaDB deben ser ajustados y es desaconsejable usar usuarios con permisos totales.</text:p>
            </text:list-item>
          </text:list>
        </text:list-item>
        <text:list-item>
          <text:p text:style-name="P24">Nombre de base de datos a crear.</text:p>
        </text:list-item>
      </text:list>
      <text:p text:style-name="P10"/>
      <text:p text:style-name="P10">Además, con propósito de realizar posteriormente una sustitución de contenedor, hemos usado la versión de la imagen “mariadb:10.6”.</text:p>
      <text:p text:style-name="P10"><text:soft-page-break/>Una vez listo el contenedor con MariaDB, procedemos a preparar el contenedor Wordpress.</text:p>
      <text:p text:style-name="P10"/>
      <text:p text:style-name="P10"/>
      <text:list xml:id="list34154315868769" text:continue-list="list34156068867686" text:style-name="WWNum1">
        <text:list-item>
          <text:p text:style-name="P27"><text:bookmark text:name="_3b05p2f899fh"/>Paso 3: Creando contenedor con Wordpress</text:p>
        </text:list-item>
      </text:list>
      <text:p text:style-name="P10">Crearemos el contenedor que contendrá Apache + PHP, así como Wordpress preinstalado. Nos basaremos en esta imagen: <text:a xlink:type="simple" xlink:href="https://hub.docker.com/_/wordpress" text:style-name="ListLabel_20_10" text:visited-style-name="ListLabel_20_10"><text:span text:style-name="T22">https://hub.docker.com/_/wordpress</text:span></text:a></text:p>
      <text:p text:style-name="P10">Podemos crearlo con:</text:p>
      <table:table table:name="Table3" table:style-name="Table3">
        <table:table-column table:style-name="Table3.A"/>
        <table:table-row table:style-name="Table3.1">
          <table:table-cell table:style-name="Table3.A1" office:value-type="string">
            <text:p text:style-name="P21"><text:span text:style-name="T20">docker run --name nuestrowp --network redwp -p 8080:80 -d wordpress</text:span></text:p>
          </table:table-cell>
        </table:table-row>
      </table:table>
      <text:p text:style-name="P10"/>
      <text:p text:style-name="P10">Con esta orden estamos creando un contenedor de nombre “<text:span text:style-name="T19">nuestrowp</text:span>”, dentro de la “<text:span text:style-name="T19">redwp</text:span>” y cargando el puerto 80 del contenedor en el puerto 8080 de la máquina anfitrión.</text:p>
      <text:list xml:id="list34154423201210" text:continue-numbering="true" text:style-name="WWNum1">
        <text:list-item>
          <text:p text:style-name="P27"><text:bookmark text:name="_8qw1hflbhu12"/>Paso 4: Instalando Wordpress</text:p>
        </text:list-item>
      </text:list>
      <text:p text:style-name="P10">Si en este momento accedemos a <text:a xlink:type="simple" xlink:href="http://localhost:8080" text:style-name="ListLabel_20_10" text:visited-style-name="ListLabel_20_10"><text:span text:style-name="T22">http://localhost:8080</text:span></text:a> veremos algo similar a:</text:p>
      <text:p text:style-name="P11"><draw:frame draw:style-name="fr1" draw:name="image6.png" text:anchor-type="as-char" svg:width="5.2807in" svg:height="2.0453in" draw:z-index="0"><draw:image xlink:href="Pictures/100002010000059D0000022F6A6A2E16D1A406EF.png" xlink:type="simple" xlink:show="embed" xlink:actuate="onLoad" loext:mime-type="image/png"/></draw:frame></text:p>
      <text:p text:style-name="P10">Ahora deberemos proseguir con la instalación e indicar dónde está el sistema de bases de datos. Usaremos como nombre de host, el nombre que le dimos al servidor MariaDB. Como usuario y nombre de base de datos utilizaremos las variables proporcionadas al crear el contenedor MariaDB. Quedará de forma similar a la siguiente imagen.</text:p>
      <text:p text:style-name="P10"/>
      <text:p text:style-name="P11"><draw:frame draw:style-name="fr1" draw:name="image1.png" text:anchor-type="as-char" svg:width="6.6929in" svg:height="5.278in" draw:z-index="0"><draw:image xlink:href="Pictures/10000000000002A5000002169E94DC35BCCDDA27.png" xlink:type="simple" xlink:show="embed" xlink:actuate="onLoad" loext:mime-type="image/png"/></draw:frame></text:p>
      <text:p text:style-name="P10">Una vez introducidos los datos, si todo es correcto, Wordpress nos informará de que ya podemos proceder a instalar y configurar nuestro sitio Wordpress.</text:p>
      <text:p text:style-name="P11"><draw:frame draw:style-name="fr1" draw:name="image4.png" text:anchor-type="as-char" svg:width="5.0307in" svg:height="1.9638in" draw:z-index="0"><draw:image xlink:href="Pictures/10000201000003070000012F733864FDB0B1AF8C.png" xlink:type="simple" xlink:show="embed" xlink:actuate="onLoad" loext:mime-type="image/png"/></draw:frame></text:p>
      <text:p text:style-name="P10">Con esto ya hemos configurado Docker correctamente para poner en marcha este servicio. Ahora simplemente deberemos seguir los pasos de la instalación de Wordpress y ya tendremos listo nuestro sitio.</text:p>
      <text:list xml:id="list34154619756145" text:continue-numbering="true" text:style-name="WWNum1">
        <text:list-item>
          <text:p text:style-name="P27"><text:bookmark text:name="_muqbttmxjiut"/>Migrando contenedor MariaDB de 10.6 a 10.7</text:p>
        </text:list-item>
      </text:list>
      <text:p text:style-name="P10">Vamos a realizar un pequeño ejemplo donde migraremos el contenedor original, que tiene MariaDB versión 10.6 a un contenedor con MariaDB 10.7 (Elegimos estas versiones por simplicidad).</text:p>
      <text:p text:style-name="P10"/>
      <text:p text:style-name="P10">En primer lugar, deberemos parar y eliminar el contenedor “<text:span text:style-name="T19">nuestromariadb</text:span>”.</text:p>
      <table:table table:name="Table4" table:style-name="Table4">
        <table:table-column table:style-name="Table4.A"/>
        <table:table-row table:style-name="Table4.1">
          <table:table-cell table:style-name="Table4.A1" office:value-type="string">
            <text:p text:style-name="P21"><text:span text:style-name="T20">docker stop nuestromariadb</text:span></text:p>
          </table:table-cell>
        </table:table-row>
      </table:table>
      <text:p text:style-name="P20"/>
      <table:table table:name="Table5" table:style-name="Table5">
        <table:table-column table:style-name="Table5.A"/>
        <table:table-row table:style-name="Table5.1">
          <table:table-cell table:style-name="Table5.A1" office:value-type="string">
            <text:p text:style-name="P21"><text:span text:style-name="T20">docker rm nuestromariadb</text:span></text:p>
          </table:table-cell>
        </table:table-row>
      </table:table>
      <text:p text:style-name="P10"/>
      <text:p text:style-name="P10">Una vez parado y eliminado, recordamos que no hemos perdido la información importante de MariaDB (configuración y bases de datos), ya que esta información ha quedado almacenada en la carpeta del anfitrión “<text:span text:style-name="T19">/home/sergi/mariadbdata</text:span>”. Al crear el nuevo contenedor, simplemente deberemos mapear esos datos. Podemos crearlo con:</text:p>
      <table:table table:name="Table6" table:style-name="Table6">
        <table:table-column table:style-name="Table6.A"/>
        <table:table-row table:style-name="Table6.1">
          <table:table-cell table:style-name="Table6.A1" office:value-type="string">
            <text:p text:style-name="P21"><text:span text:style-name="T21">docker run --name nuestromariadb --network redwp -v /home/sergi/mariadbdata:/var/lib/mysql -e MARIADB_ROOT_PASSWORD=cefireroot -e MARIADB_USER=cefireuser -e MARIADB_PASSWORD=cefirepass -e MARIADB_DATABASE=cefiredb -d mariadb:10.7</text:span></text:p>
          </table:table-cell>
        </table:table-row>
      </table:table>
      <text:p text:style-name="P10"/>
      <text:p text:style-name="P10">Si todo ha ido bien, al acceder a <text:a xlink:type="simple" xlink:href="http://localhost:8080" text:style-name="ListLabel_20_10" text:visited-style-name="ListLabel_20_10"><text:span text:style-name="T22">http://localhost:8080</text:span></text:a> veremos nuestro sitio Wordpress funcionando con normalidad.</text:p>
      <text:list xml:id="list34155240640563" text:continue-numbering="true" text:style-name="WWNum1">
        <text:list-item>
          <text:p text:style-name="P27"><text:bookmark text:name="_72yv1gty1dke"/>Bibliografía</text:p>
        </text:list-item>
      </text:list>
      <text:p text:style-name="P8">[1] Docker Docs <text:a xlink:type="simple" xlink:href="https://docs.docker.com/" text:style-name="ListLabel_20_10" text:visited-style-name="ListLabel_20_10"><text:span text:style-name="T22">https://docs.docker.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font-weight-complex="normal"/>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font-style-complex="italic" style:font-weight-complex="bold"/>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5. Caso práctico 01</text:span></text:p>
      </style:header>
      <style:footer>
        <text:p text:style-name="MP4"><text:span text:style-name="MT1">Curso Introducción a Docker<text:tab/><text:tab/>UD05 - Página </text:span><text:page-number text:select-page="current">2</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6" meta:object-count="0" meta:page-count="2" meta:paragraph-count="61" meta:word-count="801" meta:character-count="5337" meta:non-whitespace-character-count="4602"/>
    <meta:generator>LibreOfficeDev/6.0.5.2$Linux_X86_64 LibreOffice_project/</meta:generator>
  </office:meta>
</office:document-meta>
</file>